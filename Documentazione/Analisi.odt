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1000005C7000003B18AA6BCA3.png" manifest:media-type="image/png"/>
  <manifest:file-entry manifest:full-path="Pictures/10000001000005CE000004842E434480.png" manifest:media-type="image/png"/>
  <manifest:file-entry manifest:full-path="Pictures/1000000100000232000002736C846E9A.png" manifest:media-type="image/png"/>
  <manifest:file-entry manifest:full-path="Pictures/10000001000004BC000001B5B346B3BE.png" manifest:media-type="image/png"/>
  <manifest:file-entry manifest:full-path="Pictures/100000010000196800000974A83C5C4C.png" manifest:media-type="image/png"/>
  <manifest:file-entry manifest:full-path="Pictures/1000000100000337000003F7BE462E2A.png" manifest:media-type="image/png"/>
  <manifest:file-entry manifest:full-path="Pictures/1000000100000581000001EB93886917.png" manifest:media-type="image/png"/>
  <manifest:file-entry manifest:full-path="Pictures/10000001000001E50000009F69159FEF.png" manifest:media-type="image/png"/>
  <manifest:file-entry manifest:full-path="Pictures/1000000100000790000004900A58D62C.png" manifest:media-type="image/png"/>
  <manifest:file-entry manifest:full-path="Pictures/10002F5000002383000010E5025C1D5E.emf" manifest:media-type="image/x-emf"/>
  <manifest:file-entry manifest:full-path="Pictures/10000001000005340000025C4D9B1F65.png" manifest:media-type="image/png"/>
  <manifest:file-entry manifest:full-path="Pictures/10000001000001A9000000C5C94B4E66.png" manifest:media-type="image/png"/>
  <manifest:file-entry manifest:full-path="Pictures/100000000000060600000415B6EB400F.png" manifest:media-type="image/png"/>
  <manifest:file-entry manifest:full-path="Pictures/10000000000003C90000020260706662.png" manifest:media-type="image/png"/>
  <manifest:file-entry manifest:full-path="Pictures/10000001000001B90000009271C1C633.png" manifest:media-type="image/png"/>
  <manifest:file-entry manifest:full-path="Pictures/10000001000001D40000004F5D9F92E7.png" manifest:media-type="image/png"/>
  <manifest:file-entry manifest:full-path="Pictures/10000001000001D40000005162B9CE6D.png" manifest:media-type="image/png"/>
  <manifest:file-entry manifest:full-path="Pictures/10000001000001D30000005AAD0BD790.png" manifest:media-type="image/png"/>
  <manifest:file-entry manifest:full-path="Pictures/10000000000003280000012AF077070F.png" manifest:media-type="image/png"/>
  <manifest:file-entry manifest:full-path="Pictures/10000001000001B90000005834D58F27.png" manifest:media-type="image/png"/>
  <manifest:file-entry manifest:full-path="Pictures/10000001000001D100000054F618CF78.png" manifest:media-type="image/png"/>
  <manifest:file-entry manifest:full-path="Pictures/10000001000002A00000033A9B55BA1F.png" manifest:media-type="image/png"/>
  <manifest:file-entry manifest:full-path="Pictures/100000000000015A000001166966E16E.png" manifest:media-type="image/png"/>
  <manifest:file-entry manifest:full-path="Pictures/100000010000012F00000165FD43F447.png" manifest:media-type="image/png"/>
  <manifest:file-entry manifest:full-path="Pictures/1000000100000205000001D367C10DED.png" manifest:media-type="image/png"/>
  <manifest:file-entry manifest:full-path="Pictures/100000010000023F000002E6A3EEFF4B.png" manifest:media-type="image/png"/>
  <manifest:file-entry manifest:full-path="Pictures/100000000000026B000003D7955835BE.png" manifest:media-type="image/png"/>
  <manifest:file-entry manifest:full-path="Pictures/1000000100000158000000A3853A176E.png" manifest:media-type="image/png"/>
  <manifest:file-entry manifest:full-path="Pictures/1000000100000A4000000CC81F3D79E7.png" manifest:media-type="image/png"/>
  <manifest:file-entry manifest:full-path="Pictures/1000000000000205000000783EAD71F2.png" manifest:media-type="image/png"/>
  <manifest:file-entry manifest:full-path="Pictures/1000000000000200000001EBEBED96B1.png" manifest:media-type="image/png"/>
  <manifest:file-entry manifest:full-path="Pictures/10000001000001A4000000C549C64B7C.png" manifest:media-type="image/png"/>
  <manifest:file-entry manifest:full-path="Pictures/1000000100000327000002FDCD808B68.png" manifest:media-type="image/png"/>
  <manifest:file-entry manifest:full-path="Pictures/10000001000002320000016A3AFEAC0A.png" manifest:media-type="image/png"/>
  <manifest:file-entry manifest:full-path="Pictures/100000010000026D0000040D47ECAF34.png" manifest:media-type="image/png"/>
  <manifest:file-entry manifest:full-path="Pictures/100008940000034F0000034FED8C1714.wmf" manifest:media-type="image/x-wmf"/>
  <manifest:file-entry manifest:full-path="Pictures/100000000000002000000020D32C8FCF.png" manifest:media-type="image/png"/>
  <manifest:file-entry manifest:full-path="Pictures/10000001000001D8000000D43F189BE2.png" manifest:media-type="image/png"/>
  <manifest:file-entry manifest:full-path="Pictures/10000000000004270000025BE5BC7E18.png" manifest:media-type="image/png"/>
  <manifest:file-entry manifest:full-path="Pictures/1000000000000524000008009918481E.png" manifest:media-type="image/png"/>
  <manifest:file-entry manifest:full-path="Pictures/100000010000018000000158F17B23BD.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Bahnschrift" svg:font-family="Bahnschrift" style:font-family-generic="roman" style:font-pitch="variable"/>
    <style:font-face style:name="Bahnschrift Light" svg:font-family="'Bahnschrift Light'"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roman"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ans-serif" style:font-family-generic="roman" style:font-pitch="variable"/>
    <style:font-face style:name="NSimSun" svg:font-family="NSimSun" style:font-family-generic="system" style:font-pitch="variable"/>
    <style:font-face style:name="Nimbus Mono PS" svg:font-family="'Nimbus Mono PS'" style:font-family-generic="roman"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Reem Kufi" svg:font-family="'Reem Kufi'" style:font-family-generic="roman" style:font-pitch="variable"/>
    <style:font-face style:name="Source Code Pro" svg:font-family="'Source Code Pro'" style:font-family-generic="roman"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system" style:font-pitch="variable"/>
    <style:font-face style:name="Ubuntu Mono" svg:font-family="'Ubuntu Mono'" style:font-family-generic="roman"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17.281cm" fo:margin-left="-0.148cm" fo:margin-top="0cm" fo:margin-bottom="0cm" table:align="left" style:writing-mode="page"/>
    </style:style>
    <style:style style:name="Table1.A" style:family="table-column">
      <style:table-column-properties style:column-width="2.979cm"/>
    </style:style>
    <style:style style:name="Table1.B" style:family="table-column">
      <style:table-column-properties style:column-width="11.453cm"/>
    </style:style>
    <style:style style:name="Table1.C" style:family="table-column">
      <style:table-column-properties style:column-width="2.849cm"/>
    </style:style>
    <style:style style:name="Table1.1" style:family="table-row">
      <style:table-row-properties fo:keep-together="auto"/>
    </style:style>
    <style:style style:name="Table1.A1" style:family="table-cell">
      <style:table-cell-properties fo:padding-left="0.123cm" fo:padding-right="0.123cm" fo:padding-top="0cm" fo:padding-bottom="0cm" fo:border="0.5pt solid #000000"/>
    </style:style>
    <style:style style:name="Table1.A15" style:family="table-cell">
      <style:table-cell-properties fo:padding-left="0.123cm" fo:padding-right="0.123cm" fo:padding-top="0cm" fo:padding-bottom="0cm" fo:border-left="0.5pt solid #000000" fo:border-right="0.5pt solid #000000" fo:border-top="none" fo:border-bottom="0.5pt solid #000000"/>
    </style:style>
    <style:style style:name="Table2" style:family="table">
      <style:table-properties style:width="17.5cm" fo:margin-left="0cm" fo:margin-top="0cm" fo:margin-bottom="0cm" table:align="left" style:writing-mode="page"/>
    </style:style>
    <style:style style:name="Table2.A" style:family="table-column">
      <style:table-column-properties style:column-width="17.5cm"/>
    </style:style>
    <style:style style:name="Table2.1" style:family="table-row">
      <style:table-row-properties style:min-row-height="0.512cm" fo:keep-together="auto"/>
    </style:style>
    <style:style style:name="Table2.A1" style:family="table-cell">
      <style:table-cell-properties fo:background-color="#000000" fo:padding-left="0.053cm" fo:padding-right="0.053cm" fo:padding-top="0cm" fo:padding-bottom="0cm" fo:border="0.75pt solid #ffffff">
        <style:background-image/>
      </style:table-cell-properties>
    </style:style>
    <style:style style:name="Table2.2" style:family="table-row">
      <style:table-row-properties style:row-height="0.7cm" fo:keep-together="auto"/>
    </style:style>
    <style:style style:name="Table2.A2" style:family="table-cell">
      <style:table-cell-properties style:vertical-align="middle" fo:padding="0cm" fo:border-left="none" fo:border-right="none" fo:border-top="0.75pt solid #000000" fo:border-bottom="0.75pt solid #000000"/>
    </style:style>
    <style:style style:name="Table2.A3" style:family="table-cell">
      <style:table-cell-properties style:vertical-align="middle" fo:padding="0cm" fo:border="none"/>
    </style:style>
    <style:style style:name="Table2.4" style:family="table-row">
      <style:table-row-properties style:row-height="1.147cm" fo:keep-together="auto"/>
    </style:style>
    <style:style style:name="Table2.A13" style:family="table-cell">
      <style:table-cell-properties style:vertical-align="middle" fo:padding="0cm" fo:border-left="none" fo:border-right="none" fo:border-top="none" fo:border-bottom="0.75pt solid #000000"/>
    </style:style>
    <style:style style:name="Table3" style:family="table">
      <style:table-properties style:width="17.59cm" style:rel-width="100%" fo:margin-left="0cm" fo:margin-top="0cm" fo:margin-bottom="0cm" table:align="left" style:writing-mode="page"/>
    </style:style>
    <style:style style:name="Table3.A" style:family="table-column">
      <style:table-column-properties style:column-width="8.795cm" style:rel-column-width="32767*"/>
    </style:style>
    <style:style style:name="Table3.1" style:family="table-row">
      <style:table-row-properties fo:keep-together="auto"/>
    </style:style>
    <style:style style:name="Table3.A1" style:family="table-cell">
      <style:table-cell-properties fo:padding="0cm" fo:border-left="none" fo:border-right="none" fo:border-top="2pt solid #000000" fo:border-bottom="0.75pt solid #000000"/>
    </style:style>
    <style:style style:name="Table3.A2" style:family="table-cell">
      <style:table-cell-properties style:vertical-align="middle" fo:background-color="#eeeeee" fo:padding="0cm" fo:border-left="none" fo:border-right="none" fo:border-top="none" fo:border-bottom="0.75pt solid #999999">
        <style:background-image/>
      </style:table-cell-properties>
    </style:style>
    <style:style style:name="Table3.B2" style:family="table-cell">
      <style:table-cell-properties fo:background-color="#eeeeee" fo:padding="0cm" fo:border-left="none" fo:border-right="none" fo:border-top="none" fo:border-bottom="0.75pt solid #999999">
        <style:background-image/>
      </style:table-cell-properties>
    </style:style>
    <style:style style:name="Table3.B3" style:family="table-cell">
      <style:table-cell-properties fo:background-color="#eeeeee" fo:padding="0cm" fo:border-left="none" fo:border-right="none" fo:border-top="none" fo:border-bottom="0.75pt solid #999999">
        <style:background-image/>
      </style:table-cell-properties>
    </style:style>
    <style:style style:name="Table3.B4" style:family="table-cell">
      <style:table-cell-properties fo:background-color="#eeeeee" fo:padding="0cm" fo:border-left="none" fo:border-right="none" fo:border-top="none" fo:border-bottom="0.75pt solid #999999">
        <style:background-image/>
      </style:table-cell-properties>
    </style:style>
    <style:style style:name="Table3.A5" style:family="table-cell">
      <style:table-cell-properties style:vertical-align="middle" fo:padding="0cm" fo:border-left="none" fo:border-right="none" fo:border-top="0.75pt solid #999999" fo:border-bottom="2pt solid #000000"/>
    </style:style>
    <style:style style:name="Table3.B5" style:family="table-cell">
      <style:table-cell-properties fo:padding="0cm" fo:border-left="none" fo:border-right="none" fo:border-top="0.75pt solid #999999" fo:border-bottom="2pt solid #000000"/>
    </style:style>
    <style:style style:name="Table4" style:family="table">
      <style:table-properties style:width="17.59cm" style:rel-width="100%" fo:margin-left="0cm" fo:margin-top="0cm" fo:margin-bottom="0cm" table:align="left" style:writing-mode="page"/>
    </style:style>
    <style:style style:name="Table4.A" style:family="table-column">
      <style:table-column-properties style:column-width="5.863cm" style:rel-column-width="21845*"/>
    </style:style>
    <style:style style:name="Table4.B" style:family="table-column">
      <style:table-column-properties style:column-width="5.863cm" style:rel-column-width="21847*"/>
    </style:style>
    <style:style style:name="Table4.C" style:family="table-column">
      <style:table-column-properties style:column-width="5.863cm" style:rel-column-width="21843*"/>
    </style:style>
    <style:style style:name="Table4.1" style:family="table-row">
      <style:table-row-properties fo:keep-together="auto"/>
    </style:style>
    <style:style style:name="Table4.A1" style:family="table-cell">
      <style:table-cell-properties fo:background-color="#000000" fo:padding="0cm" fo:border="none">
        <style:background-image/>
      </style:table-cell-properties>
    </style:style>
    <style:style style:name="Table4.2" style:family="table-row">
      <style:table-row-properties style:row-height="0.801cm" fo:keep-together="auto"/>
    </style:style>
    <style:style style:name="Table4.A2" style:family="table-cell">
      <style:table-cell-properties style:vertical-align="middle" fo:background-color="#c5000b" fo:padding="0cm" fo:border="none">
        <style:background-image/>
      </style:table-cell-properties>
    </style:style>
    <style:style style:name="Table4.C2" style:family="table-cell">
      <style:table-cell-properties style:vertical-align="middle" fo:background-color="#ff420e" fo:padding="0.049cm" fo:border="0.25pt solid #000000">
        <style:background-image/>
      </style:table-cell-properties>
    </style:style>
    <style:style style:name="Table4.B3" style:family="table-cell">
      <style:table-cell-properties style:vertical-align="middle" fo:background-color="#ffd320" fo:padding="0cm" fo:border="none">
        <style:background-image/>
      </style:table-cell-properties>
    </style:style>
    <style:style style:name="Table4.B4" style:family="table-cell">
      <style:table-cell-properties style:vertical-align="middle" fo:background-color="#579d1c" fo:padding="0cm" fo:border="none">
        <style:background-image/>
      </style:table-cell-properties>
    </style:style>
    <style:style style:name="Table4.A10" style:family="table-cell">
      <style:table-cell-properties style:vertical-align="middle" fo:background-color="#579d1c" fo:padding="0cm" fo:border-left="none" fo:border-right="none" fo:border-top="none" fo:border-bottom="0.75pt solid #000000">
        <style:background-image/>
      </style:table-cell-properties>
    </style:style>
    <style:style style:name="Table4.C10" style:family="table-cell">
      <style:table-cell-properties style:vertical-align="middle" fo:background-color="#aecf00" fo:padding="0cm" fo:border-left="none" fo:border-right="none" fo:border-top="none" fo:border-bottom="0.75pt solid #000000">
        <style:background-image/>
      </style:table-cell-properties>
    </style:style>
    <style:style style:name="Table5" style:family="table">
      <style:table-properties style:width="17.59cm" style:rel-width="100%" fo:margin-left="0cm" fo:margin-top="0cm" fo:margin-bottom="0cm" table:align="left" style:writing-mode="page"/>
    </style:style>
    <style:style style:name="Table5.A" style:family="table-column">
      <style:table-column-properties style:column-width="3.517cm" style:rel-column-width="13107*"/>
    </style:style>
    <style:style style:name="Table5.B" style:family="table-column">
      <style:table-column-properties style:column-width="3.434cm" style:rel-column-width="12798*"/>
    </style:style>
    <style:style style:name="Table5.C" style:family="table-column">
      <style:table-column-properties style:column-width="3.6cm" style:rel-column-width="13416*"/>
    </style:style>
    <style:style style:name="Table5.1" style:family="table-row">
      <style:table-row-properties fo:keep-together="auto"/>
    </style:style>
    <style:style style:name="Table5.A1" style:family="table-cell">
      <style:table-cell-properties style:vertical-align="middle" fo:background-color="#00599d" fo:padding="0cm" fo:border-left="none" fo:border-right="none" fo:border-top="none" fo:border-bottom="0.75pt solid #00599d">
        <style:background-image/>
      </style:table-cell-properties>
    </style:style>
    <style:style style:name="Table5.A2" style:family="table-cell">
      <style:table-cell-properties style:vertical-align="middle" fo:background-color="#adc5e7" fo:padding="0cm" fo:border-left="0.75pt solid #00599d" fo:border-right="none" fo:border-top="0.75pt solid #00599d" fo:border-bottom="0.75pt solid #00599d">
        <style:background-image/>
      </style:table-cell-properties>
    </style:style>
    <style:style style:name="Table5.B2" style:family="table-cell">
      <style:table-cell-properties style:vertical-align="middle" fo:background-color="#adc5e7" fo:padding="0cm" fo:border-left="none" fo:border-right="none" fo:border-top="0.75pt solid #00599d" fo:border-bottom="0.75pt solid #00599d">
        <style:background-image/>
      </style:table-cell-properties>
    </style:style>
    <style:style style:name="Table5.E2" style:family="table-cell">
      <style:table-cell-properties style:vertical-align="middle" fo:background-color="#adc5e7" fo:padding="0cm" fo:border-left="none" fo:border-right="0.75pt solid #00599d" fo:border-top="0.75pt solid #00599d" fo:border-bottom="0.75pt solid #00599d">
        <style:background-image/>
      </style:table-cell-properties>
    </style:style>
    <style:style style:name="Table6" style:family="table">
      <style:table-properties style:width="17.992cm" fo:margin-top="0cm" fo:margin-bottom="0cm" fo:break-before="page" table:align="center" style:writing-mode="page"/>
    </style:style>
    <style:style style:name="Table6.A" style:family="table-column">
      <style:table-column-properties style:column-width="3.607cm"/>
    </style:style>
    <style:style style:name="Table6.B" style:family="table-column">
      <style:table-column-properties style:column-width="5.973cm"/>
    </style:style>
    <style:style style:name="Table6.C" style:family="table-column">
      <style:table-column-properties style:column-width="3.598cm"/>
    </style:style>
    <style:style style:name="Table6.D" style:family="table-column">
      <style:table-column-properties style:column-width="2.215cm"/>
    </style:style>
    <style:style style:name="Table6.E" style:family="table-column">
      <style:table-column-properties style:column-width="2.598cm"/>
    </style:style>
    <style:style style:name="Table6.1" style:family="table-row">
      <style:table-row-properties style:row-height="1.101cm" fo:keep-together="auto"/>
    </style:style>
    <style:style style:name="Table6.A1" style:family="table-cell">
      <style:table-cell-properties style:vertical-align="middle" fo:background-color="#004586" fo:padding="0cm" fo:border-left="none" fo:border-right="none" fo:border-top="2pt solid #000000" fo:border-bottom="0.75pt solid #000000">
        <style:background-image/>
      </style:table-cell-properties>
    </style:style>
    <style:style style:name="Table6.2" style:family="table-row">
      <style:table-row-properties style:min-row-height="2.046cm" fo:keep-together="auto"/>
    </style:style>
    <style:style style:name="Table6.A2" style:family="table-cell">
      <style:table-cell-properties style:vertical-align="middle" fo:padding="0cm" fo:border-left="none" fo:border-right="none" fo:border-top="none" fo:border-bottom="0.75pt solid #000000"/>
    </style:style>
    <style:style style:name="Table6.B2" style:family="table-cell">
      <style:table-cell-properties style:vertical-align="middle" fo:padding="0cm" fo:border-left="none" fo:border-right="none" fo:border-top="none" fo:border-bottom="0.75pt solid #000000"/>
    </style:style>
    <style:style style:name="Table6.C2" style:family="table-cell">
      <style:table-cell-properties style:vertical-align="middle" fo:padding="0cm" fo:border-left="none" fo:border-right="none" fo:border-top="none" fo:border-bottom="0.75pt solid #000000"/>
    </style:style>
    <style:style style:name="Table6.D2" style:family="table-cell">
      <style:table-cell-properties style:vertical-align="middle" fo:padding="0cm" fo:border-left="none" fo:border-right="none" fo:border-top="none" fo:border-bottom="0.75pt solid #000000"/>
    </style:style>
    <style:style style:name="Table6.E2" style:family="table-cell">
      <style:table-cell-properties style:vertical-align="middle" fo:padding="0cm" fo:border-left="none" fo:border-right="none" fo:border-top="none" fo:border-bottom="0.75pt solid #000000"/>
    </style:style>
    <style:style style:name="Table6.3" style:family="table-row">
      <style:table-row-properties style:row-height="1.499cm" fo:keep-together="auto"/>
    </style:style>
    <style:style style:name="Table6.A3" style:family="table-cell">
      <style:table-cell-properties style:vertical-align="middle" fo:background-color="#eeeeee" fo:padding="0cm" fo:border-left="none" fo:border-right="none" fo:border-top="none" fo:border-bottom="0.75pt solid #999999">
        <style:background-image/>
      </style:table-cell-properties>
    </style:style>
    <style:style style:name="Table6.D3" style:family="table-cell">
      <style:table-cell-properties style:vertical-align="middle" fo:background-color="#ff420e" fo:padding="0cm" fo:border-left="none" fo:border-right="none" fo:border-top="none" fo:border-bottom="0.75pt solid #999999">
        <style:background-image/>
      </style:table-cell-properties>
    </style:style>
    <style:style style:name="Table6.4" style:family="table-row">
      <style:table-row-properties style:min-row-height="0.157cm" fo:keep-together="auto"/>
    </style:style>
    <style:style style:name="Table6.E4" style:family="table-cell">
      <style:table-cell-properties style:vertical-align="middle" fo:background-color="#ffd320" fo:padding="0cm" fo:border-left="none" fo:border-right="none" fo:border-top="none" fo:border-bottom="0.75pt solid #999999">
        <style:background-image/>
      </style:table-cell-properties>
    </style:style>
    <style:style style:name="Table6.5" style:family="table-row">
      <style:table-row-properties style:min-row-height="0.168cm" fo:keep-together="auto"/>
    </style:style>
    <style:style style:name="Table6.E5" style:family="table-cell">
      <style:table-cell-properties style:vertical-align="middle" fo:background-color="#aecf00" fo:padding="0cm" fo:border-left="none" fo:border-right="none" fo:border-top="none" fo:border-bottom="0.75pt solid #999999">
        <style:background-image/>
      </style:table-cell-properties>
    </style:style>
    <style:style style:name="Table6.6" style:family="table-row">
      <style:table-row-properties style:min-row-height="0.199cm" fo:keep-together="auto"/>
    </style:style>
    <style:style style:name="Table6.E6" style:family="table-cell">
      <style:table-cell-properties style:vertical-align="middle" fo:background-color="#83caff" fo:padding="0cm" fo:border-left="none" fo:border-right="none" fo:border-top="none" fo:border-bottom="0.75pt solid #999999">
        <style:background-image/>
      </style:table-cell-properties>
    </style:style>
    <style:style style:name="Table6.7" style:family="table-row">
      <style:table-row-properties style:min-row-height="0.226cm" fo:keep-together="auto"/>
    </style:style>
    <style:style style:name="Table6.8" style:family="table-row">
      <style:table-row-properties style:min-row-height="0.164cm" fo:keep-together="auto"/>
    </style:style>
    <style:style style:name="Table6.A9" style:family="table-cell">
      <style:table-cell-properties style:vertical-align="middle" fo:background-color="#004586" fo:padding="0cm" fo:border-left="0.75pt solid #999999" fo:border-right="0.75pt solid #999999" fo:border-top="none" fo:border-bottom="1.5pt solid #999999">
        <style:background-image/>
      </style:table-cell-properties>
    </style:style>
    <style:style style:name="Table6.10" style:family="table-row">
      <style:table-row-properties style:min-row-height="1.997cm" fo:keep-together="auto"/>
    </style:style>
    <style:style style:name="Table6.A10" style:family="table-cell">
      <style:table-cell-properties style:vertical-align="middle" fo:padding="0cm" fo:border-left="0.75pt solid #999999" fo:border-right="none" fo:border-top="none" fo:border-bottom="1.5pt solid #999999"/>
    </style:style>
    <style:style style:name="Table6.B10" style:family="table-cell">
      <style:table-cell-properties style:vertical-align="middle" fo:padding="0cm" fo:border-left="none" fo:border-right="none" fo:border-top="none" fo:border-bottom="1.5pt solid #999999"/>
    </style:style>
    <style:style style:name="Table6.C10" style:family="table-cell">
      <style:table-cell-properties style:vertical-align="middle" fo:padding="0cm" fo:border-left="none" fo:border-right="none" fo:border-top="none" fo:border-bottom="1.5pt solid #999999"/>
    </style:style>
    <style:style style:name="Table6.D10" style:family="table-cell">
      <style:table-cell-properties style:vertical-align="middle" fo:padding="0cm" fo:border-left="none" fo:border-right="none" fo:border-top="none" fo:border-bottom="1.5pt solid #999999"/>
    </style:style>
    <style:style style:name="Table6.E10" style:family="table-cell">
      <style:table-cell-properties style:vertical-align="middle" fo:padding="0cm" fo:border-left="none" fo:border-right="0.75pt solid #999999" fo:border-top="none" fo:border-bottom="1.5pt solid #999999"/>
    </style:style>
    <style:style style:name="Table6.11" style:family="table-row">
      <style:table-row-properties style:min-row-height="2.598cm" fo:keep-together="auto"/>
    </style:style>
    <style:style style:name="Table6.A11" style:family="table-cell">
      <style:table-cell-properties style:vertical-align="middle" fo:background-color="#eeeeee" fo:padding="0cm" fo:border-left="none" fo:border-right="none" fo:border-top="none" fo:border-bottom="2pt groove #999999">
        <style:background-image/>
      </style:table-cell-properties>
    </style:style>
    <style:style style:name="Table6.B11" style:family="table-cell">
      <style:table-cell-properties style:vertical-align="middle" fo:background-color="#eeeeee" fo:padding="0cm" fo:border="none">
        <style:background-image/>
      </style:table-cell-properties>
    </style:style>
    <style:style style:name="Table6.D11" style:family="table-cell">
      <style:table-cell-properties style:vertical-align="middle" fo:background-color="#aecf00" fo:padding="0cm" fo:border="none">
        <style:background-image/>
      </style:table-cell-properties>
    </style:style>
    <style:style style:name="Table6.E11" style:family="table-cell">
      <style:table-cell-properties style:vertical-align="middle" fo:background-color="#83caff" fo:padding="0cm" fo:border="none">
        <style:background-image/>
      </style:table-cell-properties>
    </style:style>
    <style:style style:name="Table6.D12" style:family="table-cell">
      <style:table-cell-properties style:vertical-align="middle" fo:background-color="#aecf00" fo:padding="0cm" fo:border-left="none" fo:border-right="none" fo:border-top="none" fo:border-bottom="2pt groove #999999">
        <style:background-image/>
      </style:table-cell-properties>
    </style:style>
    <style:style style:name="Table6.A13" style:family="table-cell">
      <style:table-cell-properties style:vertical-align="middle" fo:background-color="#004586" fo:padding="0cm" fo:border-left="none" fo:border-right="none" fo:border-top="none" fo:border-bottom="0.75pt solid #999999">
        <style:background-image/>
      </style:table-cell-properties>
    </style:style>
    <style:style style:name="Table6.14" style:family="table-row">
      <style:table-row-properties style:min-row-height="1.499cm" fo:keep-together="auto"/>
    </style:style>
    <style:style style:name="Table6.A14" style:family="table-cell">
      <style:table-cell-properties style:vertical-align="middle" fo:background-color="#eeeeee" fo:padding="0cm" fo:border-left="none" fo:border-right="none" fo:border-top="none" fo:border-bottom="2pt solid #000000">
        <style:background-image/>
      </style:table-cell-properties>
    </style:style>
    <style:style style:name="Table6.A19" style:family="table-cell">
      <style:table-cell-properties style:vertical-align="middle" fo:padding="0cm" fo:border-left="none" fo:border-right="none" fo:border-top="0.75pt solid #999999" fo:border-bottom="2pt solid #000000"/>
    </style:style>
    <style:style style:name="Table6.B19" style:family="table-cell">
      <style:table-cell-properties style:vertical-align="middle" fo:background-color="#eeeeee" fo:padding="0cm" fo:border-left="none" fo:border-right="none" fo:border-top="0.75pt solid #999999" fo:border-bottom="2pt solid #000000">
        <style:background-image/>
      </style:table-cell-properties>
    </style:style>
    <style:style style:name="Table6.C19" style:family="table-cell">
      <style:table-cell-properties style:vertical-align="middle" fo:padding="0cm" fo:border-left="none" fo:border-right="none" fo:border-top="0.75pt solid #999999" fo:border-bottom="2pt solid #000000"/>
    </style:style>
    <style:style style:name="Table6.D19" style:family="table-cell">
      <style:table-cell-properties style:vertical-align="middle" fo:background-color="#ffd320" fo:padding="0cm" fo:border-left="none" fo:border-right="none" fo:border-top="0.75pt solid #999999" fo:border-bottom="2pt solid #000000">
        <style:background-image/>
      </style:table-cell-properties>
    </style:style>
    <style:style style:name="Table6.E19" style:family="table-cell">
      <style:table-cell-properties style:vertical-align="middle" fo:background-color="#aecf00" fo:padding="0cm" fo:border-left="none" fo:border-right="none" fo:border-top="0.75pt solid #999999" fo:border-bottom="2pt solid #000000">
        <style:background-image/>
      </style:table-cell-properties>
    </style:style>
    <style:style style:name="Table7" style:family="table">
      <style:table-properties style:width="17.992cm" fo:margin-top="0cm" fo:margin-bottom="0cm" table:align="center" style:writing-mode="page"/>
    </style:style>
    <style:style style:name="Table7.A" style:family="table-column">
      <style:table-column-properties style:column-width="3.15cm"/>
    </style:style>
    <style:style style:name="Table7.B" style:family="table-column">
      <style:table-column-properties style:column-width="5.226cm"/>
    </style:style>
    <style:style style:name="Table7.C" style:family="table-column">
      <style:table-column-properties style:column-width="2.926cm"/>
    </style:style>
    <style:style style:name="Table7.D" style:family="table-column">
      <style:table-column-properties style:column-width="1.9cm"/>
    </style:style>
    <style:style style:name="Table7.E" style:family="table-column">
      <style:table-column-properties style:column-width="2.212cm"/>
    </style:style>
    <style:style style:name="Table7.F" style:family="table-column">
      <style:table-column-properties style:column-width="2.577cm"/>
    </style:style>
    <style:style style:name="Table7.1" style:family="table-row">
      <style:table-row-properties style:row-height="1.101cm" fo:keep-together="auto"/>
    </style:style>
    <style:style style:name="Table7.A1" style:family="table-cell">
      <style:table-cell-properties style:vertical-align="middle" fo:background-color="#004586" fo:padding="0cm" fo:border-left="none" fo:border-right="none" fo:border-top="2pt groove #999999" fo:border-bottom="0.75pt solid #999999">
        <style:background-image/>
      </style:table-cell-properties>
    </style:style>
    <style:style style:name="Table7.2" style:family="table-row">
      <style:table-row-properties style:min-row-height="1.997cm" fo:keep-together="auto"/>
    </style:style>
    <style:style style:name="Table7.A2" style:family="table-cell">
      <style:table-cell-properties style:vertical-align="middle" fo:padding="0cm" fo:border-left="0.75pt solid #999999" fo:border-right="none" fo:border-top="1.5pt solid #999999" fo:border-bottom="1.5pt solid #999999"/>
    </style:style>
    <style:style style:name="Table7.B2" style:family="table-cell">
      <style:table-cell-properties style:vertical-align="middle" fo:padding="0cm" fo:border-left="none" fo:border-right="none" fo:border-top="1.5pt solid #999999" fo:border-bottom="1.5pt solid #999999"/>
    </style:style>
    <style:style style:name="Table7.C2" style:family="table-cell">
      <style:table-cell-properties style:vertical-align="middle" fo:padding="0cm" fo:border-left="none" fo:border-right="none" fo:border-top="1.5pt solid #999999" fo:border-bottom="1.5pt solid #999999"/>
    </style:style>
    <style:style style:name="Table7.D2" style:family="table-cell">
      <style:table-cell-properties style:vertical-align="middle" fo:padding="0cm" fo:border-left="none" fo:border-right="none" fo:border-top="1.5pt solid #999999" fo:border-bottom="1.5pt solid #999999"/>
    </style:style>
    <style:style style:name="Table7.E2" style:family="table-cell">
      <style:table-cell-properties style:vertical-align="middle" fo:padding="0cm" fo:border-left="none" fo:border-right="none" fo:border-top="1.5pt solid #999999" fo:border-bottom="1.5pt solid #999999"/>
    </style:style>
    <style:style style:name="Table7.F2" style:family="table-cell">
      <style:table-cell-properties style:vertical-align="middle" fo:padding="0cm" fo:border-left="none" fo:border-right="0.75pt solid #999999" fo:border-top="1.5pt solid #999999" fo:border-bottom="1.5pt solid #999999"/>
    </style:style>
    <style:style style:name="Table7.3" style:family="table-row">
      <style:table-row-properties style:min-row-height="1.499cm" fo:keep-together="auto"/>
    </style:style>
    <style:style style:name="Table7.A3" style:family="table-cell">
      <style:table-cell-properties style:vertical-align="middle" fo:background-color="#eeeeee" fo:padding="0cm" fo:border-left="none" fo:border-right="none" fo:border-top="0.75pt solid #999999" fo:border-bottom="2pt solid #000000">
        <style:background-image/>
      </style:table-cell-properties>
    </style:style>
    <style:style style:name="Table7.B3" style:family="table-cell">
      <style:table-cell-properties style:vertical-align="middle" fo:background-color="#eeeeee" fo:padding="0cm" fo:border-left="none" fo:border-right="none" fo:border-top="0.75pt solid #999999" fo:border-bottom="0.75pt solid #999999">
        <style:background-image/>
      </style:table-cell-properties>
    </style:style>
    <style:style style:name="Table7.D3" style:family="table-cell">
      <style:table-cell-properties style:vertical-align="middle" fo:background-color="#ffd320" fo:padding="0cm" fo:border-left="none" fo:border-right="none" fo:border-top="0.75pt solid #999999" fo:border-bottom="0.75pt solid #999999">
        <style:background-image/>
      </style:table-cell-properties>
    </style:style>
    <style:style style:name="Table7.E3" style:family="table-cell">
      <style:table-cell-properties style:vertical-align="middle" fo:background-color="#aecf00" fo:padding="0cm" fo:border-left="none" fo:border-right="none" fo:border-top="0.75pt solid #999999" fo:border-bottom="0.75pt solid #999999">
        <style:background-image/>
      </style:table-cell-properties>
    </style:style>
    <style:style style:name="Table7.A4" style:family="table-cell">
      <style:table-cell-properties style:vertical-align="middle" fo:background-color="#eeeeee" fo:padding="0cm" fo:border-left="none" fo:border-right="none" fo:border-top="none" fo:border-bottom="0.75pt solid #999999">
        <style:background-image/>
      </style:table-cell-properties>
    </style:style>
    <style:style style:name="Table7.D4" style:family="table-cell">
      <style:table-cell-properties style:vertical-align="middle" fo:background-color="#ffd320" fo:padding="0cm" fo:border-left="none" fo:border-right="none" fo:border-top="none" fo:border-bottom="0.75pt solid #999999">
        <style:background-image/>
      </style:table-cell-properties>
    </style:style>
    <style:style style:name="Table7.F4" style:family="table-cell">
      <style:table-cell-properties style:vertical-align="middle" fo:background-color="#aecf00" fo:padding="0cm" fo:border-left="none" fo:border-right="none" fo:border-top="none" fo:border-bottom="0.75pt solid #999999">
        <style:background-image/>
      </style:table-cell-properties>
    </style:style>
    <style:style style:name="Table7.E6" style:family="table-cell">
      <style:table-cell-properties style:vertical-align="middle" fo:background-color="#83caff" fo:padding="0cm" fo:border-left="none" fo:border-right="none" fo:border-top="none" fo:border-bottom="0.75pt solid #999999">
        <style:background-image/>
      </style:table-cell-properties>
    </style:style>
    <style:style style:name="Table7.A8" style:family="table-cell">
      <style:table-cell-properties style:vertical-align="middle" fo:padding="0cm" fo:border-left="none" fo:border-right="none" fo:border-top="0.75pt solid #999999" fo:border-bottom="2pt solid #000000"/>
    </style:style>
    <style:style style:name="Table7.C8" style:family="table-cell">
      <style:table-cell-properties style:vertical-align="middle" fo:padding="0cm" fo:border-left="none" fo:border-right="none" fo:border-top="0.75pt solid #999999" fo:border-bottom="2pt solid #000000"/>
    </style:style>
    <style:style style:name="Table7.D8" style:family="table-cell">
      <style:table-cell-properties style:vertical-align="middle" fo:background-color="#ffd320" fo:padding="0cm" fo:border-left="none" fo:border-right="none" fo:border-top="0.75pt solid #999999" fo:border-bottom="2pt solid #000000">
        <style:background-image/>
      </style:table-cell-properties>
    </style:style>
    <style:style style:name="Table7.E8" style:family="table-cell">
      <style:table-cell-properties style:vertical-align="middle" fo:background-color="#aecf00" fo:padding="0cm" fo:border-left="none" fo:border-right="none" fo:border-top="0.75pt solid #999999" fo:border-bottom="2pt solid #000000">
        <style:background-image/>
      </style:table-cell-properties>
    </style:style>
    <style:style style:name="Table8" style:family="table">
      <style:table-properties style:width="17.59cm" style:rel-width="100%" fo:margin-left="0cm" fo:margin-top="0cm" fo:margin-bottom="0cm" table:align="left" style:writing-mode="page"/>
    </style:style>
    <style:style style:name="Table8.A" style:family="table-column">
      <style:table-column-properties style:column-width="8.795cm" style:rel-column-width="32767*"/>
    </style:style>
    <style:style style:name="Table8.1" style:family="table-row">
      <style:table-row-properties fo:keep-together="auto"/>
    </style:style>
    <style:style style:name="Table8.A1" style:family="table-cell">
      <style:table-cell-properties fo:padding="0cm" fo:border-left="none" fo:border-right="none" fo:border-top="2pt solid #000000" fo:border-bottom="0.75pt solid #000000"/>
    </style:style>
    <style:style style:name="Table8.A2" style:family="table-cell">
      <style:table-cell-properties fo:background-color="#eeeeee" fo:padding="0cm" fo:border-left="none" fo:border-right="none" fo:border-top="none" fo:border-bottom="0.75pt solid #999999">
        <style:background-image/>
      </style:table-cell-properties>
    </style:style>
    <style:style style:name="Table8.A6" style:family="table-cell">
      <style:table-cell-properties fo:padding="0cm" fo:border-left="none" fo:border-right="none" fo:border-top="0.75pt solid #999999" fo:border-bottom="2pt solid #000000"/>
    </style:style>
    <style:style style:name="Table8.B6" style:family="table-cell">
      <style:table-cell-properties fo:padding="0cm" fo:border-left="none" fo:border-right="none" fo:border-top="0.75pt solid #999999" fo:border-bottom="2pt solid #000000"/>
    </style:style>
    <style:style style:name="Table9" style:family="table">
      <style:table-properties style:width="17.992cm" fo:margin-top="0cm" fo:margin-bottom="0cm" table:align="center" style:writing-mode="page"/>
    </style:style>
    <style:style style:name="Table9.A" style:family="table-column">
      <style:table-column-properties style:column-width="5.412cm"/>
    </style:style>
    <style:style style:name="Table9.B" style:family="table-column">
      <style:table-column-properties style:column-width="3.2cm"/>
    </style:style>
    <style:style style:name="Table9.C" style:family="table-column">
      <style:table-column-properties style:column-width="2.193cm"/>
    </style:style>
    <style:style style:name="Table9.D" style:family="table-column">
      <style:table-column-properties style:column-width="2.399cm"/>
    </style:style>
    <style:style style:name="Table9.E" style:family="table-column">
      <style:table-column-properties style:column-width="2.406cm"/>
    </style:style>
    <style:style style:name="Table9.F" style:family="table-column">
      <style:table-column-properties style:column-width="2.383cm"/>
    </style:style>
    <style:style style:name="Table9.1" style:family="table-row">
      <style:table-row-properties style:row-height="0.891cm" fo:keep-together="auto"/>
    </style:style>
    <style:style style:name="Table9.A1" style:family="table-cell">
      <style:table-cell-properties style:vertical-align="middle" fo:background-color="#004586" fo:padding="0cm" fo:border-left="none" fo:border-right="none" fo:border-top="2pt groove #999999" fo:border-bottom="0.75pt solid #999999">
        <style:background-image/>
      </style:table-cell-properties>
    </style:style>
    <style:style style:name="Table9.2" style:family="table-row">
      <style:table-row-properties style:min-row-height="1.997cm" fo:keep-together="auto"/>
    </style:style>
    <style:style style:name="Table9.A2" style:family="table-cell">
      <style:table-cell-properties style:vertical-align="middle" fo:padding="0cm" fo:border-left="0.75pt solid #999999" fo:border-right="none" fo:border-top="1.5pt solid #999999" fo:border-bottom="1.5pt solid #999999"/>
    </style:style>
    <style:style style:name="Table9.B2" style:family="table-cell">
      <style:table-cell-properties style:vertical-align="middle" fo:padding="0cm" fo:border-left="none" fo:border-right="none" fo:border-top="1.5pt solid #999999" fo:border-bottom="1.5pt solid #999999"/>
    </style:style>
    <style:style style:name="Table9.C2" style:family="table-cell">
      <style:table-cell-properties style:vertical-align="middle" fo:padding="0cm" fo:border-left="none" fo:border-right="none" fo:border-top="1.5pt solid #999999" fo:border-bottom="1.5pt solid #999999"/>
    </style:style>
    <style:style style:name="Table9.D2" style:family="table-cell">
      <style:table-cell-properties style:vertical-align="middle" fo:padding="0cm" fo:border-left="none" fo:border-right="none" fo:border-top="1.5pt solid #999999" fo:border-bottom="1.5pt solid #999999"/>
    </style:style>
    <style:style style:name="Table9.E2" style:family="table-cell">
      <style:table-cell-properties style:vertical-align="middle" fo:padding="0cm" fo:border-left="none" fo:border-right="none" fo:border-top="1.5pt solid #999999" fo:border-bottom="1.5pt solid #999999"/>
    </style:style>
    <style:style style:name="Table9.F2" style:family="table-cell">
      <style:table-cell-properties style:vertical-align="middle" fo:padding="0cm" fo:border-left="none" fo:border-right="0.75pt solid #999999" fo:border-top="1.5pt solid #999999" fo:border-bottom="1.5pt solid #999999"/>
    </style:style>
    <style:style style:name="Table9.3" style:family="table-row">
      <style:table-row-properties style:min-row-height="1.499cm" fo:keep-together="auto"/>
    </style:style>
    <style:style style:name="Table9.A3" style:family="table-cell">
      <style:table-cell-properties style:vertical-align="middle" fo:background-color="#eeeeee" fo:padding="0cm" fo:border-left="none" fo:border-right="none" fo:border-top="0.75pt solid #999999" fo:border-bottom="0.75pt solid #999999">
        <style:background-image/>
      </style:table-cell-properties>
    </style:style>
    <style:style style:name="Table9.B3" style:family="table-cell">
      <style:table-cell-properties style:vertical-align="middle" fo:background-color="#eeeeee" fo:padding="0cm" fo:border-left="none" fo:border-right="none" fo:border-top="0.75pt solid #999999" fo:border-bottom="2pt solid #000000">
        <style:background-image/>
      </style:table-cell-properties>
    </style:style>
    <style:style style:name="Table9.C3" style:family="table-cell">
      <style:table-cell-properties style:vertical-align="middle" fo:background-color="#ffd320" fo:padding="0cm" fo:border-left="none" fo:border-right="none" fo:border-top="0.75pt solid #999999" fo:border-bottom="0.75pt solid #999999">
        <style:background-image/>
      </style:table-cell-properties>
    </style:style>
    <style:style style:name="Table9.D3" style:family="table-cell">
      <style:table-cell-properties style:vertical-align="middle" fo:background-color="#aecf00" fo:padding="0cm" fo:border-left="none" fo:border-right="none" fo:border-top="0.75pt solid #999999" fo:border-bottom="0.75pt solid #999999">
        <style:background-image/>
      </style:table-cell-properties>
    </style:style>
    <style:style style:name="Table9.F3" style:family="table-cell">
      <style:table-cell-properties style:vertical-align="middle" fo:padding="0cm" fo:border-left="none" fo:border-right="none" fo:border-top="0.75pt solid #999999" fo:border-bottom="0.75pt solid #999999"/>
    </style:style>
    <style:style style:name="Table9.A4" style:family="table-cell">
      <style:table-cell-properties style:vertical-align="middle" fo:background-color="#eeeeee" fo:padding="0cm" fo:border-left="none" fo:border-right="none" fo:border-top="none" fo:border-bottom="0.75pt solid #999999">
        <style:background-image/>
      </style:table-cell-properties>
    </style:style>
    <style:style style:name="Table9.C4" style:family="table-cell">
      <style:table-cell-properties style:vertical-align="middle" fo:background-color="#ffd320" fo:padding="0cm" fo:border-left="none" fo:border-right="none" fo:border-top="none" fo:border-bottom="0.75pt solid #999999">
        <style:background-image/>
      </style:table-cell-properties>
    </style:style>
    <style:style style:name="Table9.E4" style:family="table-cell">
      <style:table-cell-properties style:vertical-align="middle" fo:background-color="#aecf00" fo:padding="0cm" fo:border-left="none" fo:border-right="none" fo:border-top="none" fo:border-bottom="0.75pt solid #999999">
        <style:background-image/>
      </style:table-cell-properties>
    </style:style>
    <style:style style:name="Table9.D6" style:family="table-cell">
      <style:table-cell-properties style:vertical-align="middle" fo:background-color="#83caff" fo:padding="0cm" fo:border-left="none" fo:border-right="none" fo:border-top="none" fo:border-bottom="0.75pt solid #999999">
        <style:background-image/>
      </style:table-cell-properties>
    </style:style>
    <style:style style:name="Table9.B8" style:family="table-cell">
      <style:table-cell-properties style:vertical-align="middle" fo:padding="0cm" fo:border-left="none" fo:border-right="none" fo:border-top="0.75pt solid #999999" fo:border-bottom="2pt solid #000000"/>
    </style:style>
    <style:style style:name="Table9.C8" style:family="table-cell">
      <style:table-cell-properties style:vertical-align="middle" fo:background-color="#ffd320" fo:padding="0cm" fo:border-left="none" fo:border-right="none" fo:border-top="0.75pt solid #999999" fo:border-bottom="2pt solid #000000">
        <style:background-image/>
      </style:table-cell-properties>
    </style:style>
    <style:style style:name="Table9.D8" style:family="table-cell">
      <style:table-cell-properties style:vertical-align="middle" fo:background-color="#aecf00" fo:padding="0cm" fo:border-left="none" fo:border-right="none" fo:border-top="0.75pt solid #999999" fo:border-bottom="2pt solid #000000">
        <style:background-image/>
      </style:table-cell-properties>
    </style:style>
    <style:style style:name="Table10" style:family="table">
      <style:table-properties style:width="17.985cm" fo:margin-top="0cm" fo:margin-bottom="0cm" table:align="center" style:writing-mode="page"/>
    </style:style>
    <style:style style:name="Table10.A" style:family="table-column">
      <style:table-column-properties style:column-width="2.166cm"/>
    </style:style>
    <style:style style:name="Table10.B" style:family="table-column">
      <style:table-column-properties style:column-width="2.214cm"/>
    </style:style>
    <style:style style:name="Table10.C" style:family="table-column">
      <style:table-column-properties style:column-width="2.457cm"/>
    </style:style>
    <style:style style:name="Table10.D" style:family="table-column">
      <style:table-column-properties style:column-width="2.671cm"/>
    </style:style>
    <style:style style:name="Table10.E" style:family="table-column">
      <style:table-column-properties style:column-width="2.713cm"/>
    </style:style>
    <style:style style:name="Table10.F" style:family="table-column">
      <style:table-column-properties style:column-width="3.411cm"/>
    </style:style>
    <style:style style:name="Table10.G" style:family="table-column">
      <style:table-column-properties style:column-width="2.353cm"/>
    </style:style>
    <style:style style:name="Table10.1" style:family="table-row">
      <style:table-row-properties style:min-row-height="1.499cm" fo:keep-together="auto"/>
    </style:style>
    <style:style style:name="Table10.A1" style:family="table-cell">
      <style:table-cell-properties style:vertical-align="middle" fo:background-color="#314004" fo:padding="0cm" fo:border-left="none" fo:border-right="none" fo:border-top="0.75pt solid #999999" fo:border-bottom="0.75pt solid #999999">
        <style:background-image/>
      </style:table-cell-properties>
    </style:style>
    <style:style style:name="Table10.A2" style:family="table-cell">
      <style:table-cell-properties style:vertical-align="middle" fo:background-color="#ffd320" fo:padding="0cm" fo:border-left="none" fo:border-right="none" fo:border-top="none" fo:border-bottom="0.75pt solid #999999">
        <style:background-image/>
      </style:table-cell-properties>
    </style:style>
    <style:style style:name="Table10.C2" style:family="table-cell">
      <style:table-cell-properties style:vertical-align="middle" fo:background-color="#aecf00" fo:padding="0cm" fo:border-left="none" fo:border-right="none" fo:border-top="none" fo:border-bottom="0.75pt solid #999999">
        <style:background-image/>
      </style:table-cell-properties>
    </style:style>
    <style:style style:name="Table10.C5" style:family="table-cell">
      <style:table-cell-properties style:vertical-align="middle" fo:background-color="#83caff" fo:padding="0cm" fo:border-left="none" fo:border-right="none" fo:border-top="none" fo:border-bottom="0.75pt solid #999999">
        <style:background-image/>
      </style:table-cell-properties>
    </style:style>
    <style:style style:name="Table10.B7" style:family="table-cell">
      <style:table-cell-properties style:vertical-align="middle" fo:background-color="#ffd320" fo:padding="0cm" fo:border-left="none" fo:border-right="none" fo:border-top="0.75pt solid #999999" fo:border-bottom="2pt solid #000000">
        <style:background-image/>
      </style:table-cell-properties>
    </style:style>
    <style:style style:name="Table10.C7" style:family="table-cell">
      <style:table-cell-properties style:vertical-align="middle" fo:background-color="#aecf00" fo:padding="0cm" fo:border-left="none" fo:border-right="none" fo:border-top="0.75pt solid #999999" fo:border-bottom="2pt solid #000000">
        <style:background-image/>
      </style:table-cell-properties>
    </style:style>
    <style:style style:name="Table11" style:family="table">
      <style:table-properties style:width="17.985cm" fo:margin-top="0cm" fo:margin-bottom="0cm" table:align="center" style:writing-mode="page"/>
    </style:style>
    <style:style style:name="Table11.A" style:family="table-column">
      <style:table-column-properties style:column-width="1.432cm"/>
    </style:style>
    <style:style style:name="Table11.B" style:family="table-column">
      <style:table-column-properties style:column-width="1.436cm"/>
    </style:style>
    <style:style style:name="Table11.C" style:family="table-column">
      <style:table-column-properties style:column-width="1.603cm"/>
    </style:style>
    <style:style style:name="Table11.D" style:family="table-column">
      <style:table-column-properties style:column-width="1.75cm"/>
    </style:style>
    <style:style style:name="Table11.E" style:family="table-column">
      <style:table-column-properties style:column-width="1.797cm"/>
    </style:style>
    <style:style style:name="Table11.F" style:family="table-column">
      <style:table-column-properties style:column-width="1.577cm"/>
    </style:style>
    <style:style style:name="Table11.G" style:family="table-column">
      <style:table-column-properties style:column-width="2.037cm"/>
    </style:style>
    <style:style style:name="Table11.H" style:family="table-column">
      <style:table-column-properties style:column-width="1.743cm"/>
    </style:style>
    <style:style style:name="Table11.I" style:family="table-column">
      <style:table-column-properties style:column-width="1.554cm"/>
    </style:style>
    <style:style style:name="Table11.J" style:family="table-column">
      <style:table-column-properties style:column-width="1.561cm"/>
    </style:style>
    <style:style style:name="Table11.K" style:family="table-column">
      <style:table-column-properties style:column-width="1.494cm"/>
    </style:style>
    <style:style style:name="Table11.1" style:family="table-row">
      <style:table-row-properties style:min-row-height="1.499cm" fo:keep-together="auto"/>
    </style:style>
    <style:style style:name="Table11.A1" style:family="table-cell">
      <style:table-cell-properties style:vertical-align="middle" fo:background-color="#314004" fo:padding="0cm" fo:border-left="none" fo:border-right="none" fo:border-top="0.75pt solid #999999" fo:border-bottom="0.75pt solid #999999">
        <style:background-image/>
      </style:table-cell-properties>
    </style:style>
    <style:style style:name="Table11.A2" style:family="table-cell">
      <style:table-cell-properties style:vertical-align="middle" fo:background-color="#ffd320" fo:padding="0cm" fo:border-left="none" fo:border-right="none" fo:border-top="none" fo:border-bottom="0.75pt solid #999999">
        <style:background-image/>
      </style:table-cell-properties>
    </style:style>
    <style:style style:name="Table11.C2" style:family="table-cell">
      <style:table-cell-properties style:vertical-align="middle" fo:background-color="#aecf00" fo:padding="0cm" fo:border-left="none" fo:border-right="none" fo:border-top="none" fo:border-bottom="0.75pt solid #999999">
        <style:background-image/>
      </style:table-cell-properties>
    </style:style>
    <style:style style:name="Table11.C5" style:family="table-cell">
      <style:table-cell-properties style:vertical-align="middle" fo:background-color="#83caff" fo:padding="0cm" fo:border-left="none" fo:border-right="none" fo:border-top="none" fo:border-bottom="0.75pt solid #999999">
        <style:background-image/>
      </style:table-cell-properties>
    </style:style>
    <style:style style:name="Table11.B7" style:family="table-cell">
      <style:table-cell-properties style:vertical-align="middle" fo:background-color="#ffd320" fo:padding="0cm" fo:border-left="none" fo:border-right="none" fo:border-top="0.75pt solid #999999" fo:border-bottom="2pt solid #000000">
        <style:background-image/>
      </style:table-cell-properties>
    </style:style>
    <style:style style:name="Table11.C7" style:family="table-cell">
      <style:table-cell-properties style:vertical-align="middle" fo:background-color="#aecf00" fo:padding="0cm" fo:border-left="none" fo:border-right="none" fo:border-top="0.75pt solid #999999" fo:border-bottom="2pt solid #000000">
        <style:background-image/>
      </style:table-cell-properties>
    </style:style>
    <style:style style:name="Table12" style:family="table">
      <style:table-properties style:width="17.59cm" style:rel-width="100%" fo:margin-left="0cm" fo:margin-top="0cm" fo:margin-bottom="0cm" table:align="left" style:writing-mode="page"/>
    </style:style>
    <style:style style:name="Table12.A" style:family="table-column">
      <style:table-column-properties style:column-width="2.193cm" style:rel-column-width="8165*"/>
    </style:style>
    <style:style style:name="Table12.B" style:family="table-column">
      <style:table-column-properties style:column-width="1.91cm" style:rel-column-width="7117*"/>
    </style:style>
    <style:style style:name="Table12.C" style:family="table-column">
      <style:table-column-properties style:column-width="2.097cm" style:rel-column-width="7812*"/>
    </style:style>
    <style:style style:name="Table12.D" style:family="table-column">
      <style:table-column-properties style:column-width="1.619cm" style:rel-column-width="6030*"/>
    </style:style>
    <style:style style:name="Table12.E" style:family="table-column">
      <style:table-column-properties style:column-width="2.274cm" style:rel-column-width="8473*"/>
    </style:style>
    <style:style style:name="Table12.G" style:family="table-column">
      <style:table-column-properties style:column-width="1.889cm" style:rel-column-width="7038*"/>
    </style:style>
    <style:style style:name="Table12.H" style:family="table-column">
      <style:table-column-properties style:column-width="1.909cm" style:rel-column-width="7111*"/>
    </style:style>
    <style:style style:name="Table12.I" style:family="table-column">
      <style:table-column-properties style:column-width="1.789cm" style:rel-column-width="6666*"/>
    </style:style>
    <style:style style:name="Table12.1" style:family="table-row">
      <style:table-row-properties fo:keep-together="auto"/>
    </style:style>
    <style:style style:name="Table12.A1" style:family="table-cell">
      <style:table-cell-properties fo:padding="0cm" fo:border-left="none" fo:border-right="none" fo:border-top="2pt solid #000000" fo:border-bottom="0.75pt solid #000000"/>
    </style:style>
    <style:style style:name="Table12.B1" style:family="table-cell">
      <style:table-cell-properties fo:background-color="#e3f2fd" fo:padding="0cm" fo:border-left="none" fo:border-right="none" fo:border-top="2pt solid #000000" fo:border-bottom="0.75pt solid #000000">
        <style:background-image/>
      </style:table-cell-properties>
    </style:style>
    <style:style style:name="Table12.G1" style:family="table-cell">
      <style:table-cell-properties fo:background-color="#bbdefb" fo:padding="0cm" fo:border-left="none" fo:border-right="none" fo:border-top="2pt solid #000000" fo:border-bottom="0.75pt solid #000000">
        <style:background-image/>
      </style:table-cell-properties>
    </style:style>
    <style:style style:name="Table12.A2" style:family="table-cell">
      <style:table-cell-properties fo:background-color="#eeeeee" fo:padding="0cm" fo:border-left="none" fo:border-right="none" fo:border-top="none" fo:border-bottom="0.75pt solid #999999">
        <style:background-image/>
      </style:table-cell-properties>
    </style:style>
    <style:style style:name="Table12.B2" style:family="table-cell">
      <style:table-cell-properties style:vertical-align="middle" fo:background-color="#ff420e" fo:padding="0cm" fo:border-left="none" fo:border-right="none" fo:border-top="none" fo:border-bottom="0.75pt solid #999999">
        <style:background-image/>
      </style:table-cell-properties>
    </style:style>
    <style:style style:name="Table12.F2" style:family="table-cell">
      <style:table-cell-properties style:vertical-align="middle" fo:background-color="#ffd320" fo:padding="0cm" fo:border-left="none" fo:border-right="none" fo:border-top="none" fo:border-bottom="0.75pt solid #999999">
        <style:background-image/>
      </style:table-cell-properties>
    </style:style>
    <style:style style:name="Table12.C3" style:family="table-cell">
      <style:table-cell-properties fo:background-color="#ff420e" fo:padding="0cm" fo:border-left="none" fo:border-right="none" fo:border-top="none" fo:border-bottom="0.75pt solid #999999">
        <style:background-image/>
      </style:table-cell-properties>
    </style:style>
    <style:style style:name="Table12.E3" style:family="table-cell">
      <style:table-cell-properties fo:background-color="#ffd320" fo:padding="0cm" fo:border-left="none" fo:border-right="none" fo:border-top="none" fo:border-bottom="0.75pt solid #999999">
        <style:background-image/>
      </style:table-cell-properties>
    </style:style>
    <style:style style:name="Table12.H3" style:family="table-cell">
      <style:table-cell-properties fo:background-color="#ffff00" fo:padding="0cm" fo:border-left="none" fo:border-right="none" fo:border-top="none" fo:border-bottom="0.75pt solid #999999">
        <style:background-image/>
      </style:table-cell-properties>
    </style:style>
    <style:style style:name="Table12.C4" style:family="table-cell">
      <style:table-cell-properties fo:background-color="#ff420e" fo:padding="0cm" fo:border-left="none" fo:border-right="none" fo:border-top="none" fo:border-bottom="0.75pt solid #999999">
        <style:background-image/>
      </style:table-cell-properties>
    </style:style>
    <style:style style:name="Table12.E4" style:family="table-cell">
      <style:table-cell-properties fo:background-color="#ffd320" fo:padding="0cm" fo:border-left="none" fo:border-right="none" fo:border-top="none" fo:border-bottom="0.75pt solid #999999">
        <style:background-image/>
      </style:table-cell-properties>
    </style:style>
    <style:style style:name="Table12.H4" style:family="table-cell">
      <style:table-cell-properties fo:background-color="#ff420e" fo:padding="0cm" fo:border-left="none" fo:border-right="none" fo:border-top="none" fo:border-bottom="0.75pt solid #999999">
        <style:background-image/>
      </style:table-cell-properties>
    </style:style>
    <style:style style:name="Table12.C5" style:family="table-cell">
      <style:table-cell-properties fo:background-color="#ff420e" fo:padding="0cm" fo:border-left="none" fo:border-right="none" fo:border-top="none" fo:border-bottom="0.75pt solid #999999">
        <style:background-image/>
      </style:table-cell-properties>
    </style:style>
    <style:style style:name="Table12.E5" style:family="table-cell">
      <style:table-cell-properties fo:background-color="#ffd320" fo:padding="0cm" fo:border-left="none" fo:border-right="none" fo:border-top="none" fo:border-bottom="0.75pt solid #999999">
        <style:background-image/>
      </style:table-cell-properties>
    </style:style>
    <style:style style:name="Table12.H5" style:family="table-cell">
      <style:table-cell-properties fo:background-color="#ff420e" fo:padding="0cm" fo:border-left="none" fo:border-right="none" fo:border-top="none" fo:border-bottom="0.75pt solid #999999">
        <style:background-image/>
      </style:table-cell-properties>
    </style:style>
    <style:style style:name="Table12.F6" style:family="table-cell">
      <style:table-cell-properties style:vertical-align="middle" fo:background-color="#579d1c" fo:padding="0cm" fo:border-left="none" fo:border-right="none" fo:border-top="none" fo:border-bottom="0.75pt solid #999999">
        <style:background-image/>
      </style:table-cell-properties>
    </style:style>
    <style:style style:name="Table12.C7" style:family="table-cell">
      <style:table-cell-properties fo:background-color="#ffd320" fo:padding="0cm" fo:border-left="none" fo:border-right="none" fo:border-top="none" fo:border-bottom="0.75pt solid #999999">
        <style:background-image/>
      </style:table-cell-properties>
    </style:style>
    <style:style style:name="Table12.E7" style:family="table-cell">
      <style:table-cell-properties fo:background-color="#579d1c" fo:padding="0cm" fo:border-left="none" fo:border-right="none" fo:border-top="none" fo:border-bottom="0.75pt solid #999999">
        <style:background-image/>
      </style:table-cell-properties>
    </style:style>
    <style:style style:name="Table12.H7" style:family="table-cell">
      <style:table-cell-properties fo:background-color="#579d1c" fo:padding="0cm" fo:border-left="none" fo:border-right="none" fo:border-top="none" fo:border-bottom="0.75pt solid #999999">
        <style:background-image/>
      </style:table-cell-properties>
    </style:style>
    <style:style style:name="Table12.C8" style:family="table-cell">
      <style:table-cell-properties fo:background-color="#ffd320" fo:padding="0cm" fo:border-left="none" fo:border-right="none" fo:border-top="none" fo:border-bottom="0.75pt solid #999999">
        <style:background-image/>
      </style:table-cell-properties>
    </style:style>
    <style:style style:name="Table12.E8" style:family="table-cell">
      <style:table-cell-properties fo:background-color="#579d1c" fo:padding="0cm" fo:border-left="none" fo:border-right="none" fo:border-top="none" fo:border-bottom="0.75pt solid #999999">
        <style:background-image/>
      </style:table-cell-properties>
    </style:style>
    <style:style style:name="Table12.H8" style:family="table-cell">
      <style:table-cell-properties fo:background-color="#579d1c" fo:padding="0cm" fo:border-left="none" fo:border-right="none" fo:border-top="none" fo:border-bottom="0.75pt solid #999999">
        <style:background-image/>
      </style:table-cell-properties>
    </style:style>
    <style:style style:name="Table12.A10" style:family="table-cell">
      <style:table-cell-properties fo:background-color="#0084d1" fo:padding="0cm" fo:border-left="none" fo:border-right="none" fo:border-top="0.75pt solid #999999" fo:border-bottom="2pt solid #000000">
        <style:background-image/>
      </style:table-cell-properties>
    </style:style>
    <style:style style:name="Table12.G10" style:family="table-cell">
      <style:table-cell-properties fo:background-color="#004586" fo:padding="0cm" fo:border-left="none" fo:border-right="none" fo:border-top="0.75pt solid #999999" fo:border-bottom="2pt solid #000000">
        <style:background-image/>
      </style:table-cell-properties>
    </style:style>
    <style:style style:name="Table13" style:family="table">
      <style:table-properties style:width="17.582cm" fo:margin-left="0.041cm" fo:margin-top="0cm" fo:margin-bottom="0cm" table:align="left" style:writing-mode="page"/>
    </style:style>
    <style:style style:name="Table13.A" style:family="table-column">
      <style:table-column-properties style:column-width="2.79cm"/>
    </style:style>
    <style:style style:name="Table13.B" style:family="table-column">
      <style:table-column-properties style:column-width="2.614cm"/>
    </style:style>
    <style:style style:name="Table13.C" style:family="table-column">
      <style:table-column-properties style:column-width="3.59cm"/>
    </style:style>
    <style:style style:name="Table13.D" style:family="table-column">
      <style:table-column-properties style:column-width="2.702cm"/>
    </style:style>
    <style:style style:name="Table13.E" style:family="table-column">
      <style:table-column-properties style:column-width="2.63cm"/>
    </style:style>
    <style:style style:name="Table13.F" style:family="table-column">
      <style:table-column-properties style:column-width="3.256cm"/>
    </style:style>
    <style:style style:name="Table13.1" style:family="table-row">
      <style:table-row-properties fo:keep-together="auto"/>
    </style:style>
    <style:style style:name="Table13.A1" style:family="table-cell">
      <style:table-cell-properties fo:background-color="#000000" fo:padding="0cm" fo:border="none">
        <style:background-image/>
      </style:table-cell-properties>
    </style:style>
    <style:style style:name="Table13.A2" style:family="table-cell">
      <style:table-cell-properties style:vertical-align="middle" fo:padding="0cm" fo:border-left="0.75pt solid #7e0021" fo:border-right="none" fo:border-top="0.75pt solid #7e0021" fo:border-bottom="0.75pt solid #7e0021"/>
    </style:style>
    <style:style style:name="Table13.B2" style:family="table-cell">
      <style:table-cell-properties style:vertical-align="middle" fo:background-color="#aecf00" fo:padding="0cm" fo:border-left="0.75pt solid #7e0021" fo:border-right="none" fo:border-top="0.75pt solid #7e0021" fo:border-bottom="0.75pt solid #7e0021">
        <style:background-image/>
      </style:table-cell-properties>
    </style:style>
    <style:style style:name="Table13.C2" style:family="table-cell">
      <style:table-cell-properties fo:padding="0cm" fo:border="none"/>
    </style:style>
    <style:style style:name="Table13.D2" style:family="table-cell">
      <style:table-cell-properties fo:padding="0cm" fo:border="none"/>
    </style:style>
    <style:style style:name="Table13.F2" style:family="table-cell">
      <style:table-cell-properties style:vertical-align="middle" fo:background-color="#aecf00" fo:padding="0cm" fo:border="0.75pt solid #7e0021">
        <style:background-image/>
      </style:table-cell-properties>
    </style:style>
    <style:style style:name="Table13.A3" style:family="table-cell">
      <style:table-cell-properties style:vertical-align="middle" fo:background-color="#cccccc" fo:padding="0cm" fo:border-left="0.75pt solid #7e0021" fo:border-right="none" fo:border-top="none" fo:border-bottom="0.75pt solid #7e0021">
        <style:background-image/>
      </style:table-cell-properties>
    </style:style>
    <style:style style:name="Table13.B3" style:family="table-cell">
      <style:table-cell-properties style:vertical-align="middle" fo:background-color="#ffd320" fo:padding="0cm" fo:border-left="0.75pt solid #7e0021" fo:border-right="none" fo:border-top="none" fo:border-bottom="0.75pt solid #7e0021">
        <style:background-image/>
      </style:table-cell-properties>
    </style:style>
    <style:style style:name="Table13.C3" style:family="table-cell">
      <style:table-cell-properties fo:padding="0cm" fo:border="none"/>
    </style:style>
    <style:style style:name="Table13.D3" style:family="table-cell">
      <style:table-cell-properties fo:background-color="#cccccc" fo:padding="0cm" fo:border="none">
        <style:background-image/>
      </style:table-cell-properties>
    </style:style>
    <style:style style:name="Table13.E3" style:family="table-cell">
      <style:table-cell-properties style:vertical-align="middle" fo:background-color="#aecf00" fo:padding="0cm" fo:border-left="0.75pt solid #7e0021" fo:border-right="none" fo:border-top="none" fo:border-bottom="0.75pt solid #7e0021">
        <style:background-image/>
      </style:table-cell-properties>
    </style:style>
    <style:style style:name="Table13.F3" style:family="table-cell">
      <style:table-cell-properties style:vertical-align="middle" fo:background-color="#ffd320" fo:padding="0cm" fo:border-left="0.75pt solid #7e0021" fo:border-right="0.75pt solid #7e0021" fo:border-top="none" fo:border-bottom="0.75pt solid #7e0021">
        <style:background-image/>
      </style:table-cell-properties>
    </style:style>
    <style:style style:name="Table13.4" style:family="table-row">
      <style:table-row-properties style:min-row-height="4.791cm" fo:keep-together="auto"/>
    </style:style>
    <style:style style:name="Table13.A4" style:family="table-cell">
      <style:table-cell-properties style:vertical-align="middle" fo:padding="0cm" fo:border-left="0.75pt solid #7e0021" fo:border-right="none" fo:border-top="none" fo:border-bottom="0.75pt solid #7e0021"/>
    </style:style>
    <style:style style:name="Table13.B4" style:family="table-cell">
      <style:table-cell-properties style:vertical-align="middle" fo:background-color="#ffd320" fo:padding="0cm" fo:border-left="0.75pt solid #7e0021" fo:border-right="none" fo:border-top="0.75pt solid #7e0021" fo:border-bottom="0.75pt solid #7e0021">
        <style:background-image/>
      </style:table-cell-properties>
    </style:style>
    <style:style style:name="Table13.C4" style:family="table-cell">
      <style:table-cell-properties fo:padding="0cm" fo:border-left="0.75pt solid #7e0021" fo:border-right="none" fo:border-top="0.75pt solid #7e0021" fo:border-bottom="0.75pt solid #7e0021"/>
    </style:style>
    <style:style style:name="Table13.D4" style:family="table-cell">
      <style:table-cell-properties fo:padding="0cm" fo:border-left="0.75pt solid #7e0021" fo:border-right="none" fo:border-top="0.75pt solid #7e0021" fo:border-bottom="0.75pt solid #7e0021"/>
    </style:style>
    <style:style style:name="Table13.A5" style:family="table-cell">
      <style:table-cell-properties fo:background-color="#cccccc" fo:padding="0cm" fo:border="none">
        <style:background-image/>
      </style:table-cell-properties>
    </style:style>
    <style:style style:name="Table13.B5" style:family="table-cell">
      <style:table-cell-properties fo:background-color="#cccccc" fo:padding="0cm" fo:border="none">
        <style:background-image/>
      </style:table-cell-properties>
    </style:style>
    <style:style style:name="Table13.C5" style:family="table-cell">
      <style:table-cell-properties fo:background-color="#cccccc" fo:padding="0cm" fo:border="none">
        <style:background-image/>
      </style:table-cell-properties>
    </style:style>
    <style:style style:name="Table13.D5" style:family="table-cell">
      <style:table-cell-properties fo:background-color="#cccccc" fo:padding="0cm" fo:border="none">
        <style:background-image/>
      </style:table-cell-properties>
    </style:style>
    <style:style style:name="Table13.E5" style:family="table-cell">
      <style:table-cell-properties fo:background-color="#cccccc" fo:padding="0cm" fo:border="none">
        <style:background-image/>
      </style:table-cell-properties>
    </style:style>
    <style:style style:name="Table13.F5" style:family="table-cell">
      <style:table-cell-properties fo:background-color="#cccccc" fo:padding="0cm" fo:border="none">
        <style:background-image/>
      </style:table-cell-properties>
    </style:style>
    <style:style style:name="Table13.A6" style:family="table-cell">
      <style:table-cell-properties fo:padding="0cm" fo:border-left="none" fo:border-right="none" fo:border-top="none" fo:border-bottom="0.75pt solid #000000"/>
    </style:style>
    <style:style style:name="Table13.B6" style:family="table-cell">
      <style:table-cell-properties fo:padding="0cm" fo:border-left="none" fo:border-right="none" fo:border-top="none" fo:border-bottom="0.75pt solid #000000"/>
    </style:style>
    <style:style style:name="Table13.C6" style:family="table-cell">
      <style:table-cell-properties fo:padding="0cm" fo:border-left="none" fo:border-right="none" fo:border-top="none" fo:border-bottom="0.75pt solid #000000"/>
    </style:style>
    <style:style style:name="Table13.D6" style:family="table-cell">
      <style:table-cell-properties fo:padding="0cm" fo:border-left="none" fo:border-right="none" fo:border-top="none" fo:border-bottom="0.75pt solid #000000"/>
    </style:style>
    <style:style style:name="Table13.E6" style:family="table-cell">
      <style:table-cell-properties fo:padding="0cm" fo:border-left="none" fo:border-right="none" fo:border-top="none" fo:border-bottom="0.75pt solid #000000"/>
    </style:style>
    <style:style style:name="Table13.F6" style:family="table-cell">
      <style:table-cell-properties fo:padding="0cm" fo:border-left="none" fo:border-right="none" fo:border-top="none" fo:border-bottom="0.75pt solid #000000"/>
    </style:style>
    <style:style style:name="Table14" style:family="table">
      <style:table-properties style:width="16.909cm" fo:margin-left="0.116cm" fo:margin-top="0cm" fo:margin-bottom="0cm" table:align="left" style:writing-mode="page"/>
    </style:style>
    <style:style style:name="Table14.A" style:family="table-column">
      <style:table-column-properties style:column-width="10.269cm"/>
    </style:style>
    <style:style style:name="Table14.B" style:family="table-column">
      <style:table-column-properties style:column-width="6.639cm"/>
    </style:style>
    <style:style style:name="Table14.1" style:family="table-row">
      <style:table-row-properties fo:keep-together="auto"/>
    </style:style>
    <style:style style:name="Table14.A1" style:family="table-cell">
      <style:table-cell-properties fo:background-color="#00599d" fo:padding="0cm" fo:border-left="none" fo:border-right="none" fo:border-top="none" fo:border-bottom="0.75pt solid #00599d">
        <style:background-image/>
      </style:table-cell-properties>
    </style:style>
    <style:style style:name="Table14.A2" style:family="table-cell">
      <style:table-cell-properties fo:background-color="#aadcf7" fo:padding="0cm" fo:border-left="0.75pt solid #00599d" fo:border-right="none" fo:border-top="none" fo:border-bottom="none">
        <style:background-image/>
      </style:table-cell-properties>
    </style:style>
    <style:style style:name="Table14.B2" style:family="table-cell">
      <style:table-cell-properties fo:background-color="#aadcf7" fo:padding="0cm" fo:border-left="none" fo:border-right="0.75pt solid #00599d" fo:border-top="none" fo:border-bottom="none">
        <style:background-image/>
      </style:table-cell-properties>
    </style:style>
    <style:style style:name="Table14.A4" style:family="table-cell">
      <style:table-cell-properties fo:background-color="#ffff00" fo:padding="0cm" fo:border-left="0.75pt solid #00599d" fo:border-right="none" fo:border-top="none" fo:border-bottom="none">
        <style:background-image/>
      </style:table-cell-properties>
    </style:style>
    <style:style style:name="Table14.B4" style:family="table-cell">
      <style:table-cell-properties fo:background-color="#ffff00" fo:padding="0cm" fo:border-left="none" fo:border-right="0.75pt solid #00599d" fo:border-top="none" fo:border-bottom="none">
        <style:background-image/>
      </style:table-cell-properties>
    </style:style>
    <style:style style:name="Table14.A5" style:family="table-cell">
      <style:table-cell-properties fo:background-color="#d32f2f" fo:padding="0cm" fo:border-left="0.75pt solid #00599d" fo:border-right="none" fo:border-top="none" fo:border-bottom="none">
        <style:background-image/>
      </style:table-cell-properties>
    </style:style>
    <style:style style:name="Table14.B5" style:family="table-cell">
      <style:table-cell-properties fo:background-color="#d32f2f" fo:padding="0cm" fo:border-left="none" fo:border-right="0.75pt solid #00599d" fo:border-top="none" fo:border-bottom="none">
        <style:background-image/>
      </style:table-cell-properties>
    </style:style>
    <style:style style:name="Table14.A6" style:family="table-cell">
      <style:table-cell-properties fo:padding="0cm" fo:border-left="0.75pt solid #00599d" fo:border-right="none" fo:border-top="none" fo:border-bottom="none"/>
    </style:style>
    <style:style style:name="Table14.B6" style:family="table-cell">
      <style:table-cell-properties fo:padding="0cm" fo:border-left="none" fo:border-right="0.75pt solid #00599d" fo:border-top="none" fo:border-bottom="none"/>
    </style:style>
    <style:style style:name="Table14.A7" style:family="table-cell">
      <style:table-cell-properties fo:background-color="#dddddd" fo:padding="0cm" fo:border-left="0.75pt solid #00599d" fo:border-right="none" fo:border-top="none" fo:border-bottom="none">
        <style:background-image/>
      </style:table-cell-properties>
    </style:style>
    <style:style style:name="Table14.B7" style:family="table-cell">
      <style:table-cell-properties fo:background-color="#dddddd" fo:padding="0cm" fo:border-left="none" fo:border-right="0.75pt solid #00599d" fo:border-top="none" fo:border-bottom="none">
        <style:background-image/>
      </style:table-cell-properties>
    </style:style>
    <style:style style:name="Table14.A8" style:family="table-cell">
      <style:table-cell-properties fo:padding="0cm" fo:border-left="0.75pt solid #00599d" fo:border-right="none" fo:border-top="none" fo:border-bottom="none"/>
    </style:style>
    <style:style style:name="Table14.B8" style:family="table-cell">
      <style:table-cell-properties fo:padding="0cm" fo:border-left="none" fo:border-right="0.75pt solid #00599d" fo:border-top="none" fo:border-bottom="none"/>
    </style:style>
    <style:style style:name="Table14.A10" style:family="table-cell">
      <style:table-cell-properties fo:padding="0cm" fo:border="none"/>
    </style:style>
    <style:style style:name="P1" style:family="paragraph" style:parent-style-name="Standard">
      <style:paragraph-properties fo:text-align="center" style:justify-single-word="false" fo:orphans="0" fo:widows="0">
        <style:tab-stops/>
      </style:paragraph-properties>
    </style:style>
    <style:style style:name="P2" style:family="paragraph" style:parent-style-name="Standard">
      <style:paragraph-properties fo:line-height="115%" fo:text-align="justify" style:justify-single-word="false"/>
      <style:text-properties fo:language="it" fo:country="IT"/>
    </style:style>
    <style:style style:name="P3" style:family="paragraph" style:parent-style-name="Standard">
      <style:paragraph-properties fo:line-height="115%" fo:text-align="justify" style:justify-single-word="false" fo:break-before="page" style:writing-mode="lr-tb"/>
      <style:text-properties fo:language="it" fo:country="IT"/>
    </style:style>
    <style:style style:name="P4" style:family="paragraph" style:parent-style-name="Standard">
      <style:paragraph-properties fo:line-height="115%"/>
      <style:text-properties fo:language="it" fo:country="IT"/>
    </style:style>
    <style:style style:name="P5" style:family="paragraph" style:parent-style-name="Contents_20_1">
      <style:paragraph-properties>
        <style:tab-stops>
          <style:tab-stop style:position="17.588cm" style:type="right" style:leader-style="dotted" style:leader-text="."/>
        </style:tab-stops>
      </style:paragraph-properties>
    </style:style>
    <style:style style:name="P6" style:family="paragraph" style:parent-style-name="Contents_20_2">
      <style:paragraph-properties>
        <style:tab-stops>
          <style:tab-stop style:position="17.588cm" style:type="right" style:leader-style="dotted" style:leader-text="."/>
        </style:tab-stops>
      </style:paragraph-properties>
    </style:style>
    <style:style style:name="P7" style:family="paragraph" style:parent-style-name="Contents_20_3">
      <style:paragraph-properties>
        <style:tab-stops>
          <style:tab-stop style:position="17.588cm" style:type="right" style:leader-style="dotted" style:leader-text="."/>
        </style:tab-stops>
      </style:paragraph-properties>
    </style:style>
    <style:style style:name="P8" style:family="paragraph" style:parent-style-name="Contents_20_4">
      <style:paragraph-properties>
        <style:tab-stops>
          <style:tab-stop style:position="17.588cm" style:type="right" style:leader-style="dotted" style:leader-text="."/>
        </style:tab-stops>
      </style:paragraph-properties>
    </style:style>
    <style:style style:name="P9" style:family="paragraph" style:parent-style-name="Text_20_body">
      <style:paragraph-properties fo:margin-top="0cm" fo:margin-bottom="0.212cm" style:contextual-spacing="false" fo:text-align="justify" style:justify-single-word="false" fo:break-before="page" style:writing-mode="lr-tb"/>
    </style:style>
    <style:style style:name="P10" style:family="paragraph" style:parent-style-name="Standard">
      <style:paragraph-properties fo:line-height="115%" fo:text-align="justify" style:justify-single-word="false" style:writing-mode="lr-tb"/>
    </style:style>
    <style:style style:name="P11" style:family="paragraph" style:parent-style-name="Standard">
      <loext:graphic-properties draw:fill="solid" draw:fill-color="#e8e8e8"/>
      <style:paragraph-properties fo:line-height="115%" fo:text-align="justify" style:justify-single-word="false" fo:background-color="#e8e8e8" style:writing-mode="lr-tb"/>
    </style:style>
    <style:style style:name="P12" style:family="paragraph" style:parent-style-name="Standard">
      <style:paragraph-properties fo:line-height="115%" fo:text-align="justify" style:justify-single-word="false"/>
    </style:style>
    <style:style style:name="P13" style:family="paragraph" style:parent-style-name="Standard">
      <style:paragraph-properties fo:margin-top="0cm" fo:margin-bottom="0cm" style:contextual-spacing="false" fo:line-height="115%" fo:text-align="justify" style:justify-single-word="false" fo:break-before="page"/>
    </style:style>
    <style:style style:name="P14" style:family="paragraph" style:parent-style-name="Standard">
      <style:paragraph-properties fo:line-height="115%"/>
    </style:style>
    <style:style style:name="P15" style:family="paragraph" style:parent-style-name="Standard">
      <loext:graphic-properties draw:fill="solid" draw:fill-color="#e8e8e8"/>
      <style:paragraph-properties fo:line-height="100%" fo:text-align="justify" style:justify-single-word="false" fo:background-color="#e8e8e8" fo:padding="0.035cm" fo:border="0.74pt dotted #000000" style:shadow="none"/>
    </style:style>
    <style:style style:name="P16" style:family="paragraph" style:parent-style-name="Text_20_body">
      <style:paragraph-properties fo:margin-top="0cm" fo:margin-bottom="0.247cm" style:contextual-spacing="false" fo:break-before="page"/>
    </style:style>
    <style:style style:name="P17" style:family="paragraph" style:parent-style-name="Standard">
      <style:paragraph-properties fo:text-align="center" style:justify-single-word="false" fo:orphans="0" fo:widows="0">
        <style:tab-stops/>
      </style:paragraph-properties>
      <style:text-properties fo:color="#000000" loext:opacity="100%" style:text-outline="false" style:text-line-through-style="none" style:text-line-through-type="none" style:font-name="Liberation Sans" fo:font-size="12pt" fo:language="it" fo:country="IT" fo:font-style="normal" fo:text-shadow="none" style:text-underline-style="none" fo:font-weight="bold" style:font-size-asian="12pt" style:font-style-asian="normal" style:font-weight-asian="bold" style:font-size-complex="12pt" style:font-style-complex="normal" style:font-weight-complex="bold"/>
    </style:style>
    <style:style style:name="P18" style:family="paragraph" style:parent-style-name="Standard">
      <style:paragraph-properties fo:line-height="100%" fo:text-align="center" style:justify-single-word="false" fo:orphans="0" fo:widows="0">
        <style:tab-stops/>
      </style:paragraph-properties>
      <style:text-properties fo:color="#000000" loext:opacity="100%" style:text-outline="false" style:text-line-through-style="none" style:text-line-through-type="none" style:font-name="Liberation Sans" fo:font-size="12pt" fo:language="it" fo:country="IT" fo:font-style="normal" fo:text-shadow="none" style:text-underline-style="none" fo:font-weight="bold" style:font-size-asian="12pt" style:font-style-asian="normal" style:font-weight-asian="bold" style:font-size-complex="12pt" style:font-style-complex="normal" style:font-weight-complex="bold"/>
    </style:style>
    <style:style style:name="P19" style:family="paragraph" style:parent-style-name="Standard">
      <style:paragraph-properties fo:text-align="center" style:justify-single-word="false" fo:orphans="0" fo:widows="0">
        <style:tab-stops/>
      </style:paragraph-properties>
      <style:text-properties fo:color="#000000" loext:opacity="100%" style:text-outline="false" style:text-line-through-style="none" style:text-line-through-type="none" style:font-name="Liberation Sans" fo:font-size="9pt" fo:language="it" fo:country="IT" fo:font-style="normal" fo:text-shadow="none" style:text-underline-style="none" fo:font-weight="bold" style:font-size-asian="9pt" style:font-style-asian="normal" style:font-weight-asian="bold" style:font-size-complex="9pt" style:font-style-complex="normal" style:font-weight-complex="bold"/>
    </style:style>
    <style:style style:name="P20" style:family="paragraph" style:parent-style-name="Contenuto_20_tabella">
      <style:paragraph-properties fo:text-align="center" style:justify-single-word="false" fo:orphans="0" fo:widows="0"/>
      <style:text-properties fo:color="#000000" loext:opacity="100%" style:text-outline="false" style:text-line-through-style="none" style:text-line-through-type="none" style:font-name="Bahnschrift Light"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loext:graphic-properties draw:fill="solid" draw:fill-color="#e8e8e8"/>
      <style:paragraph-properties fo:line-height="100%" fo:text-align="justify" style:justify-single-word="false" fo:background-color="#e8e8e8" fo:padding="0.035cm" fo:border="0.74pt dotted #000000" style:shadow="none"/>
      <style:text-properties style:font-name="Source Code Pro" fo:font-size="11pt" fo:font-style="normal" style:font-size-asian="11pt" style:font-style-asian="normal" style:font-size-complex="11pt" style:font-style-complex="normal"/>
    </style:style>
    <style:style style:name="P22" style:family="paragraph" style:parent-style-name="Standard">
      <style:paragraph-properties fo:line-height="115%"/>
      <style:text-properties fo:font-variant="normal" fo:text-transform="none" fo:language="it" fo:country="IT"/>
    </style:style>
    <style:style style:name="P23" style:family="paragraph" style:parent-style-name="Standard">
      <style:paragraph-properties fo:margin-top="0cm" fo:margin-bottom="0.3cm" style:contextual-spacing="false" fo:line-height="115%" fo:text-align="justify" style:justify-single-word="false"/>
      <style:text-properties fo:font-size="12pt" fo:language="it" fo:country="IT" fo:font-weight="normal" style:font-size-asian="12pt" style:font-weight-asian="normal" style:font-size-complex="12pt" style:font-weight-complex="normal"/>
    </style:style>
    <style:style style:name="P24" style:family="paragraph" style:parent-style-name="Figura">
      <style:paragraph-properties fo:text-align="center" style:justify-single-word="false"/>
      <style:text-properties style:font-name="Liberation Sans1" fo:font-style="normal" fo:font-weight="bold" style:font-style-asian="normal" style:font-weight-asian="bold" style:font-style-complex="normal" style:font-weight-complex="bold"/>
    </style:style>
    <style:style style:name="P25" style:family="paragraph" style:parent-style-name="Caption">
      <style:paragraph-properties fo:margin-top="0.212cm" fo:margin-bottom="0.212cm" style:contextual-spacing="false" fo:text-align="center"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P26" style:family="paragraph" style:parent-style-name="Caption">
      <style:paragraph-properties fo:margin-top="0.212cm" fo:margin-bottom="0.212cm" style:contextual-spacing="false" fo:text-align="center" style:justify-single-word="false"/>
    </style:style>
    <style:style style:name="P27" style:family="paragraph" style:parent-style-name="Index_20_Heading">
      <style:text-properties style:font-name="Arial" fo:language="it" fo:country="IT"/>
    </style:style>
    <style:style style:name="P28" style:family="paragraph" style:parent-style-name="Figura">
      <style:paragraph-properties fo:margin-top="0.212cm" fo:margin-bottom="0.212cm" style:contextual-spacing="false" fo:text-align="center" style:justify-single-word="false"/>
    </style:style>
    <style:style style:name="P29" style:family="paragraph" style:parent-style-name="Figura">
      <style:paragraph-properties fo:margin-top="0.212cm" fo:margin-bottom="0.212cm" style:contextual-spacing="false" fo:text-align="center" style:justify-single-word="false" fo:orphans="2" fo:widows="2" fo:hyphenation-ladder-count="no-limit" text:number-lines="false" text:line-number="0" style:writing-mode="lr-tb"/>
      <style:text-properties fo:hyphenate="false" fo:hyphenation-remain-char-count="2" fo:hyphenation-push-char-count="2" loext:hyphenation-no-caps="false" loext:hyphenation-no-last-word="false" loext:hyphenation-word-char-count="5" loext:hyphenation-zone="no-limit"/>
    </style:style>
    <style:style style:name="P30" style:family="paragraph" style:parent-style-name="Figura">
      <style:paragraph-properties fo:margin-top="0.212cm" fo:margin-bottom="0.212cm" style:contextual-spacing="false" fo:text-align="center" style:justify-single-word="false"/>
      <style:text-properties fo:color="#000000" loext:opacity="100%"/>
    </style:style>
    <style:style style:name="P31" style:family="paragraph" style:parent-style-name="Figura">
      <style:paragraph-properties fo:margin-top="0.212cm" fo:margin-bottom="0.212cm" style:contextual-spacing="false" fo:text-align="center" style:justify-single-word="false" fo:orphans="2" fo:widows="2" fo:hyphenation-ladder-count="no-limit" text:number-lines="false" text:line-number="0" style:writing-mode="lr-tb"/>
      <style:text-properties fo:color="#000000" loext:opacity="100%" fo:hyphenate="false" fo:hyphenation-remain-char-count="2" fo:hyphenation-push-char-count="2" loext:hyphenation-no-caps="false" loext:hyphenation-no-last-word="false" loext:hyphenation-word-char-count="5" loext:hyphenation-zone="no-limit"/>
    </style:style>
    <style:style style:name="P32" style:family="paragraph" style:parent-style-name="Figura">
      <style:paragraph-properties fo:margin-top="0.212cm" fo:margin-bottom="0.212cm" style:contextual-spacing="false"/>
      <style:text-properties fo:color="#000000" loext:opacity="100%"/>
    </style:style>
    <style:style style:name="P33" style:family="paragraph" style:parent-style-name="Figura">
      <style:paragraph-properties fo:margin-top="0.212cm" fo:margin-bottom="0.212cm" style:contextual-spacing="false"/>
    </style:style>
    <style:style style:name="P34" style:family="paragraph" style:parent-style-name="Linea_20_orizzontale">
      <style:text-properties style:use-window-font-color="true" loext:opacity="0%" style:font-name="Arial" fo:font-size="12pt" fo:language="it" fo:country="IT" fo:font-style="normal"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P35" style:family="paragraph" style:parent-style-name="Tabella">
      <style:paragraph-properties fo:text-align="start" style:justify-single-word="false" fo:keep-with-next="always"/>
    </style:style>
    <style:style style:name="P36" style:family="paragraph" style:parent-style-name="Tabella">
      <style:paragraph-properties fo:keep-with-next="always"/>
    </style:style>
    <style:style style:name="P37" style:family="paragraph" style:parent-style-name="Titolo_20_tabella">
      <style:paragraph-properties fo:text-align="center" style:justify-single-word="false" fo:orphans="0" fo:widows="0"/>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text-align="center" style:justify-single-word="false"/>
    </style:style>
    <style:style style:name="P40" style:family="paragraph" style:parent-style-name="Contents_20_1" style:list-style-name="WWNum3">
      <style:paragraph-properties fo:margin-left="0cm" fo:text-indent="0cm" style:auto-text-indent="false"/>
      <style:text-properties fo:language="it" fo:country="IT"/>
    </style:style>
    <style:style style:name="P41" style:family="paragraph" style:parent-style-name="Contents_20_1" style:list-style-name="WWNum3">
      <style:paragraph-properties fo:margin-left="0cm" fo:text-indent="0cm" style:auto-text-indent="false"/>
      <style:text-properties style:font-name="Arial" fo:language="it" fo:country="IT" style:language-asian="en" style:country-asian="US"/>
    </style:style>
    <style:style style:name="P42" style:family="paragraph" style:parent-style-name="Contenuto_20_tabella">
      <style:paragraph-properties fo:text-align="center" style:justify-single-word="false" fo:orphans="0" fo:widows="0"/>
    </style:style>
    <style:style style:name="P43" style:family="paragraph" style:parent-style-name="Contenuto_20_tabella">
      <style:paragraph-properties fo:text-align="start" style:justify-single-word="false" fo:orphans="0" fo:widows="0"/>
    </style:style>
    <style:style style:name="P44" style:family="paragraph" style:parent-style-name="Contenuto_20_tabella" style:list-style-name="WWNum22">
      <style:paragraph-properties fo:text-align="start" style:justify-single-word="false" fo:orphans="0" fo:widows="0"/>
    </style:style>
    <style:style style:name="P45" style:family="paragraph" style:parent-style-name="Contenuto_20_tabella" style:list-style-name="WWNum23">
      <style:paragraph-properties fo:text-align="start" style:justify-single-word="false" fo:orphans="0" fo:widows="0"/>
    </style:style>
    <style:style style:name="P46" style:family="paragraph" style:parent-style-name="Contenuto_20_tabella">
      <style:paragraph-properties fo:text-align="start" style:justify-single-word="false" fo:orphans="0" fo:widows="0"/>
      <style:text-properties fo:color="#000000" loext:opacity="100%" style:text-outline="false" style:text-line-through-style="none" style:text-line-through-type="none" style:font-name="Liberation Sans" fo:font-size="12pt" fo:language="it" fo:country="IT" fo:font-style="normal" fo:text-shadow="none" style:text-underline-style="none" fo:font-weight="bold" style:font-size-asian="12pt" style:font-style-asian="normal" style:font-weight-asian="bold" style:font-size-complex="12pt" style:font-style-complex="normal" style:font-weight-complex="bold"/>
    </style:style>
    <style:style style:name="P47" style:family="paragraph" style:parent-style-name="Contenuto_20_tabella">
      <style:paragraph-properties fo:text-align="start" style:justify-single-word="false" fo:orphans="0" fo:widows="0"/>
      <style:text-properties fo:color="#000000" loext:opacity="100%" style:text-outline="false" style:text-line-through-style="none" style:text-line-through-type="none" style:font-name="Liberation Sans"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Contenuto_20_tabella">
      <style:paragraph-properties fo:text-align="center" style:justify-single-word="false" fo:orphans="0" fo:widows="0"/>
      <style:text-properties fo:color="#000000" loext:opacity="100%" style:text-outline="false" style:text-line-through-style="none" style:text-line-through-type="none" style:font-name="Liberation Sans"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Contenuto_20_tabella">
      <style:paragraph-properties fo:text-align="center" style:justify-single-word="false" fo:orphans="0" fo:widows="0"/>
      <style:text-properties fo:color="#000000" loext:opacity="100%" style:text-outline="false" style:text-line-through-style="none" style:text-line-through-type="none" style:font-name="Bahnschrift Light"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Contenuto_20_tabella">
      <style:paragraph-properties fo:margin-left="0.071cm" fo:text-align="start" style:justify-single-word="false" fo:orphans="0" fo:widows="0" fo:text-indent="0cm" style:auto-text-indent="false"/>
      <style:text-properties fo:color="#000000" loext:opacity="100%" style:text-outline="false" style:text-line-through-style="none" style:text-line-through-type="none" style:font-name="Bahnschrift Light" fo:font-size="10.5pt" fo:language="it" fo:country="IT" fo:font-style="normal" fo:text-shadow="none" style:text-underline-style="none" fo:font-weight="normal" style:font-size-asian="10.5pt" style:font-style-asian="normal" style:font-weight-asian="normal" style:font-size-complex="10.5pt" style:font-style-complex="normal" style:font-weight-complex="normal"/>
    </style:style>
    <style:style style:name="P51" style:family="paragraph" style:parent-style-name="Contenuto_20_tabella">
      <style:paragraph-properties fo:text-align="start" style:justify-single-word="false" fo:orphans="0" fo:widows="0"/>
      <style:text-properties fo:color="#000000" loext:opacity="100%" style:text-outline="false" style:text-line-through-style="none" style:text-line-through-type="none" style:font-name="Bahnschrift Light" fo:font-size="10.5pt" fo:language="it" fo:country="IT" fo:font-style="normal" fo:text-shadow="none" style:text-underline-style="none" fo:font-weight="normal" style:font-size-asian="10.5pt" style:font-style-asian="normal" style:font-weight-asian="normal" style:font-size-complex="10.5pt" style:font-style-complex="normal" style:font-weight-complex="normal"/>
    </style:style>
    <style:style style:name="P52" style:family="paragraph" style:parent-style-name="Contenuto_20_tabella">
      <style:paragraph-properties fo:text-align="start" style:justify-single-word="false" fo:orphans="0" fo:widows="0"/>
      <style:text-properties fo:color="#000000" loext:opacity="100%" style:text-outline="false" style:text-line-through-style="none" style:text-line-through-type="none" style:font-name="Liberation Serif"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Contenuto_20_tabella">
      <style:paragraph-properties fo:text-align="end" style:justify-single-word="false" fo:orphans="0" fo:widows="0"/>
    </style:style>
    <style:style style:name="P54" style:family="paragraph" style:parent-style-name="Footer">
      <style:paragraph-properties fo:text-align="center" style:justify-single-word="false"/>
    </style:style>
    <style:style style:name="P55" style:family="paragraph" style:parent-style-name="Footer">
      <style:paragraph-properties fo:text-align="center" style:justify-single-word="false"/>
      <style:text-properties fo:language="it" fo:country="IT"/>
    </style:style>
    <style:style style:name="P56" style:family="paragraph" style:parent-style-name="Heading_20_1" style:list-style-name="WWNum82">
      <style:paragraph-properties fo:margin-left="0cm" fo:margin-top="0cm" fo:margin-bottom="0cm" style:contextual-spacing="false" fo:text-indent="0cm" style:auto-text-indent="false" fo:break-before="page"/>
      <style:text-properties fo:language="it" fo:country="IT"/>
    </style:style>
    <style:style style:name="P57" style:family="paragraph" style:parent-style-name="Heading_20_1" style:list-style-name="WWNum83">
      <style:paragraph-properties fo:margin-left="0cm" fo:margin-top="0cm" fo:margin-bottom="0cm" style:contextual-spacing="false" fo:text-indent="0cm" style:auto-text-indent="false"/>
    </style:style>
    <style:style style:name="P58" style:family="paragraph" style:parent-style-name="Heading_20_1" style:list-style-name="WWNum86">
      <style:paragraph-properties fo:margin-left="0cm" fo:text-indent="0cm" style:auto-text-indent="false"/>
    </style:style>
    <style:style style:name="P59" style:family="paragraph" style:parent-style-name="Heading_20_1" style:list-style-name="WWNum104">
      <style:paragraph-properties fo:margin-left="0cm" fo:margin-top="0cm" fo:margin-bottom="0cm" style:contextual-spacing="false" fo:text-indent="0cm" style:auto-text-indent="false" fo:break-before="page"/>
    </style:style>
    <style:style style:name="P60" style:family="paragraph" style:parent-style-name="Heading_20_2" style:list-style-name="WWNum87"/>
    <style:style style:name="P61" style:family="paragraph" style:parent-style-name="Heading_20_2" style:list-style-name="WWNum88">
      <style:text-properties style:use-window-font-color="true" loext:opacity="0%" fo:font-size="12pt" fo:language="it" fo:country="IT" fo:font-style="normal"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P62" style:family="paragraph" style:parent-style-name="Heading_20_2" style:list-style-name="WWNum2">
      <style:text-properties style:use-window-font-color="true" loext:opacity="0%" fo:font-size="12pt" fo:language="it" fo:country="IT" fo:font-style="normal"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P63" style:family="paragraph" style:parent-style-name="Heading_20_2" style:list-style-name="WWNum2">
      <style:paragraph-properties fo:text-align="justify" style:justify-single-word="false" style:writing-mode="lr-tb"/>
      <style:text-properties style:use-window-font-color="true" loext:opacity="0%" style:font-name="Arial" fo:font-size="12pt" fo:language="it" fo:country="IT" fo:font-style="normal"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P64" style:family="paragraph" style:parent-style-name="Heading_20_2" style:list-style-name="WWNum2"/>
    <style:style style:name="P65" style:family="paragraph" style:parent-style-name="Heading_20_2" style:list-style-name="WWNum2">
      <style:paragraph-properties fo:margin-top="0cm" fo:margin-bottom="0.212cm" style:contextual-spacing="false" fo:break-before="page"/>
    </style:style>
    <style:style style:name="P66" style:family="paragraph" style:parent-style-name="Heading_20_2" style:list-style-name="WWNum2">
      <style:paragraph-properties fo:margin-top="0.049cm" fo:margin-bottom="0.21cm" style:contextual-spacing="false"/>
    </style:style>
    <style:style style:name="P67" style:family="paragraph" style:parent-style-name="Heading_20_3" style:list-style-name="WWNum84">
      <style:paragraph-properties fo:text-align="justify" style:justify-single-word="false"/>
    </style:style>
    <style:style style:name="P68" style:family="paragraph" style:parent-style-name="Heading_20_3" style:list-style-name="WWNum85">
      <style:paragraph-properties fo:text-align="justify" style:justify-single-word="false" style:writing-mode="lr-tb"/>
    </style:style>
    <style:style style:name="P69" style:family="paragraph" style:parent-style-name="Heading_20_3" style:list-style-name="WWNum89">
      <style:paragraph-properties fo:text-align="justify" style:justify-single-word="false" style:writing-mode="lr-tb"/>
    </style:style>
    <style:style style:name="P70" style:family="paragraph" style:parent-style-name="Heading_20_3" style:list-style-name="WWNum90">
      <style:paragraph-properties fo:text-align="justify" style:justify-single-word="false" style:writing-mode="lr-tb"/>
    </style:style>
    <style:style style:name="P71" style:family="paragraph" style:parent-style-name="Heading_20_3" style:list-style-name="WWNum91">
      <style:paragraph-properties fo:text-align="justify" style:justify-single-word="false" style:writing-mode="lr-tb"/>
    </style:style>
    <style:style style:name="P72" style:family="paragraph" style:parent-style-name="Heading_20_3" style:list-style-name="WWNum92">
      <style:paragraph-properties fo:text-align="justify" style:justify-single-word="false" style:writing-mode="lr-tb"/>
    </style:style>
    <style:style style:name="P73" style:family="paragraph" style:parent-style-name="Heading_20_3" style:list-style-name="WWNum93">
      <style:paragraph-properties fo:text-align="justify" style:justify-single-word="false" style:writing-mode="lr-tb"/>
    </style:style>
    <style:style style:name="P74" style:family="paragraph" style:parent-style-name="Heading_20_3" style:list-style-name="WWNum94">
      <style:paragraph-properties fo:text-align="justify" style:justify-single-word="false" fo:padding="0.035cm" fo:border="0.51pt solid #000000" style:shadow="none" style:writing-mode="lr-tb"/>
    </style:style>
    <style:style style:name="P75" style:family="paragraph" style:parent-style-name="Heading_20_3" style:list-style-name="WWNum95">
      <style:paragraph-properties fo:text-align="justify" style:justify-single-word="false" style:writing-mode="lr-tb"/>
    </style:style>
    <style:style style:name="P76" style:family="paragraph" style:parent-style-name="Heading_20_3" style:list-style-name="WWNum96">
      <style:paragraph-properties fo:margin-top="0cm" fo:margin-bottom="0.212cm" style:contextual-spacing="false" fo:text-align="justify" style:justify-single-word="false" style:writing-mode="lr-tb"/>
    </style:style>
    <style:style style:name="P77" style:family="paragraph" style:parent-style-name="Heading_20_3" style:list-style-name="WWNum97">
      <style:paragraph-properties fo:margin-top="0cm" fo:margin-bottom="0.212cm" style:contextual-spacing="false" fo:text-align="justify" style:justify-single-word="false" fo:break-before="page" style:writing-mode="lr-tb"/>
    </style:style>
    <style:style style:name="P78" style:family="paragraph" style:parent-style-name="Heading_20_3" style:list-style-name="WWNum98">
      <style:paragraph-properties fo:text-align="justify" style:justify-single-word="false" fo:padding="0.035cm" fo:border="0.51pt solid #000000" style:shadow="none" style:writing-mode="lr-tb"/>
    </style:style>
    <style:style style:name="P79" style:family="paragraph" style:parent-style-name="Heading_20_3" style:list-style-name="WWNum99">
      <style:paragraph-properties fo:text-align="justify" style:justify-single-word="false" style:writing-mode="lr-tb"/>
    </style:style>
    <style:style style:name="P80" style:family="paragraph" style:parent-style-name="Heading_20_3" style:list-style-name="WWNum100">
      <style:paragraph-properties fo:text-align="justify" style:justify-single-word="false" style:writing-mode="lr-tb"/>
    </style:style>
    <style:style style:name="P81" style:family="paragraph" style:parent-style-name="Heading_20_3" style:list-style-name="">
      <style:paragraph-properties fo:margin-left="0cm" fo:margin-top="0cm" fo:margin-bottom="0.212cm" style:contextual-spacing="false" fo:text-align="justify" style:justify-single-word="false" fo:orphans="2" fo:widows="2" fo:hyphenation-ladder-count="no-limit" fo:text-indent="0cm" style:auto-text-indent="false" style:writing-mode="lr-tb"/>
      <style:text-properties fo:language="it" fo:country="IT" fo:hyphenate="false" fo:hyphenation-remain-char-count="2" fo:hyphenation-push-char-count="2" loext:hyphenation-no-caps="false" loext:hyphenation-no-last-word="false" loext:hyphenation-word-char-count="5" loext:hyphenation-zone="no-limit"/>
    </style:style>
    <style:style style:name="P82" style:family="paragraph" style:parent-style-name="Heading_20_3" style:list-style-name="WWNum2"/>
    <style:style style:name="P83" style:family="paragraph" style:parent-style-name="Heading_20_3" style:list-style-name="WWNum2">
      <style:paragraph-properties fo:margin-top="0cm" fo:margin-bottom="0.212cm" style:contextual-spacing="false" fo:break-before="page"/>
    </style:style>
    <style:style style:name="P84" style:family="paragraph" style:parent-style-name="Heading_20_3" style:list-style-name="WWNum2">
      <style:paragraph-properties fo:margin-left="0cm" fo:text-indent="0cm" style:auto-text-indent="false"/>
    </style:style>
    <style:style style:name="P85" style:family="paragraph" style:parent-style-name="Heading_20_3" style:list-style-name="WWNum2">
      <style:paragraph-properties fo:margin-left="0cm" fo:margin-top="0cm" fo:margin-bottom="0.212cm" style:contextual-spacing="false" fo:text-indent="0cm" style:auto-text-indent="false" fo:break-before="page"/>
    </style:style>
    <style:style style:name="P86" style:family="paragraph" style:parent-style-name="Heading_20_3" style:list-style-name="WWNum101">
      <style:paragraph-properties fo:line-height="115%" fo:text-align="justify" style:justify-single-word="false" style:writing-mode="lr-tb"/>
    </style:style>
    <style:style style:name="P87" style:family="paragraph" style:parent-style-name="Heading_20_3" style:list-style-name="WWNum102">
      <style:paragraph-properties fo:line-height="115%" fo:text-align="justify" style:justify-single-word="false" style:writing-mode="lr-tb"/>
    </style:style>
    <style:style style:name="P88" style:family="paragraph" style:parent-style-name="Heading_20_3" style:list-style-name="WWNum103">
      <style:paragraph-properties fo:line-height="115%" fo:text-align="justify" style:justify-single-word="false" style:writing-mode="lr-tb"/>
    </style:style>
    <style:style style:name="P89" style:family="paragraph" style:parent-style-name="Heading_20_4" style:list-style-name="WWNum1"/>
    <style:style style:name="P90" style:family="paragraph" style:parent-style-name="Heading_20_4" style:list-style-name="WWNum1">
      <style:paragraph-properties fo:margin-left="0cm" fo:text-indent="0cm" style:auto-text-indent="false"/>
    </style:style>
    <style:style style:name="P91" style:family="paragraph" style:parent-style-name="Heading_20_4" style:list-style-name="WWNum1">
      <style:text-properties style:font-name="Arial" fo:font-size="22pt" fo:language="it" fo:country="IT" style:font-size-asian="22pt"/>
    </style:style>
    <style:style style:name="P92" style:family="paragraph" style:parent-style-name="Heading_20_4" style:list-style-name="WWNum24"/>
    <style:style style:name="P93" style:family="paragraph" style:parent-style-name="Heading_20_4" style:list-style-name="WWNum55"/>
    <style:style style:name="P94" style:family="paragraph" style:parent-style-name="Heading_20_4" style:list-style-name="WWNum55">
      <style:text-properties style:use-window-font-color="true" loext:opacity="0%" style:font-name="Liberation Serif" fo:font-size="12pt" fo:language="it" fo:country="IT" style:letter-kerning="true" style:font-name-asian="NSimSun" style:font-size-asian="12pt" style:language-asian="zh" style:country-asian="CN" style:font-name-complex="Lucida Sans1" style:font-size-complex="12pt" style:language-complex="hi" style:country-complex="IN"/>
    </style:style>
    <style:style style:name="P95" style:family="paragraph" style:parent-style-name="Heading_20_6" style:list-style-name="WWNum4"/>
    <style:style style:name="P96" style:family="paragraph" style:parent-style-name="Heading_20_8" style:list-style-name="WWNum4"/>
    <style:style style:name="P97" style:family="paragraph" style:parent-style-name="Heading_20_8" style:list-style-name="WWNum4">
      <style:text-properties style:font-name="Arial" fo:language="it" fo:country="IT"/>
    </style:style>
    <style:style style:name="P98" style:family="paragraph" style:parent-style-name="Standard">
      <style:paragraph-properties fo:text-align="center" style:justify-single-word="false"/>
    </style:style>
    <style:style style:name="P99" style:family="paragraph" style:parent-style-name="Standard">
      <style:paragraph-properties fo:margin-top="0cm" fo:margin-bottom="0cm" style:contextual-spacing="false" fo:text-align="center" style:justify-single-word="false" fo:break-before="page"/>
    </style:style>
    <style:style style:name="P100" style:family="paragraph" style:parent-style-name="Standard">
      <style:paragraph-properties fo:margin-top="0cm" fo:margin-bottom="0cm" style:contextual-spacing="false" fo:text-align="center" style:justify-single-word="false"/>
    </style:style>
    <style:style style:name="P101" style:family="paragraph" style:parent-style-name="Standard">
      <style:paragraph-properties fo:text-align="center" style:justify-single-word="false" fo:orphans="0" fo:widows="0">
        <style:tab-stops/>
      </style:paragraph-properties>
    </style:style>
    <style:style style:name="P102" style:family="paragraph" style:parent-style-name="Standard">
      <style:paragraph-properties fo:text-align="center" style:justify-single-word="false" style:writing-mode="lr-tb"/>
    </style:style>
    <style:style style:name="P103" style:family="paragraph" style:parent-style-name="Standard">
      <style:text-properties style:font-name="Arial" fo:language="it" fo:country="IT"/>
    </style:style>
    <style:style style:name="P104" style:family="paragraph" style:parent-style-name="Standard">
      <style:paragraph-properties fo:text-align="end" style:justify-single-word="false"/>
      <style:text-properties style:font-name="Arial" fo:language="it" fo:country="IT"/>
    </style:style>
    <style:style style:name="P105" style:family="paragraph" style:parent-style-name="Standard">
      <style:text-properties style:font-name="Arial" fo:language="it" fo:country="IT" style:language-asian="en" style:country-asian="US"/>
    </style:style>
    <style:style style:name="P106" style:family="paragraph" style:parent-style-name="Standard">
      <style:paragraph-properties fo:text-align="justify" style:justify-single-word="false" style:writing-mode="lr-tb"/>
      <style:text-properties style:font-name="Arial" fo:language="it" fo:country="IT" style:language-asian="en" style:country-asian="US"/>
    </style:style>
    <style:style style:name="P107" style:family="paragraph" style:parent-style-name="Standard">
      <style:paragraph-properties fo:text-align="justify" style:justify-single-word="false" style:writing-mode="lr-tb"/>
      <style:text-properties style:font-name="Arial" fo:language="it" fo:country="IT"/>
    </style:style>
    <style:style style:name="P108" style:family="paragraph" style:parent-style-name="Standard">
      <style:paragraph-properties fo:margin-top="0cm" fo:margin-bottom="0cm" style:contextual-spacing="false" fo:text-align="start" style:justify-single-word="false" fo:break-before="page" style:writing-mode="lr-tb"/>
      <style:text-properties style:font-name="Arial" fo:language="it" fo:country="IT"/>
    </style:style>
    <style:style style:name="P109" style:family="paragraph" style:parent-style-name="Standard">
      <style:paragraph-properties fo:text-align="start" style:justify-single-word="false" style:writing-mode="lr-tb"/>
      <style:text-properties style:font-name="Arial" fo:language="it" fo:country="IT"/>
    </style:style>
    <style:style style:name="P110" style:family="paragraph" style:parent-style-name="Standard">
      <style:text-properties style:font-name="Arial" fo:font-size="11pt" fo:language="it" fo:country="IT" fo:font-weight="bold" style:font-size-asian="11pt" style:language-asian="en" style:country-asian="US" style:font-weight-asian="bold" style:font-name-complex="Arial1" style:font-weight-complex="bold"/>
    </style:style>
    <style:style style:name="P111" style:family="paragraph" style:parent-style-name="Standard">
      <style:paragraph-properties fo:orphans="0" fo:widows="0"/>
    </style:style>
    <style:style style:name="P112" style:family="paragraph" style:parent-style-name="Standard">
      <style:paragraph-properties fo:orphans="0" fo:widows="0" style:snap-to-layout-grid="false"/>
    </style:style>
    <style:style style:name="P113" style:family="paragraph" style:parent-style-name="Standard">
      <style:paragraph-properties fo:text-align="end" style:justify-single-word="false"/>
    </style:style>
    <style:style style:name="P114" style:family="paragraph" style:parent-style-name="Standard">
      <style:paragraph-properties fo:margin-top="0cm" fo:margin-bottom="0cm" style:contextual-spacing="false" fo:line-height="100%" fo:text-align="end" style:justify-single-word="false"/>
      <style:text-properties fo:language="it" fo:country="IT" fo:font-weight="bold" style:font-weight-asian="bold" style:font-weight-complex="bold"/>
    </style:style>
    <style:style style:name="P115" style:family="paragraph" style:parent-style-name="Standard">
      <style:paragraph-properties fo:text-align="justify" style:justify-single-word="false"/>
      <style:text-properties fo:language="it" fo:country="IT"/>
    </style:style>
    <style:style style:name="P116" style:family="paragraph" style:parent-style-name="Standard">
      <style:paragraph-properties fo:margin-top="0cm" fo:margin-bottom="0cm" style:contextual-spacing="false" fo:text-align="justify" style:justify-single-word="false"/>
      <style:text-properties fo:language="it" fo:country="IT"/>
    </style:style>
    <style:style style:name="P117" style:family="paragraph" style:parent-style-name="Standard">
      <style:paragraph-properties fo:line-height="115%" fo:text-align="justify" style:justify-single-word="false" style:writing-mode="lr-tb"/>
      <style:text-properties fo:language="it" fo:country="IT"/>
    </style:style>
    <style:style style:name="P118" style:family="paragraph" style:parent-style-name="Standard">
      <style:paragraph-properties fo:margin-top="0cm" fo:margin-bottom="0cm" style:contextual-spacing="false" fo:line-height="115%" fo:text-align="justify" style:justify-single-word="false" fo:break-before="page" style:writing-mode="lr-tb"/>
      <style:text-properties fo:language="it" fo:country="IT"/>
    </style:style>
    <style:style style:name="P119" style:family="paragraph" style:parent-style-name="Standard">
      <style:paragraph-properties fo:margin-top="0cm" fo:margin-bottom="0cm" style:contextual-spacing="false" fo:line-height="115%" fo:text-align="justify" style:justify-single-word="false" fo:break-before="page"/>
      <style:text-properties fo:language="it" fo:country="IT"/>
    </style:style>
    <style:style style:name="P120" style:family="paragraph" style:parent-style-name="Standard">
      <style:paragraph-properties fo:margin-top="0cm" fo:margin-bottom="0cm" style:contextual-spacing="false" fo:line-height="115%" fo:text-align="justify" style:justify-single-word="false"/>
      <style:text-properties fo:language="it" fo:country="IT"/>
    </style:style>
    <style:style style:name="P121" style:family="paragraph" style:parent-style-name="Standard">
      <style:paragraph-properties fo:line-height="115%" fo:text-align="justify" style:justify-single-word="false"/>
      <style:text-properties fo:language="it" fo:country="IT"/>
    </style:style>
    <style:style style:name="P122" style:family="paragraph" style:parent-style-name="Standard">
      <style:paragraph-properties fo:margin-left="1.27cm" fo:line-height="115%" fo:text-align="justify" style:justify-single-word="false" fo:text-indent="0cm" style:auto-text-indent="false"/>
      <style:text-properties fo:language="it" fo:country="IT"/>
    </style:style>
    <style:style style:name="P123" style:family="paragraph" style:parent-style-name="Standard" style:list-style-name="WWNum57">
      <style:paragraph-properties fo:line-height="115%" fo:text-align="justify" style:justify-single-word="false"/>
      <style:text-properties fo:language="it" fo:country="IT"/>
    </style:style>
    <style:style style:name="P124" style:family="paragraph" style:parent-style-name="Standard">
      <style:paragraph-properties fo:margin-left="0.101cm" fo:line-height="115%" fo:text-align="justify" style:justify-single-word="false"/>
      <style:text-properties fo:language="it" fo:country="IT"/>
    </style:style>
    <style:style style:name="P125" style:family="paragraph" style:parent-style-name="Standard">
      <style:paragraph-properties fo:line-height="115%"/>
      <style:text-properties fo:language="it" fo:country="IT"/>
    </style:style>
    <style:style style:name="P126" style:family="paragraph" style:parent-style-name="Standard">
      <style:paragraph-properties fo:margin-top="0cm" fo:margin-bottom="0.247cm" style:contextual-spacing="false" fo:line-height="115%"/>
      <style:text-properties fo:language="it" fo:country="IT"/>
    </style:style>
    <style:style style:name="P127" style:family="paragraph" style:parent-style-name="Standard">
      <style:paragraph-properties fo:margin-top="0cm" fo:margin-bottom="0.247cm" style:contextual-spacing="false"/>
      <style:text-properties fo:language="it" fo:country="IT"/>
    </style:style>
    <style:style style:name="P128" style:family="paragraph" style:parent-style-name="Standard">
      <loext:graphic-properties draw:fill="solid" draw:fill-color="#c0c0c0"/>
      <style:paragraph-properties fo:line-height="115%" fo:text-align="justify" style:justify-single-word="false" fo:background-color="#c0c0c0" fo:padding="0.035cm" fo:border="0.74pt dotted #000000" style:shadow="none" style:writing-mode="lr-tb"/>
      <style:text-properties fo:language="it" fo:country="IT" fo:font-weight="normal" fo:background-color="transparent" style:font-weight-asian="normal" style:font-weight-complex="normal"/>
    </style:style>
    <style:style style:name="P129" style:family="paragraph" style:parent-style-name="Standard">
      <style:text-properties fo:language="it" fo:country="IT"/>
    </style:style>
    <style:style style:name="P130" style:family="paragraph" style:parent-style-name="Standard">
      <style:paragraph-properties fo:margin-top="0cm" fo:margin-bottom="0cm" style:contextual-spacing="false" fo:break-before="page"/>
      <style:text-properties fo:language="it" fo:country="IT"/>
    </style:style>
    <style:style style:name="P131" style:family="paragraph" style:parent-style-name="Standard">
      <style:paragraph-properties fo:margin-top="0cm" fo:margin-bottom="0cm" style:contextual-spacing="false" fo:line-height="100%" fo:text-align="end" style:justify-single-word="false"/>
    </style:style>
    <style:style style:name="P132" style:family="paragraph" style:parent-style-name="Standard">
      <style:paragraph-properties fo:line-height="100%" fo:text-align="start" style:justify-single-word="false" fo:orphans="0" fo:widows="0">
        <style:tab-stops/>
      </style:paragraph-properties>
    </style:style>
    <style:style style:name="P133" style:family="paragraph" style:parent-style-name="Standard">
      <style:paragraph-properties fo:line-height="100%" fo:text-align="center" style:justify-single-word="false" fo:orphans="0" fo:widows="0">
        <style:tab-stops/>
      </style:paragraph-properties>
    </style:style>
    <style:style style:name="P134" style:family="paragraph" style:parent-style-name="Standard">
      <style:paragraph-properties fo:line-height="115%" fo:text-align="justify" style:justify-single-word="false"/>
    </style:style>
    <style:style style:name="P135" style:family="paragraph" style:parent-style-name="Standard">
      <loext:graphic-properties draw:fill="solid" draw:fill-color="#e8e8e8"/>
      <style:paragraph-properties fo:line-height="115%" fo:text-align="justify" style:justify-single-word="false" fo:background-color="#e8e8e8"/>
    </style:style>
    <style:style style:name="P136" style:family="paragraph" style:parent-style-name="Standard">
      <loext:graphic-properties draw:fill="solid" draw:fill-color="#c0c0c0"/>
      <style:paragraph-properties fo:line-height="115%" fo:text-align="justify" style:justify-single-word="false" fo:background-color="#c0c0c0"/>
    </style:style>
    <style:style style:name="P137" style:family="paragraph" style:parent-style-name="Standard">
      <style:paragraph-properties fo:line-height="115%" fo:text-align="justify" style:justify-single-word="false" style:writing-mode="lr-tb"/>
    </style:style>
    <style:style style:name="P138" style:family="paragraph" style:parent-style-name="Standard">
      <loext:graphic-properties draw:fill="solid" draw:fill-color="#ffff00"/>
      <style:paragraph-properties fo:line-height="115%" fo:text-align="justify" style:justify-single-word="false" fo:background-color="#ffff00" style:writing-mode="lr-tb"/>
    </style:style>
    <style:style style:name="P139" style:family="paragraph" style:parent-style-name="Standard">
      <loext:graphic-properties draw:fill="solid" draw:fill-color="#c0c0c0"/>
      <style:paragraph-properties fo:line-height="115%" fo:text-align="justify" style:justify-single-word="false" fo:background-color="#c0c0c0" style:writing-mode="lr-tb"/>
    </style:style>
    <style:style style:name="P140" style:family="paragraph" style:parent-style-name="Standard">
      <style:paragraph-properties fo:margin-left="1.199cm" fo:margin-right="0cm" fo:margin-top="0cm" fo:margin-bottom="0cm" style:contextual-spacing="false" fo:line-height="115%" fo:text-align="justify" style:justify-single-word="false" fo:orphans="2" fo:widows="2" fo:hyphenation-ladder-count="no-limit" fo:text-indent="-0.801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paragraph-properties fo:margin-left="1.3cm" fo:margin-right="0cm" fo:margin-top="0cm" fo:margin-bottom="0cm" style:contextual-spacing="false" fo:line-height="115%" fo:text-align="justify" style:justify-single-word="false" fo:orphans="2" fo:widows="2" fo:hyphenation-ladder-count="no-limit" fo:text-indent="-0.499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style:list-style-name="WWNum5">
      <style:paragraph-properties fo:line-height="115%" fo:text-align="justify" style:justify-single-word="false" style:writing-mode="lr-tb"/>
    </style:style>
    <style:style style:name="P143" style:family="paragraph" style:parent-style-name="Standard">
      <style:paragraph-properties fo:line-height="115%" fo:text-align="justify" style:justify-single-word="false" fo:padding="0.035cm" fo:border="0.26pt solid #000000" style:shadow="#000000 0.009cm 0.009cm" style:writing-mode="lr-tb"/>
    </style:style>
    <style:style style:name="P144" style:family="paragraph" style:parent-style-name="Standard">
      <style:paragraph-properties fo:margin-top="0cm" fo:margin-bottom="0cm" style:contextual-spacing="false" fo:line-height="115%" fo:text-align="justify" style:justify-single-word="false"/>
    </style:style>
    <style:style style:name="P145" style:family="paragraph" style:parent-style-name="Standard">
      <style:paragraph-properties fo:margin-top="0cm" fo:margin-bottom="0cm" style:contextual-spacing="false" fo:line-height="115%" fo:text-align="justify" style:justify-single-word="false" fo:break-before="page" style:writing-mode="lr-tb"/>
    </style:style>
    <style:style style:name="P146" style:family="paragraph" style:parent-style-name="Standard">
      <style:paragraph-properties fo:margin-top="0cm" fo:margin-bottom="0cm" style:contextual-spacing="false" fo:line-height="115%" fo:text-align="justify" style:justify-single-word="false" fo:break-before="page"/>
    </style:style>
    <style:style style:name="P147" style:family="paragraph" style:parent-style-name="Standard">
      <style:paragraph-properties fo:margin-top="0cm" fo:margin-bottom="0cm" style:contextual-spacing="false" fo:line-height="115%" fo:text-align="justify" style:justify-single-word="false" style:writing-mode="lr-tb"/>
    </style:style>
    <style:style style:name="P148" style:family="paragraph" style:parent-style-name="Standard" style:list-style-name="WWNum6">
      <style:paragraph-properties fo:line-height="115%" fo:text-align="justify" style:justify-single-word="false"/>
    </style:style>
    <style:style style:name="P149" style:family="paragraph" style:parent-style-name="Standard" style:list-style-name="WWNum7">
      <style:paragraph-properties fo:line-height="115%" fo:text-align="justify" style:justify-single-word="false" style:writing-mode="lr-tb"/>
    </style:style>
    <style:style style:name="P150" style:family="paragraph" style:parent-style-name="Standard" style:list-style-name="WWNum8">
      <style:paragraph-properties fo:line-height="115%" fo:text-align="justify" style:justify-single-word="false" style:writing-mode="lr-tb"/>
    </style:style>
    <style:style style:name="P151" style:family="paragraph" style:parent-style-name="Standard" style:list-style-name="WWNum11">
      <style:paragraph-properties fo:line-height="115%" fo:text-align="justify" style:justify-single-word="false" style:writing-mode="lr-tb"/>
    </style:style>
    <style:style style:name="P152" style:family="paragraph" style:parent-style-name="Standard" style:list-style-name="WWNum12">
      <style:paragraph-properties fo:line-height="115%" fo:text-align="justify" style:justify-single-word="false" style:writing-mode="lr-tb"/>
    </style:style>
    <style:style style:name="P153" style:family="paragraph" style:parent-style-name="Standard" style:list-style-name="WWNum10">
      <style:paragraph-properties fo:line-height="115%" fo:text-align="justify" style:justify-single-word="false" style:writing-mode="lr-tb"/>
    </style:style>
    <style:style style:name="P154" style:family="paragraph" style:parent-style-name="Standard">
      <loext:graphic-properties draw:fill="solid" draw:fill-color="#729fcf"/>
      <style:paragraph-properties fo:line-height="115%" fo:text-align="justify" style:justify-single-word="false" fo:background-color="#729fcf" fo:padding="0.035cm" fo:border="0.74pt dotted #000000" style:shadow="none" style:writing-mode="lr-tb"/>
    </style:style>
    <style:style style:name="P155" style:family="paragraph" style:parent-style-name="Standard">
      <loext:graphic-properties draw:fill="solid" draw:fill-color="#c0c0c0"/>
      <style:paragraph-properties fo:line-height="115%" fo:text-align="justify" style:justify-single-word="false" fo:background-color="#c0c0c0" fo:padding="0.035cm" fo:border="0.74pt dotted #000000" style:shadow="none" style:writing-mode="lr-tb"/>
    </style:style>
    <style:style style:name="P156" style:family="paragraph" style:parent-style-name="Standard" style:list-style-name="WWNum13">
      <style:paragraph-properties fo:line-height="115%" fo:text-align="justify" style:justify-single-word="false" style:writing-mode="lr-tb"/>
    </style:style>
    <style:style style:name="P157" style:family="paragraph" style:parent-style-name="Standard" style:list-style-name="WWNum14">
      <style:paragraph-properties fo:line-height="115%" fo:text-align="justify" style:justify-single-word="false" style:writing-mode="lr-tb"/>
    </style:style>
    <style:style style:name="P158" style:family="paragraph" style:parent-style-name="Standard" style:list-style-name="WWNum15">
      <style:paragraph-properties fo:line-height="115%" fo:text-align="justify" style:justify-single-word="false" style:writing-mode="lr-tb"/>
    </style:style>
    <style:style style:name="P159" style:family="paragraph" style:parent-style-name="Standard" style:list-style-name="WWNum16">
      <style:paragraph-properties fo:line-height="115%" fo:text-align="justify" style:justify-single-word="false" style:writing-mode="lr-tb"/>
    </style:style>
    <style:style style:name="P160" style:family="paragraph" style:parent-style-name="Standard" style:list-style-name="WWNum28">
      <style:paragraph-properties fo:line-height="115%" fo:text-align="justify" style:justify-single-word="false" style:writing-mode="lr-tb"/>
    </style:style>
    <style:style style:name="P161" style:family="paragraph" style:parent-style-name="Standard" style:list-style-name="WWNum25">
      <style:paragraph-properties fo:line-height="115%" fo:text-align="justify" style:justify-single-word="false"/>
    </style:style>
    <style:style style:name="P162" style:family="paragraph" style:parent-style-name="Standard" style:list-style-name="WWNum30">
      <style:paragraph-properties fo:line-height="115%" fo:text-align="justify" style:justify-single-word="false"/>
    </style:style>
    <style:style style:name="P163" style:family="paragraph" style:parent-style-name="Standard" style:list-style-name="WWNum26">
      <style:paragraph-properties fo:line-height="115%" fo:text-align="justify" style:justify-single-word="false"/>
    </style:style>
    <style:style style:name="P164" style:family="paragraph" style:parent-style-name="Standard" style:list-style-name="WWNum56">
      <style:paragraph-properties fo:line-height="115%" fo:text-align="justify" style:justify-single-word="false"/>
    </style:style>
    <style:style style:name="P165" style:family="paragraph" style:parent-style-name="Standard" style:list-style-name="WWNum27">
      <style:paragraph-properties fo:line-height="115%" fo:text-align="justify" style:justify-single-word="false"/>
    </style:style>
    <style:style style:name="P166" style:family="paragraph" style:parent-style-name="Standard" style:list-style-name="WWNum29">
      <style:paragraph-properties fo:line-height="115%" fo:text-align="justify" style:justify-single-word="false"/>
    </style:style>
    <style:style style:name="P167" style:family="paragraph" style:parent-style-name="Standard" style:list-style-name="WWNum33">
      <style:paragraph-properties fo:line-height="115%" fo:text-align="justify" style:justify-single-word="false"/>
    </style:style>
    <style:style style:name="P168" style:family="paragraph" style:parent-style-name="Standard" style:list-style-name="WWNum57">
      <style:paragraph-properties fo:line-height="115%" fo:text-align="justify" style:justify-single-word="false"/>
    </style:style>
    <style:style style:name="P169" style:family="paragraph" style:parent-style-name="Standard" style:list-style-name="WWNum34">
      <style:paragraph-properties fo:line-height="115%" fo:text-align="justify" style:justify-single-word="false"/>
    </style:style>
    <style:style style:name="P170" style:family="paragraph" style:parent-style-name="Standard" style:list-style-name="WWNum35">
      <style:paragraph-properties fo:line-height="115%" fo:text-align="justify" style:justify-single-word="false"/>
    </style:style>
    <style:style style:name="P171" style:family="paragraph" style:parent-style-name="Standard" style:list-style-name="WWNum36">
      <style:paragraph-properties fo:line-height="115%" fo:text-align="justify" style:justify-single-word="false"/>
    </style:style>
    <style:style style:name="P172" style:family="paragraph" style:parent-style-name="Standard">
      <style:paragraph-properties fo:margin-top="0cm" fo:margin-bottom="0.3cm" style:contextual-spacing="false" fo:line-height="115%" fo:text-align="justify" style:justify-single-word="false"/>
    </style:style>
    <style:style style:name="P173" style:family="paragraph" style:parent-style-name="Standard" style:list-style-name="WWNum32">
      <style:paragraph-properties fo:line-height="115%" fo:text-align="justify" style:justify-single-word="false"/>
    </style:style>
    <style:style style:name="P174" style:family="paragraph" style:parent-style-name="Standard">
      <style:paragraph-properties fo:margin-left="1.27cm" fo:line-height="115%" fo:text-align="justify" style:justify-single-word="false" fo:text-indent="0cm" style:auto-text-indent="false"/>
    </style:style>
    <style:style style:name="P175" style:family="paragraph" style:parent-style-name="Standard" style:list-style-name="WWNum37">
      <style:paragraph-properties fo:line-height="115%" fo:text-align="justify" style:justify-single-word="false"/>
    </style:style>
    <style:style style:name="P176" style:family="paragraph" style:parent-style-name="Standard" style:list-style-name="WWNum39">
      <style:paragraph-properties fo:line-height="115%" fo:text-align="justify" style:justify-single-word="false"/>
    </style:style>
    <style:style style:name="P177" style:family="paragraph" style:parent-style-name="Standard" style:list-style-name="WWNum38">
      <style:paragraph-properties fo:line-height="115%" fo:text-align="justify" style:justify-single-word="false"/>
    </style:style>
    <style:style style:name="P178" style:family="paragraph" style:parent-style-name="Standard" style:list-style-name="WWNum40">
      <style:paragraph-properties fo:line-height="115%" fo:text-align="justify" style:justify-single-word="false"/>
    </style:style>
    <style:style style:name="P179" style:family="paragraph" style:parent-style-name="Standard" style:list-style-name="WWNum41">
      <style:paragraph-properties fo:line-height="115%" fo:text-align="justify" style:justify-single-word="false"/>
    </style:style>
    <style:style style:name="P180" style:family="paragraph" style:parent-style-name="Standard" style:list-style-name="WWNum42">
      <style:paragraph-properties fo:line-height="115%" fo:text-align="justify" style:justify-single-word="false"/>
    </style:style>
    <style:style style:name="P181" style:family="paragraph" style:parent-style-name="Standard">
      <style:paragraph-properties fo:margin-left="0.101cm" fo:line-height="115%" fo:text-align="justify" style:justify-single-word="false"/>
    </style:style>
    <style:style style:name="P182" style:family="paragraph" style:parent-style-name="Standard" style:list-style-name="WWNum49">
      <style:paragraph-properties fo:line-height="115%" fo:text-align="justify" style:justify-single-word="false"/>
    </style:style>
    <style:style style:name="P183" style:family="paragraph" style:parent-style-name="Standard" style:list-style-name="WWNum44">
      <style:paragraph-properties fo:line-height="115%" fo:text-align="justify" style:justify-single-word="false"/>
    </style:style>
    <style:style style:name="P184" style:family="paragraph" style:parent-style-name="Standard" style:list-style-name="WWNum45">
      <style:paragraph-properties fo:line-height="115%" fo:text-align="justify" style:justify-single-word="false"/>
    </style:style>
    <style:style style:name="P185" style:family="paragraph" style:parent-style-name="Standard" style:list-style-name="WWNum46">
      <style:paragraph-properties fo:line-height="115%" fo:text-align="justify" style:justify-single-word="false"/>
    </style:style>
    <style:style style:name="P186" style:family="paragraph" style:parent-style-name="Standard" style:list-style-name="WWNum47">
      <style:paragraph-properties fo:line-height="115%" fo:text-align="justify" style:justify-single-word="false"/>
    </style:style>
    <style:style style:name="P187" style:family="paragraph" style:parent-style-name="Standard" style:list-style-name="WWNum48">
      <style:paragraph-properties fo:line-height="115%" fo:text-align="justify" style:justify-single-word="false"/>
    </style:style>
    <style:style style:name="P188" style:family="paragraph" style:parent-style-name="Standard" style:list-style-name="WWNum50">
      <style:paragraph-properties fo:line-height="115%" fo:text-align="justify" style:justify-single-word="false"/>
    </style:style>
    <style:style style:name="P189" style:family="paragraph" style:parent-style-name="Standard" style:list-style-name="WWNum51">
      <style:paragraph-properties fo:line-height="115%" fo:text-align="justify" style:justify-single-word="false"/>
    </style:style>
    <style:style style:name="P190" style:family="paragraph" style:parent-style-name="Standard" style:list-style-name="WWNum52">
      <style:paragraph-properties fo:line-height="115%" fo:text-align="justify" style:justify-single-word="false"/>
    </style:style>
    <style:style style:name="P191" style:family="paragraph" style:parent-style-name="Standard">
      <style:paragraph-properties fo:line-height="115%" fo:text-align="start" style:justify-single-word="false" style:writing-mode="lr-tb"/>
    </style:style>
    <style:style style:name="P192" style:family="paragraph" style:parent-style-name="Standard">
      <style:paragraph-properties fo:margin-left="1.199cm" fo:margin-right="0cm" fo:margin-top="0cm" fo:margin-bottom="0cm" style:contextual-spacing="false" fo:line-height="115%" fo:text-align="start" style:justify-single-word="false" fo:orphans="2" fo:widows="2" fo:hyphenation-ladder-count="no-limit" fo:text-indent="-0.801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193" style:family="paragraph" style:parent-style-name="Standard">
      <style:paragraph-properties fo:margin-left="0.801cm" fo:margin-right="0cm" fo:margin-top="0cm" fo:margin-bottom="0cm" style:contextual-spacing="false" fo:line-height="115%"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194" style:family="paragraph" style:parent-style-name="Standard" style:list-style-name="WWNum17">
      <style:paragraph-properties fo:line-height="115%"/>
    </style:style>
    <style:style style:name="P195" style:family="paragraph" style:parent-style-name="Standard">
      <style:paragraph-properties fo:margin-top="0cm" fo:margin-bottom="0.247cm" style:contextual-spacing="false" fo:line-height="115%"/>
    </style:style>
    <style:style style:name="P196" style:family="paragraph" style:parent-style-name="Standard">
      <style:paragraph-properties fo:line-height="115%"/>
    </style:style>
    <style:style style:name="P197" style:family="paragraph" style:parent-style-name="Standard">
      <style:paragraph-properties fo:line-height="115%" fo:text-align="justify" style:justify-single-word="false" style:writing-mode="lr-tb"/>
      <style:text-properties style:font-name="Liberation Serif" fo:language="it" fo:country="IT"/>
    </style:style>
    <style:style style:name="P198" style:family="paragraph" style:parent-style-name="Standard">
      <style:paragraph-properties fo:margin-left="1.439cm" fo:line-height="115%" fo:text-align="justify" style:justify-single-word="false" fo:text-indent="0cm" style:auto-text-indent="false" style:writing-mode="lr-tb"/>
      <style:text-properties style:font-name="Liberation Serif" fo:language="it" fo:country="IT"/>
    </style:style>
    <style:style style:name="P199" style:family="paragraph" style:parent-style-name="Standard">
      <style:paragraph-properties fo:line-height="115%" fo:text-align="start" style:justify-single-word="false" style:writing-mode="lr-tb"/>
      <style:text-properties style:font-name="Liberation Serif" fo:language="it" fo:country="IT"/>
    </style:style>
    <style:style style:name="P200" style:family="paragraph" style:parent-style-name="Standard">
      <style:paragraph-properties fo:line-height="115%" fo:text-align="justify" style:justify-single-word="false" style:writing-mode="lr-tb"/>
      <style:text-properties style:font-name="Liberation Serif" fo:language="it" fo:country="IT" style:language-asian="en" style:country-asian="US"/>
    </style:style>
    <style:style style:name="P201" style:family="paragraph" style:parent-style-name="Standard">
      <style:paragraph-properties fo:text-align="justify" style:justify-single-word="false" style:writing-mode="lr-tb"/>
      <style:text-properties style:font-name="Liberation Serif" fo:language="it" fo:country="IT"/>
    </style:style>
    <style:style style:name="P202" style:family="paragraph" style:parent-style-name="Standard">
      <style:text-properties style:font-name="Liberation Serif" fo:language="it" fo:country="IT"/>
    </style:style>
    <style:style style:name="P203" style:family="paragraph" style:parent-style-name="Standard">
      <style:paragraph-properties fo:margin-left="1.199cm" fo:margin-right="0cm" fo:margin-top="0cm" fo:margin-bottom="0cm" style:contextual-spacing="false" fo:line-height="115%" fo:text-align="start" style:justify-single-word="false" fo:orphans="2" fo:widows="2" fo:hyphenation-ladder-count="no-limit" fo:text-indent="-0.801cm" style:auto-text-indent="false" style:writing-mode="lr-tb"/>
      <style:text-properties style:font-name="Liberation Serif" fo:hyphenate="false" fo:hyphenation-remain-char-count="2" fo:hyphenation-push-char-count="2" loext:hyphenation-no-caps="false" loext:hyphenation-no-last-word="false" loext:hyphenation-word-char-count="5" loext:hyphenation-zone="no-limit"/>
    </style:style>
    <style:style style:name="P204" style:family="paragraph" style:parent-style-name="Standard">
      <style:paragraph-properties fo:line-height="115%" fo:text-align="justify" style:justify-single-word="false"/>
      <style:text-properties style:font-name="Liberation Serif"/>
    </style:style>
    <style:style style:name="P205" style:family="paragraph" style:parent-style-name="Standard">
      <style:paragraph-properties fo:margin-top="0cm" fo:margin-bottom="0cm" style:contextual-spacing="false" fo:line-height="115%" fo:text-align="justify" style:justify-single-word="false" fo:break-before="page"/>
      <style:text-properties style:font-name="Liberation Serif"/>
    </style:style>
    <style:style style:name="P206" style:family="paragraph" style:parent-style-name="Standard">
      <style:paragraph-properties fo:line-height="115%" fo:text-align="justify" style:justify-single-word="false" style:writing-mode="lr-tb"/>
      <style:text-properties style:font-name="Liberation Serif"/>
    </style:style>
    <style:style style:name="P207" style:family="paragraph" style:parent-style-name="Standard">
      <style:paragraph-properties fo:line-height="115%" fo:text-align="justify" style:justify-single-word="false"/>
      <style:text-properties style:font-name="Liberation Serif" fo:font-style="normal" style:font-style-asian="normal" style:font-style-complex="normal"/>
    </style:style>
    <style:style style:name="P208" style:family="paragraph" style:parent-style-name="Standard">
      <style:paragraph-properties fo:line-height="115%" fo:text-align="justify" style:justify-single-word="false" style:writing-mode="lr-tb"/>
      <style:text-properties style:use-window-font-color="true" loext:opacity="0%" style:font-name="Liberation Serif" fo:font-size="12pt" fo:language="it" fo:country="IT" style:letter-kerning="true" style:font-name-asian="NSimSun" style:font-size-asian="12pt" style:language-asian="zh" style:country-asian="CN" style:font-name-complex="Lucida Sans1" style:font-size-complex="12pt" style:language-complex="hi" style:country-complex="IN"/>
    </style:style>
    <style:style style:name="P209" style:family="paragraph" style:parent-style-name="Standard">
      <style:paragraph-properties fo:line-height="115%" fo:text-align="justify" style:justify-single-word="false"/>
      <style:text-properties style:use-window-font-color="true" loext:opacity="0%" style:font-name="Liberation Serif" fo:font-size="12pt" fo:language="it" fo:country="IT" style:letter-kerning="true" style:font-name-asian="NSimSun" style:font-size-asian="12pt" style:language-asian="zh" style:country-asian="CN" style:font-name-complex="Lucida Sans1" style:font-size-complex="12pt" style:language-complex="hi" style:country-complex="IN"/>
    </style:style>
    <style:style style:name="P210" style:family="paragraph" style:parent-style-name="Standard">
      <style:paragraph-properties fo:line-height="115%" fo:text-align="justify" style:justify-single-word="false"/>
      <style:text-properties style:use-window-font-color="true" loext:opacity="0%" style:font-name="Liberation Serif" fo:font-size="12pt" fo:language="it" fo:country="IT" fo:font-style="normal"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P211" style:family="paragraph" style:parent-style-name="Standard">
      <style:paragraph-properties fo:line-height="115%" fo:text-align="justify" style:justify-single-word="false" style:writing-mode="lr-tb"/>
      <style:text-properties style:use-window-font-color="true" loext:opacity="0%" style:font-name="Liberation Serif" fo:font-size="12pt" fo:language="it" fo:country="IT" fo:font-style="normal"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P212" style:family="paragraph" style:parent-style-name="Standard">
      <style:paragraph-properties fo:margin-top="0cm" fo:margin-bottom="0cm" style:contextual-spacing="false" fo:line-height="115%" fo:text-align="justify" style:justify-single-word="false" fo:break-before="page" style:writing-mode="lr-tb"/>
      <style:text-properties style:use-window-font-color="true" loext:opacity="0%" style:font-name="Liberation Serif" fo:font-size="12pt" fo:language="it" fo:country="IT" fo:font-style="normal"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P213" style:family="paragraph" style:parent-style-name="Standard">
      <style:paragraph-properties fo:text-align="justify" style:justify-single-word="false" style:writing-mode="lr-tb"/>
      <style:text-properties style:use-window-font-color="true" loext:opacity="0%" style:font-name="Liberation Serif" fo:font-size="12pt" fo:language="it" fo:country="IT" fo:font-style="normal"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P214" style:family="paragraph" style:parent-style-name="Standard">
      <style:paragraph-properties fo:line-height="115%" fo:text-align="justify" style:justify-single-word="false"/>
      <style:text-properties style:use-window-font-color="true" loext:opacity="0%" fo:font-size="12pt" fo:language="it" fo:country="IT" style:letter-kerning="true" style:font-name-asian="NSimSun" style:font-size-asian="12pt" style:language-asian="zh" style:country-asian="CN" style:font-name-complex="Lucida Sans1" style:font-size-complex="12pt" style:language-complex="hi" style:country-complex="IN"/>
    </style:style>
    <style:style style:name="P215" style:family="paragraph" style:parent-style-name="Standard" style:list-style-name="WWNum53">
      <style:paragraph-properties fo:line-height="115%" fo:text-align="justify" style:justify-single-word="false"/>
      <style:text-properties style:use-window-font-color="true" loext:opacity="0%" fo:font-size="12pt" fo:language="it" fo:country="IT" style:letter-kerning="true" style:font-name-asian="NSimSun" style:font-size-asian="12pt" style:language-asian="zh" style:country-asian="CN" style:font-name-complex="Lucida Sans1" style:font-size-complex="12pt" style:language-complex="hi" style:country-complex="IN"/>
    </style:style>
    <style:style style:name="P216" style:family="paragraph" style:parent-style-name="Standard" style:list-style-name="WWNum54">
      <style:paragraph-properties fo:line-height="115%" fo:text-align="justify" style:justify-single-word="false"/>
      <style:text-properties style:use-window-font-color="true" loext:opacity="0%" fo:font-size="12pt" fo:language="it" fo:country="IT" style:letter-kerning="true" style:font-name-asian="NSimSun" style:font-size-asian="12pt" style:language-asian="zh" style:country-asian="CN" style:font-name-complex="Lucida Sans1" style:font-size-complex="12pt" style:language-complex="hi" style:country-complex="IN"/>
    </style:style>
    <style:style style:name="P217" style:family="paragraph" style:parent-style-name="Standard">
      <style:paragraph-properties fo:line-height="115%" fo:text-align="justify" style:justify-single-word="false"/>
      <style:text-properties style:use-window-font-color="true" loext:opacity="0%" fo:font-size="12pt" fo:language="it" fo:country="IT" fo:font-style="normal"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P218" style:family="paragraph" style:parent-style-name="Standard">
      <style:paragraph-properties fo:line-height="115%" fo:text-align="justify" style:justify-single-word="false" style:writing-mode="lr-tb"/>
      <style:text-properties style:use-window-font-color="true" loext:opacity="0%" fo:font-size="12pt" fo:language="it" fo:country="IT" fo:font-style="normal"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P219" style:family="paragraph" style:parent-style-name="Standard">
      <style:paragraph-properties fo:line-height="115%" fo:text-align="justify" style:justify-single-word="false"/>
      <style:text-properties style:use-window-font-color="true" loext:opacity="0%" style:font-name="Arial" fo:font-size="12pt" fo:language="it" fo:country="IT" style:letter-kerning="true" style:font-name-asian="NSimSun" style:font-size-asian="12pt" style:language-asian="zh" style:country-asian="CN" style:font-name-complex="Lucida Sans1" style:font-size-complex="12pt" style:language-complex="hi" style:country-complex="IN"/>
    </style:style>
    <style:style style:name="P220" style:family="paragraph" style:parent-style-name="Standard">
      <style:paragraph-properties fo:text-align="justify" style:justify-single-word="false"/>
      <style:text-properties style:use-window-font-color="true" loext:opacity="0%" style:font-name="Arial" fo:font-size="12pt" fo:language="it" fo:country="IT" style:letter-kerning="true" style:font-name-asian="NSimSun" style:font-size-asian="12pt" style:language-asian="zh" style:country-asian="CN" style:font-name-complex="Lucida Sans1" style:font-size-complex="12pt" style:language-complex="hi" style:country-complex="IN"/>
    </style:style>
    <style:style style:name="P221" style:family="paragraph" style:parent-style-name="Standard">
      <style:paragraph-properties fo:text-align="justify" style:justify-single-word="false" style:writing-mode="lr-tb"/>
      <style:text-properties style:use-window-font-color="true" loext:opacity="0%" style:font-name="Arial" fo:font-size="12pt" fo:language="it" fo:country="IT" style:letter-kerning="true" style:font-name-asian="NSimSun" style:font-size-asian="12pt" style:language-asian="zh" style:country-asian="CN" style:font-name-complex="Lucida Sans1" style:font-size-complex="12pt" style:language-complex="hi" style:country-complex="IN"/>
    </style:style>
    <style:style style:name="P222" style:family="paragraph" style:parent-style-name="Standard">
      <style:paragraph-properties fo:line-height="115%" fo:text-align="justify" style:justify-single-word="false"/>
      <style:text-properties style:use-window-font-color="true" loext:opacity="0%" style:font-name="Arial" fo:font-size="12pt" fo:language="it" fo:country="IT" fo:font-style="normal"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P223" style:family="paragraph" style:parent-style-name="Standard">
      <style:paragraph-properties fo:text-align="justify" style:justify-single-word="false"/>
      <style:text-properties style:use-window-font-color="true" loext:opacity="0%" style:font-name="Arial" fo:font-size="12pt" fo:language="it" fo:country="IT" fo:font-style="normal"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P224" style:family="paragraph" style:parent-style-name="Standard">
      <style:paragraph-properties fo:text-align="justify" style:justify-single-word="false" style:writing-mode="lr-tb"/>
      <style:text-properties style:use-window-font-color="true" loext:opacity="0%" style:font-name="Arial" fo:font-size="12pt" fo:language="it" fo:country="IT" fo:font-style="normal"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P225" style:family="paragraph" style:parent-style-name="Standard">
      <style:paragraph-properties fo:text-align="justify" style:justify-single-word="false" style:writing-mode="lr-tb"/>
    </style:style>
    <style:style style:name="P226" style:family="paragraph" style:parent-style-name="Standard">
      <style:paragraph-properties fo:text-align="justify" style:justify-single-word="false"/>
    </style:style>
    <style:style style:name="P227" style:family="paragraph" style:parent-style-name="Standard">
      <style:paragraph-properties fo:text-align="start" style:justify-single-word="false" fo:orphans="0" fo:widows="0">
        <style:tab-stops/>
      </style:paragraph-properties>
    </style:style>
    <style:style style:name="P228" style:family="paragraph" style:parent-style-name="Standard">
      <style:paragraph-properties fo:margin-top="0cm" fo:margin-bottom="0cm" style:contextual-spacing="false" fo:text-align="start" style:justify-single-word="false" fo:orphans="0" fo:widows="0">
        <style:tab-stops/>
      </style:paragraph-properties>
    </style:style>
    <style:style style:name="P229" style:family="paragraph" style:parent-style-name="Standard">
      <style:text-properties fo:color="#333333" loext:opacity="100%" style:font-name="Calibri" fo:font-size="11pt" fo:language="it" fo:country="IT" fo:font-weight="normal" style:font-size-asian="11pt" style:font-weight-asian="normal"/>
    </style:style>
    <style:style style:name="P230" style:family="paragraph" style:parent-style-name="Standard">
      <style:paragraph-properties fo:text-align="start" style:justify-single-word="false" fo:orphans="0" fo:widows="0">
        <style:tab-stops/>
      </style:paragraph-properties>
      <style:text-properties style:font-name="Calibri" fo:font-size="11pt" fo:language="it" fo:country="IT" style:font-size-asian="11pt"/>
    </style:style>
    <style:style style:name="P231" style:family="paragraph" style:parent-style-name="Standard">
      <style:text-properties style:font-name="Calibri" fo:font-size="11pt" fo:language="it" fo:country="IT" style:font-size-asian="11pt"/>
    </style:style>
    <style:style style:name="P232" style:family="paragraph" style:parent-style-name="Standard">
      <style:paragraph-properties fo:margin-top="0cm" fo:margin-bottom="0cm" style:contextual-spacing="false" fo:break-before="page"/>
      <style:text-properties fo:font-variant="normal" fo:text-transform="none" fo:language="it" fo:country="IT"/>
    </style:style>
    <style:style style:name="P233" style:family="paragraph" style:parent-style-name="Standard">
      <style:text-properties fo:font-variant="normal" fo:text-transform="none" fo:language="it" fo:country="IT"/>
    </style:style>
    <style:style style:name="P234" style:family="paragraph" style:parent-style-name="Standard" style:list-style-name="WWNum17">
      <style:paragraph-properties fo:line-height="115%"/>
      <style:text-properties fo:font-variant="normal" fo:text-transform="none" fo:language="it" fo:country="IT"/>
    </style:style>
    <style:style style:name="P235" style:family="paragraph" style:parent-style-name="Standard">
      <style:paragraph-properties fo:margin-top="0cm" fo:margin-bottom="0.247cm" style:contextual-spacing="false"/>
    </style:style>
    <style:style style:name="P236" style:family="paragraph" style:parent-style-name="Standard">
      <style:paragraph-properties fo:margin-top="0.6cm" fo:margin-bottom="0.25cm" style:contextual-spacing="false"/>
    </style:style>
    <style:style style:name="P237" style:family="paragraph" style:parent-style-name="Standard" style:list-style-name="WWNum20">
      <style:paragraph-properties fo:margin-top="0cm" fo:margin-bottom="0.247cm" style:contextual-spacing="false"/>
    </style:style>
    <style:style style:name="P238" style:family="paragraph" style:parent-style-name="Standard" style:list-style-name="WWNum21">
      <style:paragraph-properties fo:margin-top="0cm" fo:margin-bottom="0.247cm" style:contextual-spacing="false"/>
    </style:style>
    <style:style style:name="P239" style:family="paragraph" style:parent-style-name="Standard">
      <style:text-properties fo:color="#000000" loext:opacity="100%" style:text-outline="false" style:text-line-through-style="none" style:text-line-through-type="none" style:font-name="Bahnschrift" fo:font-size="12pt" fo:language="it" fo:country="IT" fo:font-style="normal" fo:text-shadow="none" style:text-underline-style="none" fo:font-weight="normal" style:letter-kerning="true" style:font-name-asian="NSimSun" style:font-size-asian="12pt" style:language-asian="zh" style:country-asian="CN" style:font-style-asian="normal" style:font-weight-asian="normal" style:font-name-complex="Lucida Sans1" style:font-size-complex="12pt" style:language-complex="hi" style:country-complex="IN" style:font-style-complex="normal" style:font-weight-complex="normal"/>
    </style:style>
    <style:style style:name="P240" style:family="paragraph" style:parent-style-name="Standard">
      <style:paragraph-properties fo:line-height="115%" fo:text-align="justify" style:justify-single-word="false"/>
      <style:text-properties fo:color="#000000" loext:opacity="100%" style:text-outline="false" style:text-line-through-style="none" style:text-line-through-type="none" style:font-name="Liberation Serif" fo:font-size="12pt" fo:language="it" fo:country="IT" fo:font-style="normal" fo:text-shadow="none" style:text-underline-style="none" fo:font-weight="normal" style:letter-kerning="true" style:font-name-asian="NSimSun" style:font-size-asian="12pt" style:language-asian="zh" style:country-asian="CN" style:font-style-asian="normal" style:font-weight-asian="normal" style:font-name-complex="Lucida Sans1" style:font-size-complex="12pt" style:language-complex="hi" style:country-complex="IN" style:font-style-complex="normal" style:font-weight-complex="normal"/>
    </style:style>
    <style:style style:name="P241" style:family="paragraph" style:parent-style-name="Standard">
      <style:paragraph-properties fo:margin-top="0cm" fo:margin-bottom="0cm" style:contextual-spacing="false" fo:line-height="115%" fo:text-align="justify" style:justify-single-word="false" fo:break-before="page"/>
      <style:text-properties fo:color="#000000" loext:opacity="100%" style:text-outline="false" style:text-line-through-style="none" style:text-line-through-type="none" style:font-name="Liberation Serif" fo:font-size="12pt" fo:language="it" fo:country="IT" fo:font-style="normal" fo:text-shadow="none" style:text-underline-style="none" fo:font-weight="normal" style:letter-kerning="true" style:font-name-asian="NSimSun" style:font-size-asian="12pt" style:language-asian="zh" style:country-asian="CN" style:font-style-asian="normal" style:font-weight-asian="normal" style:font-name-complex="Lucida Sans1" style:font-size-complex="12pt" style:language-complex="hi" style:country-complex="IN" style:font-style-complex="normal" style:font-weight-complex="normal"/>
    </style:style>
    <style:style style:name="P242" style:family="paragraph" style:parent-style-name="Standard" style:list-style-name="WWNum1">
      <style:paragraph-properties fo:line-height="115%" fo:text-align="justify" style:justify-single-word="false"/>
      <style:text-properties fo:color="#000000" loext:opacity="100%" style:text-outline="false" style:text-line-through-style="none" style:text-line-through-type="none" fo:font-size="12pt" fo:language="it" fo:country="IT" fo:font-style="normal" fo:text-shadow="none" style:text-underline-style="none" fo:font-weight="normal" style:letter-kerning="true" style:font-name-asian="NSimSun" style:font-size-asian="12pt" style:language-asian="zh" style:country-asian="CN" style:font-style-asian="normal" style:font-weight-asian="normal" style:font-name-complex="Lucida Sans1" style:font-size-complex="12pt" style:language-complex="hi" style:country-complex="IN" style:font-style-complex="normal" style:font-weight-complex="normal"/>
    </style:style>
    <style:style style:name="P243" style:family="paragraph" style:parent-style-name="Text_20_body" style:list-style-name="WWNum9">
      <style:paragraph-properties fo:margin-left="1.251cm" fo:margin-top="0cm" fo:margin-bottom="0cm" style:contextual-spacing="false" fo:text-indent="-0.499cm" style:auto-text-indent="false">
        <style:tab-stops>
          <style:tab-stop style:position="0cm"/>
        </style:tab-stops>
      </style:paragraph-properties>
    </style:style>
    <style:style style:name="P244" style:family="paragraph" style:parent-style-name="Text_20_body" style:list-style-name="WWNum9">
      <style:paragraph-properties fo:margin-left="1.251cm" fo:text-indent="-0.499cm" style:auto-text-indent="false">
        <style:tab-stops>
          <style:tab-stop style:position="0cm"/>
        </style:tab-stops>
      </style:paragraph-properties>
      <style:text-properties fo:language="it" fo:country="IT"/>
    </style:style>
    <style:style style:name="P245" style:family="paragraph" style:parent-style-name="Text_20_body">
      <style:paragraph-properties fo:margin-top="0cm" fo:margin-bottom="0.247cm" style:contextual-spacing="false" fo:break-before="page"/>
      <style:text-properties fo:language="it" fo:country="IT"/>
    </style:style>
    <style:style style:name="P246" style:family="paragraph" style:parent-style-name="Text_20_body">
      <style:paragraph-properties fo:margin-top="0cm" fo:margin-bottom="0.247cm" style:contextual-spacing="false"/>
      <style:text-properties fo:language="it" fo:country="IT"/>
    </style:style>
    <style:style style:name="P247" style:family="paragraph" style:parent-style-name="Text_20_body">
      <style:text-properties fo:language="it" fo:country="IT"/>
    </style:style>
    <style:style style:name="P248" style:family="paragraph" style:parent-style-name="Text_20_body">
      <style:text-properties style:use-window-font-color="true" loext:opacity="0%" style:font-name="Arial" fo:font-size="12pt" fo:language="it" fo:country="IT" fo:font-style="normal"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P249" style:family="paragraph" style:parent-style-name="Text_20_body">
      <style:text-properties style:use-window-font-color="true" loext:opacity="0%" style:font-name="Liberation Serif" fo:language="it" fo:country="IT"/>
    </style:style>
    <style:style style:name="P250" style:family="paragraph" style:parent-style-name="Text_20_body">
      <style:paragraph-properties fo:text-align="justify" style:justify-single-word="false"/>
    </style:style>
    <style:style style:name="P251" style:family="paragraph" style:parent-style-name="Text_20_body" style:list-style-name="WWNum18">
      <style:paragraph-properties fo:text-align="justify" style:justify-single-word="false"/>
    </style:style>
    <style:style style:name="P252" style:family="paragraph" style:parent-style-name="Text_20_body" style:list-style-name="WWNum19">
      <style:paragraph-properties fo:text-align="justify" style:justify-single-word="false"/>
    </style:style>
    <style:style style:name="P253" style:family="paragraph" style:parent-style-name="Text_20_body" style:list-style-name="WWNum19">
      <style:paragraph-properties fo:text-align="start" style:justify-single-word="false"/>
    </style:style>
    <style:style style:name="P254" style:family="paragraph" style:parent-style-name="Text_20_body" style:list-style-name="WWNum19">
      <style:paragraph-properties fo:margin-top="0cm" fo:margin-bottom="0.049cm" style:contextual-spacing="false" fo:line-height="100%" fo:text-align="start" style:justify-single-word="false"/>
    </style:style>
    <style:style style:name="P255" style:family="paragraph" style:parent-style-name="Text_20_body">
      <style:paragraph-properties fo:text-align="justify" style:justify-single-word="false"/>
      <style:text-properties style:font-name="Liberation Serif" fo:language="it" fo:country="IT"/>
    </style:style>
    <style:style style:name="P256" style:family="paragraph" style:parent-style-name="Text_20_body">
      <style:text-properties style:font-name="Liberation Serif" fo:language="it" fo:country="IT"/>
    </style:style>
    <style:style style:name="P257" style:family="paragraph" style:parent-style-name="Text_20_body">
      <style:text-properties style:font-name="Liberation Serif" fo:language="it" fo:country="IT" fo:font-style="normal" style:font-style-asian="normal" style:font-style-complex="normal"/>
    </style:style>
    <style:style style:name="P258" style:family="paragraph" style:parent-style-name="Text_20_body">
      <style:paragraph-properties fo:margin-top="0cm" fo:margin-bottom="0.247cm" style:contextual-spacing="false"/>
      <style:text-properties style:font-name="Liberation Serif" fo:language="it" fo:country="IT"/>
    </style:style>
    <style:style style:name="P259" style:family="paragraph" style:parent-style-name="Text_20_body">
      <style:paragraph-properties fo:margin-top="0cm" fo:margin-bottom="0.247cm" style:contextual-spacing="false"/>
    </style:style>
    <style:style style:name="P260" style:family="paragraph" style:parent-style-name="Text_20_body">
      <style:paragraph-properties fo:line-height="115%" fo:text-align="justify" style:justify-single-word="false"/>
      <style:text-properties fo:color="#000000" loext:opacity="100%" style:text-outline="false" style:text-line-through-style="none" style:text-line-through-type="none" style:font-name="Liberation Serif" fo:font-size="12pt" fo:language="it" fo:country="IT" fo:font-style="normal" fo:text-shadow="none" style:text-underline-style="none" fo:font-weight="normal" style:letter-kerning="true" style:font-name-asian="NSimSun" style:font-size-asian="12pt" style:language-asian="zh" style:country-asian="CN" style:font-style-asian="normal" style:font-weight-asian="normal" style:font-name-complex="Lucida Sans1" style:font-size-complex="12pt" style:language-complex="hi" style:country-complex="IN" style:font-style-complex="normal" style:font-weight-complex="normal"/>
    </style:style>
    <style:style style:name="P261" style:family="paragraph" style:parent-style-name="Text_20_body">
      <style:paragraph-properties fo:line-height="115%" fo:text-align="justify" style:justify-single-word="false"/>
    </style:style>
    <style:style style:name="P262" style:family="paragraph" style:parent-style-name="Text_20_body" style:list-style-name="WWNum31">
      <style:paragraph-properties fo:line-height="115%" fo:text-align="justify" style:justify-single-word="false"/>
    </style:style>
    <style:style style:name="P263" style:family="paragraph" style:parent-style-name="Text_20_body" style:list-style-name="WWNum43">
      <style:paragraph-properties fo:margin-top="0cm" fo:margin-bottom="0.247cm" style:contextual-spacing="false"/>
    </style:style>
    <style:style style:name="P264" style:family="paragraph" style:parent-style-name="Titolo" style:list-style-name="WWNum1">
      <style:paragraph-properties fo:text-align="center" style:justify-single-word="false"/>
    </style:style>
    <style:style style:name="P265" style:family="paragraph">
      <loext:graphic-properties draw:fill="solid" draw:fill-color="#ffffff"/>
      <style:paragraph-properties fo:text-align="start"/>
      <style:text-properties fo:color="#000000" loext:opacity="100%" fo:font-size="18pt"/>
    </style:style>
    <style:style style:name="P266" style:family="paragraph">
      <loext:graphic-properties draw:fill="none"/>
      <style:paragraph-properties fo:text-align="start"/>
      <style:text-properties fo:font-size="18pt"/>
    </style:style>
    <style:style style:name="T1" style:family="text">
      <style:text-properties fo:language="it" fo:country="IT"/>
    </style:style>
    <style:style style:name="T2" style:family="text">
      <style:text-properties fo:language="it" fo:country="IT" fo:font-weight="bold" style:font-weight-asian="bold" style:font-weight-complex="bold"/>
    </style:style>
    <style:style style:name="T3" style:family="text">
      <style:text-properties fo:language="it" fo:country="IT" fo:font-weight="bold" fo:background-color="#ffff00" loext:char-shading-value="0" style:font-weight-asian="bold" style:font-weight-complex="bold"/>
    </style:style>
    <style:style style:name="T4" style:family="text">
      <style:text-properties fo:language="it" fo:country="IT" fo:font-weight="bold" fo:background-color="transparent" loext:char-shading-value="0" style:font-weight-asian="bold" style:font-weight-complex="bold"/>
    </style:style>
    <style:style style:name="T5" style:family="text">
      <style:text-properties fo:language="it" fo:country="IT" style:language-asian="en" style:country-asian="US"/>
    </style:style>
    <style:style style:name="T6" style:family="text">
      <style:text-properties fo:language="it" fo:country="IT" fo:font-style="italic" style:font-style-asian="italic" style:font-style-complex="italic"/>
    </style:style>
    <style:style style:name="T7" style:family="text">
      <style:text-properties fo:language="it" fo:country="IT" fo:font-style="italic" fo:font-weight="normal" style:font-style-asian="italic" style:font-weight-asian="normal" style:font-style-complex="italic" style:font-weight-complex="normal"/>
    </style:style>
    <style:style style:name="T8" style:family="text">
      <style:text-properties fo:language="it" fo:country="IT" fo:font-style="italic" fo:font-weight="normal" fo:background-color="transparent" loext:char-shading-value="0" style:font-style-asian="italic" style:font-weight-asian="normal" style:font-style-complex="italic" style:font-weight-complex="normal"/>
    </style:style>
    <style:style style:name="T9" style:family="text">
      <style:text-properties fo:language="it" fo:country="IT" fo:font-style="italic" fo:background-color="transparent" loext:char-shading-value="0" style:font-style-asian="italic" style:font-style-complex="italic"/>
    </style:style>
    <style:style style:name="T10" style:family="text">
      <style:text-properties fo:language="it" fo:country="IT" fo:background-color="#ffff00" loext:char-shading-value="0"/>
    </style:style>
    <style:style style:name="T11" style:family="text">
      <style:text-properties fo:language="it" fo:country="IT" fo:font-style="normal" style:font-style-asian="normal" style:font-style-complex="normal"/>
    </style:style>
    <style:style style:name="T12" style:family="text">
      <style:text-properties fo:language="it" fo:country="IT" fo:font-style="normal" fo:font-weight="bold" style:font-style-asian="normal" style:font-weight-asian="bold" style:font-style-complex="normal" style:font-weight-complex="bold"/>
    </style:style>
    <style:style style:name="T13" style:family="text">
      <style:text-properties fo:language="it" fo:country="IT" fo:font-style="normal" fo:font-weight="bold" fo:background-color="transparent" loext:char-shading-value="0" style:font-style-asian="normal" style:font-weight-asian="bold" style:font-style-complex="normal" style:font-weight-complex="bold"/>
    </style:style>
    <style:style style:name="T14" style:family="text">
      <style:text-properties fo:language="it" fo:country="IT" fo:font-style="normal" fo:background-color="transparent" loext:char-shading-value="0" style:font-style-asian="normal" style:font-style-complex="normal"/>
    </style:style>
    <style:style style:name="T15" style:family="text">
      <style:text-properties fo:language="it" fo:country="IT" fo:font-weight="normal" fo:background-color="transparent" loext:char-shading-value="0" style:font-weight-asian="normal" style:font-weight-complex="normal"/>
    </style:style>
    <style:style style:name="T16" style:family="text">
      <style:text-properties fo:language="it" fo:country="IT" fo:font-weight="normal" fo:background-color="transparent" loext:char-shading-value="0" style:font-name-asian="Liberation Serif1" style:font-weight-asian="normal" style:font-name-complex="Liberation Serif1" style:font-weight-complex="normal"/>
    </style:style>
    <style:style style:name="T17" style:family="text">
      <style:text-properties fo:language="it" fo:country="IT" fo:font-weight="normal" fo:background-color="#ffff00" loext:char-shading-value="0" style:font-weight-asian="normal" style:font-weight-complex="normal"/>
    </style:style>
    <style:style style:name="T18" style:family="text">
      <style:text-properties fo:language="it" fo:country="IT" fo:font-weight="normal" style:font-weight-asian="normal" style:font-weight-complex="normal"/>
    </style:style>
    <style:style style:name="T19" style:family="text">
      <style:text-properties fo:language="it" fo:country="IT" fo:font-weight="normal" fo:background-color="#00ffff" loext:char-shading-value="0" style:font-weight-asian="normal" style:font-weight-complex="normal"/>
    </style:style>
    <style:style style:name="T20" style:family="text">
      <style:text-properties fo:language="it" fo:country="IT" fo:background-color="transparent" loext:char-shading-value="0"/>
    </style:style>
    <style:style style:name="T21" style:family="text">
      <style:text-properties fo:language="it" fo:country="IT" style:font-name-asian="NSimSun" style:font-name-complex="Lucida Sans1"/>
    </style:style>
    <style:style style:name="T22" style:family="text">
      <style:text-properties style:use-window-font-color="true" loext:opacity="0%" style:font-name="Arial" fo:font-size="22pt" fo:language="it" fo:country="IT" style:letter-kerning="true" style:font-name-asian="NSimSun" style:font-size-asian="22pt" style:language-asian="zh" style:country-asian="CN" style:font-name-complex="Lucida Sans1" style:font-size-complex="12pt" style:language-complex="hi" style:country-complex="IN"/>
    </style:style>
    <style:style style:name="T23" style:family="text">
      <style:text-properties style:use-window-font-color="true" loext:opacity="0%" style:font-name="Arial" fo:font-size="12pt" fo:language="it" fo:country="IT" style:letter-kerning="true" style:font-name-asian="NSimSun" style:font-size-asian="12pt" style:language-asian="zh" style:country-asian="CN" style:font-name-complex="Lucida Sans1" style:font-size-complex="12pt" style:language-complex="hi" style:country-complex="IN"/>
    </style:style>
    <style:style style:name="T24" style:family="text">
      <style:text-properties style:use-window-font-color="true" loext:opacity="0%" style:font-name="Arial" fo:font-size="12pt" fo:language="it" fo:country="IT" fo:font-weight="normal" style:letter-kerning="true" style:font-name-asian="NSimSun" style:font-size-asian="12pt" style:language-asian="zh" style:country-asian="CN" style:font-weight-asian="normal" style:font-name-complex="Lucida Sans1" style:font-size-complex="12pt" style:language-complex="hi" style:country-complex="IN" style:font-weight-complex="normal"/>
    </style:style>
    <style:style style:name="T25" style:family="text">
      <style:text-properties style:use-window-font-color="true" loext:opacity="0%" style:font-name="Arial" fo:font-size="12pt" fo:language="it" fo:country="IT" fo:font-style="normal"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T26" style:family="text">
      <style:text-properties style:use-window-font-color="true" loext:opacity="0%" style:font-name="Arial" fo:font-size="14pt" fo:language="it" fo:country="IT" fo:font-weight="bold" style:letter-kerning="true" style:font-name-asian="Microsoft YaHei" style:font-size-asian="14pt" style:language-asian="zh" style:country-asian="CN" style:font-weight-asian="bold" style:font-name-complex="Lucida Sans1" style:font-size-complex="14pt" style:language-complex="hi" style:country-complex="IN" style:font-weight-complex="bold"/>
    </style:style>
    <style:style style:name="T27" style:family="text">
      <style:text-properties style:use-window-font-color="true" loext:opacity="0%" style:font-name="Arial" fo:font-size="20pt" fo:language="it" fo:country="IT" fo:font-weight="bold" style:letter-kerning="true" style:font-name-asian="NSimSun" style:font-size-asian="20pt" style:language-asian="en" style:country-asian="US" style:font-weight-asian="bold" style:font-name-complex="Arial1" style:font-size-complex="12pt" style:language-complex="hi" style:country-complex="IN" style:font-weight-complex="bold"/>
    </style:style>
    <style:style style:name="T28" style:family="text">
      <style:text-properties style:use-window-font-color="true" loext:opacity="0%" fo:font-size="12pt" fo:language="it" fo:country="IT" style:letter-kerning="true" style:font-name-asian="NSimSun" style:font-size-asian="12pt" style:language-asian="en" style:country-asian="US" style:font-name-complex="Lucida Sans1" style:font-size-complex="12pt" style:language-complex="hi" style:country-complex="IN"/>
    </style:style>
    <style:style style:name="T29" style:family="text">
      <style:text-properties style:use-window-font-color="true" loext:opacity="0%" fo:font-size="12pt" fo:language="it" fo:country="IT" style:letter-kerning="true" style:font-name-asian="NSimSun" style:font-size-asian="12pt" style:language-asian="zh" style:country-asian="CN" style:font-name-complex="Lucida Sans1" style:font-size-complex="12pt" style:language-complex="hi" style:country-complex="IN"/>
    </style:style>
    <style:style style:name="T30" style:family="text">
      <style:text-properties style:use-window-font-color="true" loext:opacity="0%" fo:font-size="12pt" fo:language="it" fo:country="IT" fo:font-weight="bold" style:letter-kerning="true" style:font-name-asian="NSimSun" style:font-size-asian="12pt" style:language-asian="zh" style:country-asian="CN" style:font-weight-asian="bold" style:font-name-complex="Lucida Sans1" style:font-size-complex="12pt" style:language-complex="hi" style:country-complex="IN" style:font-weight-complex="bold"/>
    </style:style>
    <style:style style:name="T31" style:family="text">
      <style:text-properties style:use-window-font-color="true" loext:opacity="0%" fo:font-size="12pt" fo:language="it" fo:country="IT" fo:font-style="italic" style:letter-kerning="true" style:font-name-asian="NSimSun" style:font-size-asian="12pt" style:language-asian="zh" style:country-asian="CN" style:font-style-asian="italic" style:font-name-complex="Lucida Sans1" style:font-size-complex="12pt" style:language-complex="hi" style:country-complex="IN" style:font-style-complex="italic"/>
    </style:style>
    <style:style style:name="T32" style:family="text">
      <style:text-properties style:use-window-font-color="true" loext:opacity="0%" fo:font-size="12pt" fo:language="it" fo:country="IT" fo:font-style="italic" fo:text-shadow="1pt 1pt" style:letter-kerning="true" style:font-name-asian="NSimSun" style:font-size-asian="12pt" style:language-asian="zh" style:country-asian="CN" style:font-style-asian="italic" style:font-name-complex="Lucida Sans1" style:font-size-complex="12pt" style:language-complex="hi" style:country-complex="IN" style:font-style-complex="italic"/>
    </style:style>
    <style:style style:name="T33" style:family="text">
      <style:text-properties style:use-window-font-color="true" loext:opacity="0%" fo:font-size="12pt" fo:language="it" fo:country="IT" fo:font-style="normal"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T34" style:family="text">
      <style:text-properties style:use-window-font-color="true" loext:opacity="0%" fo:font-size="12pt" fo:language="it" fo:country="IT" fo:font-style="normal" fo:font-weight="bold" style:letter-kerning="true" style:font-name-asian="NSimSun" style:font-size-asian="12pt" style:language-asian="zh" style:country-asian="CN" style:font-style-asian="normal" style:font-weight-asian="bold" style:font-name-complex="Lucida Sans1" style:font-size-complex="12pt" style:language-complex="hi" style:country-complex="IN" style:font-style-complex="normal" style:font-weight-complex="bold"/>
    </style:style>
    <style:style style:name="T35" style:family="text">
      <style:text-properties style:use-window-font-color="true" loext:opacity="0%" fo:font-size="12pt" fo:language="it" fo:country="IT" fo:font-style="normal" fo:font-weight="normal" style:letter-kerning="true" style:font-name-asian="NSimSun" style:font-size-asian="12pt" style:language-asian="zh" style:country-asian="CN" style:font-style-asian="normal" style:font-weight-asian="normal" style:font-name-complex="Lucida Sans1" style:font-size-complex="12pt" style:language-complex="hi" style:country-complex="IN" style:font-style-complex="normal" style:font-weight-complex="normal"/>
    </style:style>
    <style:style style:name="T36" style:family="text">
      <style:text-properties style:use-window-font-color="true" loext:opacity="0%" fo:font-size="12pt" fo:language="it" fo:country="IT" fo:font-style="normal" style:text-underline-style="solid" style:text-underline-width="auto" style:text-underline-color="font-color"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T37" style:family="text">
      <style:text-properties style:use-window-font-color="true" loext:opacity="0%" fo:font-size="12pt" fo:font-style="normal"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T38" style:family="text">
      <style:text-properties style:use-window-font-color="true" loext:opacity="0%" fo:font-size="14pt" fo:language="it" fo:country="IT" fo:font-weight="bold" style:letter-kerning="true" style:font-name-asian="Microsoft YaHei" style:font-size-asian="14pt" style:language-asian="zh" style:country-asian="CN" style:font-weight-asian="bold" style:font-name-complex="Lucida Sans1" style:font-size-complex="14pt" style:language-complex="hi" style:country-complex="IN" style:font-weight-complex="bold"/>
    </style:style>
    <style:style style:name="T39" style:family="text">
      <style:text-properties style:use-window-font-color="true" loext:opacity="0%" style:font-name="Liberation Serif" fo:font-size="12pt" fo:language="it" fo:country="IT" style:letter-kerning="true" style:font-name-asian="NSimSun" style:font-size-asian="12pt" style:language-asian="zh" style:country-asian="CN" style:font-name-complex="Lucida Sans1" style:font-size-complex="12pt" style:language-complex="hi" style:country-complex="IN"/>
    </style:style>
    <style:style style:name="T40" style:family="text">
      <style:text-properties style:use-window-font-color="true" loext:opacity="0%" style:font-name="Liberation Serif" fo:font-size="12pt" fo:language="it" fo:country="IT" fo:font-style="normal" style:letter-kerning="true" style:font-name-asian="NSimSun" style:font-size-asian="12pt" style:language-asian="zh" style:country-asian="CN" style:font-style-asian="normal" style:font-name-complex="Lucida Sans1" style:font-size-complex="12pt" style:language-complex="hi" style:country-complex="IN" style:font-style-complex="normal"/>
    </style:style>
    <style:style style:name="T41" style:family="text">
      <style:text-properties style:use-window-font-color="true" loext:opacity="0%" style:font-name="Liberation Serif" fo:language="it" fo:country="IT"/>
    </style:style>
    <style:style style:name="T42" style:family="text">
      <style:text-properties style:use-window-font-color="true" loext:opacity="0%" style:font-name="Lucida Sans" fo:font-size="12pt" fo:language="it" fo:country="IT" fo:font-style="normal" fo:font-weight="bold" style:letter-kerning="true" style:font-name-asian="NSimSun" style:font-size-asian="12pt" style:language-asian="zh" style:country-asian="CN" style:font-style-asian="normal" style:font-weight-asian="bold" style:font-name-complex="Lucida Sans1" style:font-size-complex="12pt" style:language-complex="hi" style:country-complex="IN" style:font-style-complex="normal" style:font-weight-complex="bold"/>
    </style:style>
    <style:style style:name="T43" style:family="text">
      <style:text-properties style:use-window-font-color="true" loext:opacity="0%" style:font-name="Liberation Sans" fo:font-size="12pt" fo:language="it" fo:country="IT" fo:font-style="normal" fo:font-weight="bold" style:letter-kerning="true" style:font-name-asian="NSimSun" style:font-size-asian="12pt" style:language-asian="zh" style:country-asian="CN" style:font-style-asian="normal" style:font-weight-asian="bold" style:font-name-complex="Lucida Sans1" style:font-size-complex="12pt" style:language-complex="hi" style:country-complex="IN" style:font-style-complex="normal" style:font-weight-complex="bold"/>
    </style:style>
    <style:style style:name="T44" style:family="text">
      <style:text-properties style:use-window-font-color="true" loext:opacity="0%" style:font-name="Liberation Sans" fo:font-size="9pt" fo:language="it" fo:country="IT" fo:font-weight="bold" style:font-size-asian="9pt" style:font-weight-asian="bold" style:font-size-complex="9pt" style:font-weight-complex="bold"/>
    </style:style>
    <style:style style:name="T45" style:family="text">
      <style:text-properties style:use-window-font-color="true" loext:opacity="0%" style:font-name="Liberation Sans" fo:language="it" fo:country="IT" fo:font-style="normal" fo:font-weight="bold" style:letter-kerning="true" style:font-name-asian="NSimSun" style:language-asian="zh" style:country-asian="CN" style:font-style-asian="normal" style:font-weight-asian="bold" style:language-complex="hi" style:country-complex="IN" style:font-style-complex="normal" style:font-weight-complex="bold"/>
    </style:style>
    <style:style style:name="T46" style:family="text">
      <style:text-properties style:use-window-font-color="true" loext:opacity="0%" style:font-name="Source Code Pro" fo:font-size="11pt" fo:language="it" fo:country="IT" fo:font-style="normal" style:letter-kerning="true" style:font-name-asian="NSimSun" style:font-size-asian="11pt" style:language-asian="zh" style:country-asian="CN" style:font-style-asian="normal" style:font-name-complex="Lucida Sans1" style:font-size-complex="11pt" style:language-complex="hi" style:country-complex="IN" style:font-style-complex="normal"/>
    </style:style>
    <style:style style:name="T47" style:family="text">
      <style:text-properties style:use-window-font-color="true" loext:opacity="0%" style:font-name="Consolas" fo:font-size="10.5pt" fo:language="it" fo:country="IT" fo:font-style="normal" style:letter-kerning="true" style:font-name-asian="NSimSun" style:font-size-asian="10.5pt" style:language-asian="zh" style:country-asian="CN" style:font-style-asian="normal" style:font-name-complex="Lucida Sans1" style:font-size-complex="10.5pt" style:language-complex="hi" style:country-complex="IN" style:font-style-complex="normal"/>
    </style:style>
    <style:style style:name="T48" style:family="text">
      <style:text-properties style:use-window-font-color="true" loext:opacity="0%" style:text-position="super 58%" fo:font-size="12pt" fo:language="it" fo:country="IT" fo:font-style="italic" style:letter-kerning="true" style:font-name-asian="NSimSun" style:font-size-asian="12pt" style:language-asian="zh" style:country-asian="CN" style:font-style-asian="italic" style:font-name-complex="Lucida Sans1" style:font-size-complex="12pt" style:language-complex="hi" style:country-complex="IN" style:font-style-complex="italic"/>
    </style:style>
    <style:style style:name="T49" style:family="text">
      <style:text-properties style:use-window-font-color="true" loext:opacity="0%" style:text-position="0% 100%" fo:font-size="12pt" fo:language="it" fo:country="IT" fo:font-style="italic" style:letter-kerning="true" style:font-name-asian="NSimSun" style:font-size-asian="12pt" style:language-asian="zh" style:country-asian="CN" style:font-style-asian="italic" style:font-name-complex="Lucida Sans1" style:font-size-complex="12pt" style:language-complex="hi" style:country-complex="IN" style:font-style-complex="italic"/>
    </style:style>
    <style:style style:name="T50" style:family="text">
      <style:text-properties style:use-window-font-color="true" loext:opacity="0%" style:text-outline="false" style:text-line-through-style="none" style:text-line-through-type="none" style:font-name="Liberation Sans" fo:font-size="12pt" fo:language="it" fo:country="IT" fo:font-style="normal" fo:text-shadow="none" style:text-underline-style="none" fo:font-weight="bold" style:font-size-asian="12pt" style:font-style-asian="normal" style:font-weight-asian="bold" style:font-size-complex="12pt" style:font-style-complex="normal" style:font-weight-complex="bold"/>
    </style:style>
    <style:style style:name="T51" style:family="text">
      <style:text-properties style:use-window-font-color="true" loext:opacity="0%" style:text-outline="false" style:text-line-through-style="none" style:text-line-through-type="none" style:font-name="Liberation Sans" fo:font-size="9pt" fo:language="it" fo:country="IT" fo:font-style="normal" fo:text-shadow="none" style:text-underline-style="none" fo:font-weight="normal" style:font-size-asian="9pt" style:font-style-asian="normal" style:font-weight-asian="normal" style:font-size-complex="9pt" style:font-style-complex="normal" style:font-weight-complex="normal"/>
    </style:style>
    <style:style style:name="T52" style:family="text">
      <style:text-properties style:use-window-font-color="true" loext:opacity="0%" style:text-outline="false" style:text-line-through-style="none" style:text-line-through-type="none" style:font-name="Liberation Sans" fo:font-size="9pt" fo:language="it" fo:country="IT" fo:font-style="normal" fo:text-shadow="none" style:text-underline-style="none" fo:font-weight="bold" style:font-size-asian="9pt" style:font-style-asian="normal" style:font-weight-asian="bold" style:font-size-complex="9pt" style:font-style-complex="normal" style:font-weight-complex="bold"/>
    </style:style>
    <style:style style:name="T53" style:family="text">
      <style:text-properties style:use-window-font-color="true" loext:opacity="0%" style:text-outline="false" style:text-line-through-style="none" style:text-line-through-type="none" style:font-name="Liberation Sans" fo:font-size="9pt" fo:language="it" fo:country="IT" fo:font-style="normal" fo:text-shadow="none" style:text-underline-style="none" fo:font-weight="bold" style:letter-kerning="true" style:font-name-asian="NSimSun" style:font-size-asian="9pt" style:language-asian="zh" style:country-asian="CN" style:font-style-asian="normal" style:font-weight-asian="bold" style:font-name-complex="Lucida Sans1" style:font-size-complex="9pt" style:language-complex="hi" style:country-complex="IN" style:font-style-complex="normal" style:font-weight-complex="bold"/>
    </style:style>
    <style:style style:name="T54" style:family="text">
      <style:text-properties style:use-window-font-color="true" loext:opacity="0%" style:text-outline="false" style:text-line-through-style="none" style:text-line-through-type="none" style:font-name="Calibri" fo:font-size="15pt" fo:language="it" fo:country="IT" fo:font-style="normal" fo:text-shadow="none" style:text-underline-style="none" fo:font-weight="bold" style:font-size-asian="15pt" style:font-style-asian="normal" style:font-weight-asian="bold" style:font-size-complex="15pt" style:font-style-complex="normal" style:font-weight-complex="bold"/>
    </style:style>
    <style:style style:name="T55" style:family="text">
      <style:text-properties style:use-window-font-color="true" loext:opacity="0%" style:text-outline="false" style:text-line-through-style="none" style:text-line-through-type="none" style:font-name="Calibri" fo:font-size="11pt" fo:language="it" fo:country="IT" fo:font-style="normal" fo:text-shadow="none" style:text-underline-style="none" fo:font-weight="bold" style:letter-kerning="true" style:font-name-asian="NSimSun" style:font-size-asian="11pt" style:language-asian="zh" style:country-asian="CN" style:font-style-asian="normal" style:font-weight-asian="bold" style:font-name-complex="Lucida Sans1" style:font-size-complex="12pt" style:language-complex="hi" style:country-complex="IN" style:font-style-complex="normal" style:font-weight-complex="bold"/>
    </style:style>
    <style:style style:name="T56" style:family="text">
      <style:text-properties style:use-window-font-color="true" loext:opacity="0%" style:text-outline="false" style:text-line-through-style="none" style:text-line-through-type="none" style:font-name="Calibri" fo:font-size="11pt" fo:language="it" fo:country="IT" fo:font-style="normal" fo:text-shadow="none" style:text-underline-style="none" fo:font-weight="normal" style:letter-kerning="true" style:font-name-asian="NSimSun" style:font-size-asian="11pt" style:language-asian="zh" style:country-asian="CN" style:font-style-asian="normal" style:font-weight-asian="normal" style:font-name-complex="Lucida Sans1" style:font-size-complex="12pt" style:language-complex="hi" style:country-complex="IN" style:font-style-complex="normal" style:font-weight-complex="normal"/>
    </style:style>
    <style:style style:name="T57" style:family="text">
      <style:text-properties style:use-window-font-color="true" loext:opacity="0%" fo:language="it" fo:country="IT"/>
    </style:style>
    <style:style style:name="T58" style:family="text">
      <style:text-properties style:use-window-font-color="true" loext:opacity="0%" fo:language="it" fo:country="IT" fo:font-weight="bold" style:font-weight-asian="bold" style:font-weight-complex="bold"/>
    </style:style>
    <style:style style:name="T59" style:family="text">
      <style:text-properties style:use-window-font-color="true" loext:opacity="0%" fo:language="it" fo:country="IT" fo:font-style="normal" style:font-style-asian="normal" style:font-style-complex="normal"/>
    </style:style>
    <style:style style:name="T60" style:family="text">
      <style:text-properties style:use-window-font-color="true" loext:opacity="0%" fo:language="it" fo:country="IT" fo:font-style="normal" fo:font-weight="bold" style:font-style-asian="normal" style:font-weight-asian="bold" style:font-style-complex="normal" style:font-weight-complex="bold"/>
    </style:style>
    <style:style style:name="T61" style:family="text">
      <style:text-properties style:use-window-font-color="true" loext:opacity="0%" fo:language="it" fo:country="IT" fo:font-style="italic" style:font-style-asian="italic" style:font-style-complex="italic"/>
    </style:style>
    <style:style style:name="T62" style:family="text">
      <style:text-properties style:use-window-font-color="true" loext:opacity="0%" fo:language="it" fo:country="IT" fo:font-style="italic" fo:font-weight="bold" style:font-style-asian="italic" style:font-weight-asian="bold" style:font-style-complex="italic" style:font-weight-complex="bold"/>
    </style:style>
    <style:style style:name="T63" style:family="text">
      <style:text-properties style:use-window-font-color="true" loext:opacity="0%" fo:language="it" fo:country="IT" fo:font-weight="normal" style:font-weight-asian="normal" style:font-weight-complex="normal"/>
    </style:style>
    <style:style style:name="T64" style:family="text">
      <style:text-properties style:use-window-font-color="true" loext:opacity="0%" style:text-outline="true" fo:language="it" fo:country="IT" fo:font-style="normal" style:font-style-asian="normal" style:font-style-complex="normal"/>
    </style:style>
    <style:style style:name="T65" style:family="text">
      <style:text-properties style:font-name="Arial" fo:font-size="22pt" fo:language="it" fo:country="IT" style:font-size-asian="22pt"/>
    </style:style>
    <style:style style:name="T66" style:family="text">
      <style:text-properties style:font-name="Arial" fo:language="it" fo:country="IT"/>
    </style:style>
    <style:style style:name="T67" style:family="text">
      <style:text-properties style:font-name="Arial" fo:language="it" fo:country="IT" fo:background-color="#bababa" loext:char-shading-value="0"/>
    </style:style>
    <style:style style:name="T68" style:family="text">
      <style:text-properties style:font-name="Arial" fo:language="it" fo:country="IT" fo:font-weight="bold" style:font-weight-asian="bold" style:font-weight-complex="bold"/>
    </style:style>
    <style:style style:name="T69" style:family="text">
      <style:text-properties style:font-name="Arial" fo:language="it" fo:country="IT" fo:font-weight="normal" style:font-weight-asian="normal" style:font-weight-complex="normal"/>
    </style:style>
    <style:style style:name="T70" style:family="text">
      <style:text-properties style:font-name="Arial" fo:language="it" fo:country="IT" style:language-asian="en" style:country-asian="US"/>
    </style:style>
    <style:style style:name="T71" style:family="text">
      <style:text-properties style:font-name="Arial" fo:font-size="20pt" fo:language="it" fo:country="IT" fo:font-weight="bold" style:font-size-asian="20pt" style:font-weight-asian="bold" style:font-size-complex="20pt" style:font-weight-complex="bold"/>
    </style:style>
    <style:style style:name="T72" style:family="text">
      <style:text-properties style:font-name="Arial" fo:font-size="11pt" fo:language="it" fo:country="IT" fo:font-weight="bold" style:font-size-asian="11pt" style:language-asian="en" style:country-asian="US" style:font-weight-asian="bold" style:font-name-complex="Arial1" style:font-weight-complex="bold"/>
    </style:style>
    <style:style style:name="T73" style:family="text">
      <style:text-properties fo:background-color="#bababa" loext:char-shading-value="0"/>
    </style:style>
    <style:style style:name="T74" style:family="text">
      <style:text-properties fo:font-size="12pt" fo:language="it" fo:country="IT" style:font-size-asian="12pt" style:font-size-complex="12pt"/>
    </style:style>
    <style:style style:name="T75" style:family="text">
      <style:text-properties fo:font-size="12pt" fo:language="it" fo:country="IT" fo:font-weight="normal" style:font-size-asian="12pt" style:font-weight-asian="normal" style:font-size-complex="12pt" style:font-weight-complex="normal"/>
    </style:style>
    <style:style style:name="T76" style:family="text">
      <style:text-properties style:font-name="Liberation Serif"/>
    </style:style>
    <style:style style:name="T77" style:family="text">
      <style:text-properties style:font-name="Liberation Serif" fo:language="it" fo:country="IT"/>
    </style:style>
    <style:style style:name="T78" style:family="text">
      <style:text-properties style:font-name="Liberation Serif" fo:language="it" fo:country="IT" style:language-asian="en" style:country-asian="US"/>
    </style:style>
    <style:style style:name="T79" style:family="text">
      <style:text-properties style:font-name="Liberation Serif" fo:language="it" fo:country="IT" fo:font-style="normal" style:font-style-asian="normal" style:font-style-complex="normal"/>
    </style:style>
    <style:style style:name="T80" style:family="text">
      <style:text-properties style:font-name="Liberation Serif" fo:font-style="italic" fo:text-shadow="1pt 1pt" style:font-style-asian="italic" style:font-style-complex="italic"/>
    </style:style>
    <style:style style:name="T81" style:family="text">
      <style:text-properties style:font-name="Liberation Serif" fo:font-style="italic" style:font-style-asian="italic" style:font-style-complex="italic"/>
    </style:style>
    <style:style style:name="T82" style:family="text">
      <style:text-properties style:font-name="Liberation Serif" fo:font-style="normal" style:font-style-asian="normal" style:font-style-complex="normal"/>
    </style:style>
    <style:style style:name="T83" style:family="text">
      <style:text-properties style:font-name="Lucida Sans" fo:font-style="normal" fo:font-weight="bold" style:font-style-asian="normal" style:font-weight-asian="bold" style:font-style-complex="normal" style:font-weight-complex="bold"/>
    </style:style>
    <style:style style:name="T84" style:family="text">
      <style:text-properties fo:font-style="normal" style:font-style-asian="normal" style:font-style-complex="normal"/>
    </style:style>
    <style:style style:name="T85" style:family="text">
      <style:text-properties fo:font-weight="bold" style:font-weight-asian="bold" style:font-weight-complex="bold"/>
    </style:style>
    <style:style style:name="T86" style:family="text">
      <style:text-properties fo:color="#000000" loext:opacity="100%"/>
    </style:style>
    <style:style style:name="T87" style:family="text">
      <style:text-properties fo:color="#000000" loext:opacity="100%" style:font-name="Liberation Sans" fo:language="it" fo:country="IT" fo:font-style="normal" fo:font-weight="bold" style:font-style-asian="normal" style:font-weight-asian="bold" style:font-style-complex="normal" style:font-weight-complex="bold"/>
    </style:style>
    <style:style style:name="T88" style:family="text">
      <style:text-properties fo:color="#000000" loext:opacity="100%" style:font-name="Liberation Sans" fo:font-size="12pt" fo:language="it" fo:country="IT" fo:font-style="normal" fo:font-weight="bold" style:letter-kerning="true" style:font-name-asian="NSimSun" style:font-size-asian="12pt" style:language-asian="zh" style:country-asian="CN" style:font-style-asian="normal" style:font-weight-asian="bold" style:font-name-complex="Lucida Sans1" style:font-size-complex="12pt" style:language-complex="hi" style:country-complex="IN" style:font-style-complex="normal" style:font-weight-complex="bold"/>
    </style:style>
    <style:style style:name="T89" style:family="text">
      <style:text-properties fo:color="#000000" loext:opacity="100%" style:font-name="Liberation Sans" fo:font-style="normal" fo:font-weight="bold" style:font-style-asian="normal" style:font-weight-asian="bold" style:font-style-complex="normal" style:font-weight-complex="bold"/>
    </style:style>
    <style:style style:name="T90" style:family="text">
      <style:text-properties fo:color="#000000" loext:opacity="100%" fo:font-size="12pt" fo:language="it" fo:country="IT" style:letter-kerning="true" fo:background-color="transparent" loext:char-shading-value="0" style:font-name-asian="NSimSun" style:font-size-asian="12pt" style:language-asian="zh" style:country-asian="CN" style:font-name-complex="Lucida Sans1" style:font-size-complex="12pt" style:language-complex="hi" style:country-complex="IN"/>
    </style:style>
    <style:style style:name="T91" style:family="text">
      <style:text-properties fo:color="#000000" loext:opacity="100%" fo:font-size="12pt" fo:language="it" fo:country="IT" style:letter-kerning="true" fo:background-color="#ffff00" loext:char-shading-value="0" style:font-name-asian="NSimSun" style:font-size-asian="12pt" style:language-asian="zh" style:country-asian="CN" style:font-name-complex="Lucida Sans1" style:font-size-complex="12pt" style:language-complex="hi" style:country-complex="IN"/>
    </style:style>
    <style:style style:name="T92" style:family="text">
      <style:text-properties fo:color="#000000" loext:opacity="100%" fo:font-size="12pt" fo:language="it" fo:country="IT" fo:font-weight="bold" style:letter-kerning="true" fo:background-color="transparent" loext:char-shading-value="0" style:font-name-asian="NSimSun" style:font-size-asian="12pt" style:language-asian="zh" style:country-asian="CN" style:font-weight-asian="bold" style:font-name-complex="Lucida Sans1" style:font-size-complex="12pt" style:language-complex="hi" style:country-complex="IN" style:font-weight-complex="bold"/>
    </style:style>
    <style:style style:name="T93" style:family="text">
      <style:text-properties fo:color="#000000" loext:opacity="100%" fo:font-size="12pt" fo:language="it" fo:country="IT" fo:font-style="normal" style:letter-kerning="true" fo:background-color="transparent" loext:char-shading-value="0" style:font-name-asian="NSimSun" style:font-size-asian="12pt" style:language-asian="zh" style:country-asian="CN" style:font-style-asian="normal" style:font-name-complex="Lucida Sans1" style:font-size-complex="12pt" style:language-complex="hi" style:country-complex="IN" style:font-style-complex="normal"/>
    </style:style>
    <style:style style:name="T94" style:family="text">
      <style:text-properties fo:color="#000000" loext:opacity="100%" fo:font-size="12pt" fo:language="it" fo:country="IT" fo:font-style="normal" style:letter-kerning="true" fo:background-color="#ffff00" loext:char-shading-value="0" style:font-name-asian="NSimSun" style:font-size-asian="12pt" style:language-asian="zh" style:country-asian="CN" style:font-style-asian="normal" style:font-name-complex="Lucida Sans1" style:font-size-complex="12pt" style:language-complex="hi" style:country-complex="IN" style:font-style-complex="normal"/>
    </style:style>
    <style:style style:name="T95" style:family="text">
      <style:text-properties fo:color="#000000" loext:opacity="100%" style:font-name="Lucida Sans" fo:language="it" fo:country="IT" fo:font-style="normal" fo:font-weight="bold" style:font-style-asian="normal" style:font-weight-asian="bold" style:font-style-complex="normal" style:font-weight-complex="bold"/>
    </style:style>
    <style:style style:name="T96" style:family="text">
      <style:text-properties fo:color="#000000" loext:opacity="100%" style:font-name="Lucida Sans" fo:font-size="12pt" fo:language="it" fo:country="IT" fo:font-style="normal" fo:font-weight="bold" style:letter-kerning="true" style:font-name-asian="NSimSun" style:font-size-asian="12pt" style:language-asian="zh" style:country-asian="CN" style:font-style-asian="normal" style:font-weight-asian="bold" style:font-name-complex="Lucida Sans1" style:font-size-complex="12pt" style:language-complex="hi" style:country-complex="IN" style:font-style-complex="normal" style:font-weight-complex="bold"/>
    </style:style>
    <style:style style:name="T97" style:family="text">
      <style:text-properties fo:color="#000000" loext:opacity="100%" style:font-name="Lucida Sans" fo:font-size="12pt" fo:language="it" fo:country="IT" fo:font-style="normal" fo:font-weight="bold" style:letter-kerning="true" fo:background-color="#ffff00" loext:char-shading-value="0" style:font-name-asian="NSimSun" style:font-size-asian="12pt" style:language-asian="zh" style:country-asian="CN" style:font-style-asian="normal" style:font-weight-asian="bold" style:font-name-complex="Lucida Sans1" style:font-size-complex="12pt" style:language-complex="hi" style:country-complex="IN" style:font-style-complex="normal" style:font-weight-complex="bold"/>
    </style:style>
    <style:style style:name="T98" style:family="text">
      <style:text-properties fo:color="#000000" loext:opacity="100%" style:font-name="Lucida Sans" fo:font-size="12pt" fo:language="it" fo:country="IT" fo:font-style="italic" fo:font-weight="bold" style:letter-kerning="true" style:font-name-asian="NSimSun" style:font-size-asian="12pt" style:language-asian="zh" style:country-asian="CN" style:font-style-asian="italic" style:font-weight-asian="bold" style:font-name-complex="Lucida Sans1" style:font-size-complex="12pt" style:language-complex="hi" style:country-complex="IN" style:font-style-complex="italic" style:font-weight-complex="bold"/>
    </style:style>
    <style:style style:name="T99" style:family="text">
      <style:text-properties fo:color="#000000" loext:opacity="100%" style:text-outline="false" style:text-line-through-style="none" style:text-line-through-type="none" style:font-name="Liberation Sans" fo:font-size="12pt" fo:language="it" fo:country="IT" fo:font-style="normal" fo:text-shadow="none" style:text-underline-style="none" fo:font-weight="bold" style:font-size-asian="12pt" style:font-style-asian="normal" style:font-weight-asian="bold" style:font-size-complex="12pt" style:font-style-complex="normal" style:font-weight-complex="bold"/>
    </style:style>
    <style:style style:name="T100" style:family="text">
      <style:text-properties fo:color="#000000" loext:opacity="100%" style:text-outline="false" style:text-line-through-style="none" style:text-line-through-type="none" style:font-name="Liberation Sans" fo:font-size="12pt" fo:language="it" fo:country="IT" fo:font-style="normal" fo:text-shadow="none" style:text-underline-style="none" fo:font-weight="bold" style:letter-kerning="true" style:font-name-asian="NSimSun" style:font-size-asian="12pt" style:language-asian="zh" style:country-asian="CN" style:font-style-asian="normal" style:font-weight-asian="bold" style:font-name-complex="Lucida Sans1" style:font-size-complex="12pt" style:language-complex="hi" style:country-complex="IN" style:font-style-complex="normal" style:font-weight-complex="bold"/>
    </style:style>
    <style:style style:name="T101" style:family="text">
      <style:text-properties fo:color="#000000" loext:opacity="100%" style:text-outline="false" style:text-line-through-style="none" style:text-line-through-type="none" style:font-name="Liberation Sans"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style>
    <style:style style:name="T102" style:family="text">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03" style:family="text">
      <style:text-properties fo:color="#000000" loext:opacity="100%" style:text-outline="false" style:text-line-through-style="none" style:text-line-through-type="none" style:font-name="Liberation Sans" fo:font-size="9pt" fo:language="it" fo:country="IT" fo:font-style="normal" fo:text-shadow="none" style:text-underline-style="none" fo:font-weight="normal" style:font-size-asian="9pt" style:font-style-asian="normal" style:font-weight-asian="normal" style:font-size-complex="9pt" style:font-style-complex="normal" style:font-weight-complex="normal"/>
    </style:style>
    <style:style style:name="T104" style:family="text">
      <style:text-properties fo:color="#000000" loext:opacity="100%" style:text-outline="false" style:text-line-through-style="none" style:text-line-through-type="none" style:font-name="Liberation Sans" fo:font-size="9pt" fo:language="it" fo:country="IT" fo:font-style="normal" fo:text-shadow="none" style:text-underline-style="none" fo:font-weight="bold" style:font-size-asian="9pt" style:font-style-asian="normal" style:font-weight-asian="bold" style:font-size-complex="9pt" style:font-style-complex="normal" style:font-weight-complex="bold"/>
    </style:style>
    <style:style style:name="T105" style:family="text">
      <style:text-properties fo:color="#000000" loext:opacity="100%" style:text-outline="false" style:text-line-through-style="none" style:text-line-through-type="none" style:font-name="Liberation Sans" fo:font-size="10pt" fo:language="it" fo:country="IT" fo:font-style="normal" fo:text-shadow="none" style:text-underline-style="none" fo:font-weight="bold" style:font-size-asian="10pt" style:font-style-asian="normal" style:font-weight-asian="bold" style:font-size-complex="12pt" style:font-style-complex="normal" style:font-weight-complex="bold"/>
    </style:style>
    <style:style style:name="T106" style:family="text">
      <style:text-properties fo:color="#000000" loext:opacity="100%" style:text-outline="false" style:text-line-through-style="none" style:text-line-through-type="none" style:font-name="Liberation Sans" fo:font-size="10pt" fo:language="it" fo:country="IT" fo:font-style="normal" fo:text-shadow="none" style:text-underline-style="none" fo:font-weight="bold" style:letter-kerning="true" style:font-name-asian="NSimSun" style:font-size-asian="10pt" style:language-asian="zh" style:country-asian="CN" style:font-style-asian="normal" style:font-weight-asian="bold" style:font-name-complex="Lucida Sans1" style:font-size-complex="12pt" style:language-complex="hi" style:country-complex="IN" style:font-style-complex="normal" style:font-weight-complex="bold"/>
    </style:style>
    <style:style style:name="T107" style:family="text">
      <style:text-properties fo:color="#000000" loext:opacity="100%" style:text-outline="false" style:text-line-through-style="none" style:text-line-through-type="none" style:font-name="Ubuntu Mono"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style>
    <style:style style:name="T108" style:family="text">
      <style:text-properties fo:color="#000000" loext:opacity="100%" style:text-outline="false" style:text-line-through-style="none" style:text-line-through-type="none" style:font-name="Ubuntu Mono" fo:font-size="12pt" fo:language="it" fo:country="IT" fo:font-style="normal" fo:text-shadow="none" style:text-underline-style="none" fo:font-weight="normal" fo:background-color="#ffff00" loext:char-shading-value="0" style:font-size-asian="12pt" style:font-style-asian="normal" style:font-weight-asian="normal" style:font-size-complex="12pt" style:font-style-complex="normal" style:font-weight-complex="normal"/>
    </style:style>
    <style:style style:name="T109" style:family="text">
      <style:text-properties fo:color="#000000" loext:opacity="100%" style:text-outline="false" style:text-line-through-style="none" style:text-line-through-type="none" style:font-name="Ubuntu Mono" fo:font-size="12pt" fo:language="it" fo:country="IT" fo:font-style="normal" fo:text-shadow="none" style:text-underline-style="none" fo:font-weight="normal" style:letter-kerning="true" style:font-name-asian="NSimSun" style:font-size-asian="12pt" style:language-asian="zh" style:country-asian="CN" style:font-style-asian="normal" style:font-weight-asian="normal" style:font-name-complex="Lucida Sans1" style:font-size-complex="12pt" style:language-complex="hi" style:country-complex="IN" style:font-style-complex="normal" style:font-weight-complex="normal"/>
    </style:style>
    <style:style style:name="T110" style:family="text">
      <style:text-properties fo:color="#000000" loext:opacity="100%" style:text-outline="false" style:text-line-through-style="none" style:text-line-through-type="none" style:font-name="Reem Kufi" fo:font-size="11pt" fo:language="it" fo:country="IT" fo:font-style="normal" fo:text-shadow="none" style:text-underline-style="none" fo:font-weight="normal" style:font-size-asian="11pt" style:font-style-asian="normal" style:font-weight-asian="normal" style:font-size-complex="11pt" style:font-style-complex="normal" style:font-weight-complex="normal"/>
    </style:style>
    <style:style style:name="T111" style:family="text">
      <style:text-properties fo:color="#000000" loext:opacity="100%" style:text-outline="false" style:text-line-through-style="none" style:text-line-through-type="none" style:font-name="Calibri" fo:font-size="11pt" fo:language="it" fo:country="IT" fo:font-style="normal" fo:text-shadow="none" style:text-underline-style="none" fo:font-weight="normal" style:font-size-asian="11pt" style:font-style-asian="normal" style:font-weight-asian="normal" style:font-size-complex="12pt" style:font-style-complex="normal" style:font-weight-complex="normal"/>
    </style:style>
    <style:style style:name="T112" style:family="text">
      <style:text-properties fo:color="#000000" loext:opacity="100%" style:text-outline="false" style:text-line-through-style="none" style:text-line-through-type="none" style:font-name="Calibri" fo:font-size="11pt" fo:language="it" fo:country="IT" fo:font-style="normal" fo:text-shadow="none" style:text-underline-style="none" fo:font-weight="normal" fo:background-color="#ffff00" loext:char-shading-value="0" style:font-size-asian="11pt" style:font-style-asian="normal" style:font-weight-asian="normal" style:font-size-complex="12pt" style:font-style-complex="normal" style:font-weight-complex="normal"/>
    </style:style>
    <style:style style:name="T113" style:family="text">
      <style:text-properties fo:color="#000000" loext:opacity="100%" style:text-outline="false" style:text-line-through-style="none" style:text-line-through-type="none" style:font-name="Calibri" fo:font-size="11pt" fo:language="it" fo:country="IT" fo:font-style="normal" fo:text-shadow="none" style:text-underline-style="none" fo:font-weight="normal" style:letter-kerning="true" fo:background-color="#ff0000" loext:char-shading-value="0" style:font-name-asian="NSimSun" style:font-size-asian="11pt" style:language-asian="zh" style:country-asian="CN" style:font-style-asian="normal" style:font-weight-asian="normal" style:font-name-complex="Lucida Sans1" style:font-size-complex="12pt" style:language-complex="hi" style:country-complex="IN" style:font-style-complex="normal" style:font-weight-complex="normal"/>
    </style:style>
    <style:style style:name="T114" style:family="text">
      <style:text-properties fo:color="#000000" loext:opacity="100%" style:text-outline="false" style:text-line-through-style="none" style:text-line-through-type="none" style:font-name="Calibri" fo:font-size="11pt" fo:language="it" fo:country="IT" fo:font-style="normal" fo:text-shadow="none" style:text-underline-style="none" fo:font-weight="normal" style:letter-kerning="true" style:font-name-asian="NSimSun" style:font-size-asian="11pt" style:language-asian="zh" style:country-asian="CN" style:font-style-asian="normal" style:font-weight-asian="normal" style:font-name-complex="Lucida Sans1" style:font-size-complex="12pt" style:language-complex="hi" style:country-complex="IN" style:font-style-complex="normal" style:font-weight-complex="normal"/>
    </style:style>
    <style:style style:name="T115" style:family="text">
      <style:text-properties fo:color="#000000" loext:opacity="100%" style:text-outline="false" style:text-line-through-style="none" style:text-line-through-type="none" style:font-name="Calibri" fo:font-size="11pt" fo:language="it" fo:country="IT" fo:font-style="normal" fo:text-shadow="none" style:text-underline-style="none" fo:font-weight="normal" style:letter-kerning="true" fo:background-color="#ffff00" loext:char-shading-value="0" style:font-name-asian="NSimSun" style:font-size-asian="11pt" style:language-asian="zh" style:country-asian="CN" style:font-style-asian="normal" style:font-weight-asian="normal" style:font-name-complex="Lucida Sans1" style:font-size-complex="12pt" style:language-complex="hi" style:country-complex="IN" style:font-style-complex="normal" style:font-weight-complex="normal"/>
    </style:style>
    <style:style style:name="T116" style:family="text">
      <style:text-properties fo:color="#000000" loext:opacity="100%" style:text-outline="false" style:text-line-through-style="none" style:text-line-through-type="none" style:font-name="Calibri" fo:font-size="11pt" fo:language="it" fo:country="IT" fo:font-style="normal" fo:text-shadow="none" style:text-underline-style="none" fo:font-weight="normal" fo:background-color="transparent" loext:char-shading-value="0" style:font-size-asian="11pt" style:font-style-asian="normal" style:font-weight-asian="normal" style:font-size-complex="12pt" style:font-style-complex="normal" style:font-weight-complex="normal"/>
    </style:style>
    <style:style style:name="T117" style:family="text">
      <style:text-properties fo:color="#000000" loext:opacity="100%" style:text-outline="false" style:text-line-through-style="none" style:text-line-through-type="none" style:font-name="Calibri" fo:font-size="11pt" fo:language="it" fo:country="IT" fo:font-style="normal" fo:text-shadow="none" style:text-underline-style="none" fo:font-weight="normal" fo:background-color="#aecf00" loext:char-shading-value="0" style:font-size-asian="11pt" style:font-style-asian="normal" style:font-weight-asian="normal" style:font-size-complex="12pt" style:font-style-complex="normal" style:font-weight-complex="normal"/>
    </style:style>
    <style:style style:name="T118" style:family="text">
      <style:text-properties fo:color="#000000" loext:opacity="100%" style:text-outline="false" style:text-line-through-style="none" style:text-line-through-type="none" style:font-name="Bahnschrift Light" fo:font-size="10pt" fo:language="it" fo:country="IT" fo:font-style="normal" fo:text-shadow="none" style:text-underline-style="none" fo:font-weight="normal" style:font-size-asian="10pt" style:font-style-asian="normal" style:font-weight-asian="normal" style:font-size-complex="12pt" style:font-style-complex="normal" style:font-weight-complex="normal"/>
    </style:style>
    <style:style style:name="T119" style:family="text">
      <style:text-properties fo:color="#000000" loext:opacity="100%" style:text-outline="false" style:text-line-through-style="none" style:text-line-through-type="none" style:font-name="Bahnschrift Light" fo:font-size="10pt" fo:language="it" fo:country="IT" fo:font-style="normal" fo:text-shadow="none" style:text-underline-style="none" fo:font-weight="normal" style:letter-kerning="true" style:font-name-asian="NSimSun" style:font-size-asian="10pt" style:language-asian="zh" style:country-asian="CN" style:font-style-asian="normal" style:font-weight-asian="normal" style:font-name-complex="Lucida Sans1" style:font-size-complex="12pt" style:language-complex="hi" style:country-complex="IN" style:font-style-complex="normal" style:font-weight-complex="normal"/>
    </style:style>
    <style:style style:name="T120" style:family="text">
      <style:text-properties fo:color="#000000" loext:opacity="100%" style:text-outline="false" style:text-line-through-style="none" style:text-line-through-type="none" style:font-name="Bahnschrift Light" fo:font-size="8.5pt" fo:language="it" fo:country="IT" fo:font-style="normal" fo:text-shadow="none" style:text-underline-style="none" fo:font-weight="normal" style:font-size-asian="8.5pt" style:font-style-asian="normal" style:font-weight-asian="normal" style:font-size-complex="12pt" style:font-style-complex="normal" style:font-weight-complex="normal"/>
    </style:style>
    <style:style style:name="T121" style:family="text">
      <style:text-properties fo:color="#000000" loext:opacity="100%" style:text-outline="false" style:text-line-through-style="none" style:text-line-through-type="none" style:font-name="Bahnschrift Light" fo:font-size="8.5pt" fo:language="it" fo:country="IT" fo:font-style="normal" fo:text-shadow="none" style:text-underline-style="none" fo:font-weight="normal" style:letter-kerning="true" style:font-name-asian="NSimSun" style:font-size-asian="8.5pt" style:language-asian="zh" style:country-asian="CN" style:font-style-asian="normal" style:font-weight-asian="normal" style:font-name-complex="Lucida Sans1" style:font-size-complex="10.5pt" style:language-complex="hi" style:country-complex="IN" style:font-style-complex="normal" style:font-weight-complex="normal"/>
    </style:style>
    <style:style style:name="T122" style:family="text">
      <style:text-properties fo:color="#000000" loext:opacity="100%" style:text-outline="false" style:text-line-through-style="none" style:text-line-through-type="none" style:font-name="Bahnschrift Light" fo:font-size="8.5pt" fo:language="it" fo:country="IT" fo:font-style="normal" fo:text-shadow="none" style:text-underline-style="none" fo:font-weight="normal" style:letter-kerning="true" style:font-name-asian="NSimSun" style:font-size-asian="8.5pt" style:language-asian="zh" style:country-asian="CN" style:font-style-asian="normal" style:font-weight-asian="normal" style:font-name-complex="Lucida Sans1" style:font-size-complex="12pt" style:language-complex="hi" style:country-complex="IN" style:font-style-complex="normal" style:font-weight-complex="normal"/>
    </style:style>
    <style:style style:name="T123" style:family="text">
      <style:text-properties fo:color="#000000" loext:opacity="100%" style:text-outline="false" style:text-line-through-style="none" style:text-line-through-type="none" style:font-name="Bahnschrift Light" fo:font-size="6pt" fo:language="it" fo:country="IT" fo:font-style="normal" fo:text-shadow="none" style:text-underline-style="none" fo:font-weight="normal" style:font-size-asian="6pt" style:font-style-asian="normal" style:font-weight-asian="normal" style:font-size-complex="12pt" style:font-style-complex="normal" style:font-weight-complex="normal"/>
    </style:style>
    <style:style style:name="T124" style:family="text">
      <style:text-properties fo:color="#000000" loext:opacity="100%" style:text-outline="false" style:text-line-through-style="none" style:text-line-through-type="none" style:font-name="Bahnschrift Light"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style>
    <style:style style:name="T125" style:family="text">
      <style:text-properties fo:color="#000000" loext:opacity="100%" style:text-outline="false" style:text-line-through-style="none" style:text-line-through-type="none" style:font-name="Bahnschrift Light" fo:font-size="10.5pt" fo:language="it" fo:country="IT" fo:font-style="normal" fo:text-shadow="none" style:text-underline-style="none" fo:font-weight="normal" style:font-size-asian="10.5pt" style:font-style-asian="normal" style:font-weight-asian="normal" style:font-size-complex="10.5pt" style:font-style-complex="normal" style:font-weight-complex="normal"/>
    </style:style>
    <style:style style:name="T126" style:family="text">
      <style:text-properties fo:color="#000000" loext:opacity="100%" style:text-outline="false" style:text-line-through-style="none" style:text-line-through-type="none" style:font-name="Bahnschrift Light" fo:font-size="8pt" fo:language="it" fo:country="IT" fo:font-style="normal" fo:text-shadow="none" style:text-underline-style="none" fo:font-weight="normal" style:letter-kerning="true" style:font-name-asian="NSimSun" style:font-size-asian="8pt" style:language-asian="zh" style:country-asian="CN" style:font-style-asian="normal" style:font-weight-asian="normal" style:font-name-complex="Lucida Sans1" style:font-size-complex="8pt" style:language-complex="hi" style:country-complex="IN" style:font-style-complex="normal" style:font-weight-complex="normal"/>
    </style:style>
    <style:style style:name="T127" style:family="text">
      <style:text-properties fo:color="#000000" loext:opacity="100%" style:text-outline="false" style:text-line-through-style="none" style:text-line-through-type="none" style:font-name="Bahnschrift" fo:font-size="10pt" fo:language="it" fo:country="IT" fo:font-style="normal" fo:text-shadow="none" style:text-underline-style="none" fo:font-weight="bold" style:font-size-asian="10pt" style:font-style-asian="normal" style:font-weight-asian="bold" style:font-size-complex="12pt" style:font-style-complex="normal" style:font-weight-complex="bold"/>
    </style:style>
    <style:style style:name="T128" style:family="text">
      <style:text-properties fo:color="#000000" loext:opacity="100%" style:text-outline="false" style:text-line-through-style="none" style:text-line-through-type="none" style:font-name="Bahnschrift" fo:font-size="10pt" fo:language="it" fo:country="IT" fo:font-style="normal" fo:text-shadow="none" style:text-underline-style="none" fo:font-weight="bold" style:letter-kerning="true" style:font-name-asian="NSimSun" style:font-size-asian="10pt" style:language-asian="zh" style:country-asian="CN" style:font-style-asian="normal" style:font-weight-asian="bold" style:font-name-complex="Lucida Sans1" style:font-size-complex="12pt" style:language-complex="hi" style:country-complex="IN" style:font-style-complex="normal" style:font-weight-complex="bold"/>
    </style:style>
    <style:style style:name="T129" style:family="text">
      <style:text-properties fo:color="#000000" loext:opacity="100%" style:text-outline="false" style:text-line-through-style="none" style:text-line-through-type="none" style:font-name="Bahnschrift" fo:font-size="10pt" fo:language="it" fo:country="IT" fo:font-style="normal" fo:text-shadow="none" style:text-underline-style="none" fo:font-weight="normal" style:font-size-asian="10pt" style:font-style-asian="normal" style:font-weight-asian="normal" style:font-size-complex="12pt" style:font-style-complex="normal" style:font-weight-complex="normal"/>
    </style:style>
    <style:style style:name="T130" style:family="text">
      <style:text-properties fo:color="#000000" loext:opacity="100%" style:text-outline="false" style:text-line-through-style="none" style:text-line-through-type="none" style:font-name="Bahnschrift" fo:font-size="12pt" fo:language="it" fo:country="IT" fo:font-style="normal" fo:text-shadow="none" style:text-underline-style="none" fo:font-weight="normal" style:letter-kerning="true" style:font-name-asian="NSimSun" style:font-size-asian="12pt" style:language-asian="zh" style:country-asian="CN" style:font-style-asian="normal" style:font-weight-asian="normal" style:font-name-complex="Lucida Sans1" style:font-size-complex="12pt" style:language-complex="hi" style:country-complex="IN" style:font-style-complex="normal" style:font-weight-complex="normal"/>
    </style:style>
    <style:style style:name="T131" style:family="text">
      <style:text-properties fo:color="#000000" loext:opacity="100%" style:text-outline="false" style:text-line-through-style="none" style:text-line-through-type="none" style:font-name="Bahnschrift"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style>
    <style:style style:name="T132" style:family="text">
      <style:text-properties fo:color="#000000" loext:opacity="100%" style:text-outline="false" style:text-line-through-style="none" style:text-line-through-type="none" style:font-name="Liberation Serif" fo:font-size="12pt" fo:language="it" fo:country="IT" fo:font-style="normal" fo:text-shadow="none" style:text-underline-style="none" fo:font-weight="normal" style:letter-kerning="true" style:font-name-asian="NSimSun" style:font-size-asian="12pt" style:language-asian="zh" style:country-asian="CN" style:font-style-asian="normal" style:font-weight-asian="normal" style:font-name-complex="Lucida Sans1" style:font-size-complex="12pt" style:language-complex="hi" style:country-complex="IN" style:font-style-complex="normal" style:font-weight-complex="normal"/>
    </style:style>
    <style:style style:name="T133" style:family="text">
      <style:text-properties fo:color="#000000" loext:opacity="100%" style:text-outline="false" style:text-line-through-style="none" style:text-line-through-type="none" style:font-name="Liberation Serif"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style>
    <style:style style:name="T134" style:family="text">
      <style:text-properties fo:color="#000000" loext:opacity="100%" style:text-outline="false" style:text-line-through-style="none" style:text-line-through-type="none" fo:font-size="12pt" fo:language="it" fo:country="IT" fo:font-style="normal" fo:text-shadow="none" style:text-underline-style="none" fo:font-weight="normal" style:letter-kerning="true" style:font-name-asian="NSimSun" style:font-size-asian="12pt" style:language-asian="zh" style:country-asian="CN" style:font-style-asian="normal" style:font-weight-asian="normal" style:font-name-complex="Lucida Sans1" style:font-size-complex="12pt" style:language-complex="hi" style:country-complex="IN" style:font-style-complex="normal" style:font-weight-complex="normal"/>
    </style:style>
    <style:style style:name="T135" style:family="text">
      <style:text-properties fo:color="#000000" loext:opacity="100%" style:text-outline="false" style:text-line-through-style="none" style:text-line-through-type="none" fo:font-size="12pt" fo:language="it" fo:country="IT" fo:font-style="normal" fo:text-shadow="none" style:text-underline-style="none" fo:font-weight="bold" style:letter-kerning="true" style:font-name-asian="NSimSun" style:font-size-asian="12pt" style:language-asian="zh" style:country-asian="CN" style:font-style-asian="normal" style:font-weight-asian="bold" style:font-name-complex="Lucida Sans1" style:font-size-complex="12pt" style:language-complex="hi" style:country-complex="IN" style:font-style-complex="normal" style:font-weight-complex="bold"/>
    </style:style>
    <style:style style:name="T136" style:family="text">
      <style:text-properties fo:color="#000000" loext:opacity="100%" style:font-name="Consolas" fo:font-size="10.5pt" fo:language="it" fo:country="IT" fo:font-style="normal" style:letter-kerning="true" fo:background-color="#aecf00" loext:char-shading-value="0" style:font-name-asian="NSimSun" style:font-size-asian="10.5pt" style:language-asian="zh" style:country-asian="CN" style:font-style-asian="normal" style:font-name-complex="Lucida Sans1" style:font-size-complex="10.5pt" style:language-complex="hi" style:country-complex="IN" style:font-style-complex="normal"/>
    </style:style>
    <style:style style:name="T137" style:family="text">
      <style:text-properties fo:color="#000000" loext:opacity="100%" style:font-name="Consolas" fo:font-size="10.5pt" fo:language="it" fo:country="IT" fo:font-style="normal" style:letter-kerning="true" fo:background-color="#ffff00" loext:char-shading-value="0" style:font-name-asian="NSimSun" style:font-size-asian="10.5pt" style:language-asian="zh" style:country-asian="CN" style:font-style-asian="normal" style:font-name-complex="Lucida Sans1" style:font-size-complex="10.5pt" style:language-complex="hi" style:country-complex="IN" style:font-style-complex="normal"/>
    </style:style>
    <style:style style:name="T138" style:family="text">
      <style:text-properties fo:color="#000000" loext:opacity="100%" style:font-name="Consolas" fo:font-size="10.5pt" fo:language="it" fo:country="IT" fo:font-style="normal" style:letter-kerning="true" fo:background-color="#ff420e" loext:char-shading-value="0" style:font-name-asian="NSimSun" style:font-size-asian="10.5pt" style:language-asian="zh" style:country-asian="CN" style:font-style-asian="normal" style:font-name-complex="Lucida Sans1" style:font-size-complex="10.5pt" style:language-complex="hi" style:country-complex="IN" style:font-style-complex="normal"/>
    </style:style>
    <style:style style:name="T139" style:family="text">
      <style:text-properties fo:color="#000000" loext:opacity="100%" fo:language="it" fo:country="IT"/>
    </style:style>
    <style:style style:name="T140" style:family="text">
      <style:text-properties fo:color="#000000" loext:opacity="100%" fo:language="it" fo:country="IT" fo:font-weight="normal" fo:background-color="#00ff00" loext:char-shading-value="0" style:font-weight-asian="normal" style:font-weight-complex="normal"/>
    </style:style>
    <style:style style:name="T141" style:family="text">
      <style:text-properties fo:color="#000000" loext:opacity="100%" fo:language="it" fo:country="IT" fo:font-style="normal" fo:background-color="#ffff00" loext:char-shading-value="0" style:font-style-asian="normal" style:font-style-complex="normal"/>
    </style:style>
    <style:style style:name="T142" style:family="text">
      <style:text-properties fo:color="#000000" loext:opacity="100%" style:font-name="DejaVu Sans" fo:font-size="12pt" fo:language="it" fo:country="IT" fo:font-style="italic" fo:font-weight="bold" style:letter-kerning="true" style:font-name-asian="DejaVu Sans1" style:font-size-asian="12pt" style:language-asian="zh" style:country-asian="CN" style:font-style-asian="italic" style:font-weight-asian="bold" style:font-name-complex="DejaVu Sans1" style:font-size-complex="12pt" style:language-complex="hi" style:country-complex="IN" style:font-style-complex="italic" style:font-weight-complex="bold"/>
    </style:style>
    <style:style style:name="T143" style:family="text">
      <style:text-properties fo:color="#000000" loext:opacity="100%" style:font-name="DejaVu Sans" fo:font-size="12pt" fo:language="it" fo:country="IT" fo:font-style="normal" fo:font-weight="bold" style:letter-kerning="true" style:font-name-asian="DejaVu Sans1" style:font-size-asian="12pt" style:language-asian="zh" style:country-asian="CN" style:font-style-asian="normal" style:font-weight-asian="bold" style:font-name-complex="DejaVu Sans1" style:font-size-complex="12pt" style:language-complex="hi" style:country-complex="IN" style:font-style-complex="normal" style:font-weight-complex="bold"/>
    </style:style>
    <style:style style:name="T144" style:family="text">
      <style:text-properties fo:color="#000000" loext:opacity="100%" style:font-name="DejaVu Sans" fo:font-size="12pt" fo:language="it" fo:country="IT" fo:font-style="normal" fo:font-weight="bold" style:letter-kerning="true" fo:background-color="transparent" loext:char-shading-value="0" style:font-name-asian="DejaVu Sans1" style:font-size-asian="12pt" style:language-asian="zh" style:country-asian="CN" style:font-style-asian="normal" style:font-weight-asian="bold" style:font-name-complex="DejaVu Sans1" style:font-size-complex="12pt" style:language-complex="hi" style:country-complex="IN" style:font-style-complex="normal" style:font-weight-complex="bold"/>
    </style:style>
    <style:style style:name="T145" style:family="text">
      <style:text-properties fo:font-style="italic" fo:text-shadow="1pt 1pt" style:font-style-asian="italic" style:font-style-complex="italic"/>
    </style:style>
    <style:style style:name="T146" style:family="text">
      <style:text-properties fo:font-style="italic" style:font-style-asian="italic" style:font-style-complex="italic"/>
    </style:style>
    <style:style style:name="T147" style:family="text">
      <style:text-properties style:font-name="Courier New" fo:language="it" fo:country="IT"/>
    </style:style>
    <style:style style:name="T148" style:family="text">
      <style:text-properties style:font-name="Liberation Sans" fo:font-style="normal" fo:font-weight="bold" style:font-style-asian="normal" style:font-weight-asian="bold" style:font-style-complex="normal" style:font-weight-complex="bold"/>
    </style:style>
    <style:style style:name="T149" style:family="text">
      <style:text-properties style:font-name="Liberation Sans" fo:font-size="9pt" fo:language="it" fo:country="IT" fo:font-weight="bold" style:font-size-asian="9pt" style:font-weight-asian="bold" style:font-size-complex="9pt" style:font-weight-complex="bold"/>
    </style:style>
    <style:style style:name="T150" style:family="text">
      <style:text-properties fo:color="#ffff00" loext:opacity="100%" style:font-name="Calibri" fo:font-size="11pt" fo:language="it" fo:country="IT" fo:font-weight="bold" style:font-size-asian="11pt" style:font-weight-asian="bold" style:font-size-complex="12pt" style:font-style-complex="normal" style:font-weight-complex="bold"/>
    </style:style>
    <style:style style:name="T151" style:family="text">
      <style:text-properties fo:color="#333333" loext:opacity="100%" style:text-outline="false" style:text-line-through-style="none" style:text-line-through-type="none" style:font-name="Calibri" fo:font-size="11pt" fo:language="it" fo:country="IT" fo:font-style="normal" fo:text-shadow="none" style:text-underline-style="none" fo:font-weight="normal" style:font-size-asian="11pt" style:font-style-asian="normal" style:font-weight-asian="normal" style:font-size-complex="12pt" style:font-style-complex="normal" style:font-weight-complex="normal"/>
    </style:style>
    <style:style style:name="T152" style:family="text">
      <style:text-properties fo:color="#333333" loext:opacity="100%" style:font-name="Calibri" fo:font-size="11pt" fo:language="it" fo:country="IT" fo:font-weight="normal" style:font-size-asian="11pt" style:font-weight-asian="normal"/>
    </style:style>
    <style:style style:name="T153" style:family="text">
      <style:text-properties fo:color="#333333" loext:opacity="100%" fo:language="it" fo:country="IT" fo:font-weight="normal" style:font-weight-asian="normal" style:font-weight-complex="normal"/>
    </style:style>
    <style:style style:name="T154" style:family="text">
      <style:text-properties fo:color="#c9211e" loext:opacity="100%" style:font-name="Lucida Sans" fo:font-size="12pt" fo:language="it" fo:country="IT" fo:font-style="normal" style:text-underline-style="solid" style:text-underline-width="auto" style:text-underline-color="font-color" fo:font-weight="bold" style:letter-kerning="true" style:font-name-asian="NSimSun" style:font-size-asian="12pt" style:language-asian="zh" style:country-asian="CN" style:font-style-asian="normal" style:font-weight-asian="bold" style:font-name-complex="Lucida Sans1" style:font-size-complex="12pt" style:language-complex="hi" style:country-complex="IN" style:font-style-complex="normal" style:font-weight-complex="bold"/>
    </style:style>
    <style:style style:name="T155" style:family="text">
      <style:text-properties fo:color="#c9211e" loext:opacity="100%" style:font-name="Lucida Sans" fo:font-size="12pt" fo:language="it" fo:country="IT" fo:font-style="normal" fo:font-weight="bold" style:letter-kerning="true" style:font-name-asian="NSimSun" style:font-size-asian="12pt" style:language-asian="zh" style:country-asian="CN" style:font-style-asian="normal" style:font-weight-asian="bold" style:font-name-complex="Lucida Sans1" style:font-size-complex="12pt" style:language-complex="hi" style:country-complex="IN" style:font-style-complex="normal" style:font-weight-complex="bold"/>
    </style:style>
    <style:style style:name="T156" style:family="text">
      <style:text-properties fo:color="#c9211e" loext:opacity="100%" style:text-outline="false" style:text-line-through-style="none" style:text-line-through-type="none" style:font-name="Bahnschrift Light" fo:font-size="10.5pt" fo:language="it" fo:country="IT" fo:font-style="normal" fo:text-shadow="none" style:text-underline-style="none" fo:font-weight="normal" style:font-size-asian="10.5pt" style:font-style-asian="normal" style:font-weight-asian="normal" style:font-size-complex="10.5pt" style:font-style-complex="normal" style:font-weight-complex="normal"/>
    </style:style>
    <style:style style:name="T157" style:family="text">
      <style:text-properties style:font-name="Source Code Pro" fo:font-size="11pt" fo:font-style="normal" style:font-size-asian="11pt" style:font-style-asian="normal" style:font-size-complex="11pt" style:font-style-complex="normal"/>
    </style:style>
    <style:style style:name="T158" style:family="text">
      <style:text-properties fo:font-size="10.5pt" style:font-size-asian="10.5pt" style:font-size-complex="10.5pt"/>
    </style:style>
    <style:style style:name="T159" style:family="text">
      <style:text-properties style:text-position="42% 100%" fo:font-size="9.5pt" fo:language="it" fo:country="IT" style:font-size-asian="9.5pt"/>
    </style:style>
    <style:style style:name="T160" style:family="text">
      <style:text-properties fo:color="#83caff" loext:opacity="100%" style:text-outline="false" style:text-line-through-style="none" style:text-line-through-type="none" fo:font-size="12pt" fo:language="it" fo:country="IT" fo:font-style="normal" fo:text-shadow="none"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161" style:family="text">
      <style:text-properties fo:color="#fff0f5" loext:opacity="100%" style:text-outline="false" style:text-line-through-style="none" style:text-line-through-type="none" style:font-name="Ubuntu Mono" fo:font-size="12pt" fo:language="it" fo:country="IT" fo:font-style="normal" fo:text-shadow="none" style:text-underline-style="none" fo:font-weight="normal" fo:background-color="#579d1c" loext:char-shading-value="0" style:font-size-asian="12pt" style:font-style-asian="normal" style:font-weight-asian="normal" style:font-size-complex="12pt" style:font-style-complex="normal" style:font-weight-complex="normal"/>
    </style:style>
    <style:style style:name="T162" style:family="text">
      <style:text-properties fo:color="#ffffff" loext:opacity="100%" style:text-outline="false" style:text-line-through-style="none" style:text-line-through-type="none" style:font-name="Liberation Sans" fo:font-size="12pt" fo:language="it" fo:country="IT" fo:font-style="normal" fo:text-shadow="none" style:text-underline-style="none" fo:font-weight="bold" style:font-size-asian="12pt" style:font-style-asian="normal" style:font-weight-asian="bold" style:font-size-complex="12pt" style:font-style-complex="normal" style:font-weight-complex="bold"/>
    </style:style>
    <style:style style:name="T163" style:family="text">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164" style:family="text">
      <style:text-properties fo:color="#ffffff" loext:opacity="100%" style:text-outline="false" style:text-line-through-style="none" style:text-line-through-type="none" fo:font-size="12pt" fo:language="it" fo:country="IT" fo:font-style="normal" fo:text-shadow="none" style:text-underline-style="none" fo:font-weight="bold" style:font-size-asian="12pt" style:font-style-asian="normal" style:font-weight-asian="bold" style:font-size-complex="12pt" style:font-style-complex="normal" style:font-weight-complex="bold"/>
    </style:style>
    <style:style style:name="T165" style:family="text">
      <style:text-properties fo:color="#0084d1" loext:opacity="100%" style:font-name="Lucida Sans" fo:font-size="12pt" fo:language="it" fo:country="IT" fo:font-style="normal" fo:font-weight="bold" style:letter-kerning="true" style:font-name-asian="NSimSun" style:font-size-asian="12pt" style:language-asian="zh" style:country-asian="CN" style:font-style-asian="normal" style:font-weight-asian="bold" style:font-name-complex="Lucida Sans1" style:font-size-complex="12pt" style:language-complex="hi" style:country-complex="IN" style:font-style-complex="normal" style:font-weight-complex="bold"/>
    </style:style>
    <style:style style:name="T166" style:family="text">
      <style:text-properties fo:color="#ff950e" loext:opacity="100%" style:font-name="Lucida Sans" fo:font-size="12pt" fo:language="it" fo:country="IT" fo:font-style="normal" fo:font-weight="bold" style:letter-kerning="true" style:font-name-asian="NSimSun" style:font-size-asian="12pt" style:language-asian="zh" style:country-asian="CN" style:font-style-asian="normal" style:font-weight-asian="bold" style:font-name-complex="Lucida Sans1" style:font-size-complex="12pt" style:language-complex="hi" style:country-complex="IN" style:font-style-complex="normal" style:font-weight-complex="bold"/>
    </style:style>
    <style:style style:name="T167" style:family="text">
      <style:text-properties fo:color="#ffd320" loext:opacity="100%" style:font-name="Lucida Sans" fo:font-size="12pt" fo:language="it" fo:country="IT" fo:font-style="normal" fo:font-weight="bold" style:letter-kerning="true" style:font-name-asian="NSimSun" style:font-size-asian="12pt" style:language-asian="zh" style:country-asian="CN" style:font-style-asian="normal" style:font-weight-asian="bold" style:font-name-complex="Lucida Sans1" style:font-size-complex="12pt" style:language-complex="hi" style:country-complex="IN" style:font-style-complex="normal" style:font-weight-complex="bold"/>
    </style:style>
    <style:style style:name="T168" style:family="text">
      <style:text-properties fo:color="#ffd320" loext:opacity="100%" style:text-outline="false" style:text-line-through-style="none" style:text-line-through-type="none" style:font-name="Bahnschrift"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style>
    <style:style style:name="T169" style:family="text">
      <style:text-properties style:font-name="Calibri" fo:font-size="11pt" fo:language="it" fo:country="IT" style:font-size-asian="11pt"/>
    </style:style>
    <style:style style:name="T170" style:family="text">
      <style:text-properties fo:font-variant="normal" fo:text-transform="none" fo:language="it" fo:country="IT"/>
    </style:style>
    <style:style style:name="T171" style:family="text">
      <style:text-properties fo:font-variant="normal" fo:text-transform="none" fo:language="it" fo:country="IT" fo:font-weight="bold" style:font-weight-asian="bold" style:font-weight-complex="bold"/>
    </style:style>
    <style:style style:name="T172" style:family="text">
      <style:text-properties fo:font-variant="normal" fo:text-transform="none" fo:color="#002e4d" loext:opacity="100%" style:font-name="Montserrat" fo:font-size="10.5pt" fo:letter-spacing="normal" fo:language="it" fo:country="IT" fo:font-style="normal" style:text-underline-style="solid" style:text-underline-width="auto" style:text-underline-color="font-color" fo:font-weight="normal" fo:background-color="#d7d9d9" loext:char-shading-value="0" style:font-size-asian="10.5pt" style:font-style-asian="normal" style:font-weight-asian="normal" style:font-size-complex="10.5pt"/>
    </style:style>
    <style:style style:name="T173" style:family="text">
      <style:text-properties fo:text-transform="uppercase" fo:language="it" fo:country="IT"/>
    </style:style>
    <style:style style:name="T174" style:family="text">
      <style:text-properties style:text-position="sub 58%" fo:language="it" fo:country="IT" fo:font-style="italic" fo:font-weight="normal" fo:background-color="transparent" loext:char-shading-value="0" style:font-style-asian="italic" style:font-weight-asian="normal" style:font-style-complex="italic" style:font-weight-complex="normal"/>
    </style:style>
    <style:style style:name="T175" style:family="text">
      <style:text-properties fo:font-size="10pt" style:font-size-asian="10pt" style:font-size-complex="12pt"/>
    </style:style>
    <style:style style:name="T176" style:family="text">
      <style:text-properties fo:font-size="8.5pt" style:font-size-asian="8.5pt" style:font-size-complex="10.5pt"/>
    </style:style>
    <style:style style:name="T177" style:family="text">
      <style:text-properties fo:color="#004586" loext:opacity="100%" style:text-outline="false" style:text-line-through-style="none" style:text-line-through-type="none" style:font-name="Bahnschrift Light"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style>
    <style:style style:name="T178" style:family="text">
      <style:text-properties fo:color="#004586" loext:opacity="100%" fo:language="it" fo:country="IT" fo:font-weight="bold" style:font-weight-asian="bold" style:font-weight-complex="bold"/>
    </style:style>
    <style:style style:name="T179" style:family="text">
      <style:text-properties fo:background-color="#ffff00" loext:char-shading-value="0"/>
    </style:style>
    <style:style style:name="T180" style:family="text">
      <style:text-properties fo:color="#c5000b" loext:opacity="100%" fo:language="it" fo:country="IT" fo:font-weight="bold" style:font-weight-asian="bold" style:font-weight-complex="bold"/>
    </style:style>
    <style:style style:name="T181" style:family="text">
      <style:text-properties fo:color="#579d1c" loext:opacity="100%" fo:language="it" fo:country="IT" fo:font-weight="bold" style:font-weight-asian="bold" style:font-weight-complex="bold"/>
    </style:style>
    <style:style style:name="T182" style:family="text">
      <style:text-properties style:text-position="super 58%" fo:language="it" fo:country="IT"/>
    </style:style>
    <style:style style:name="T183" style:family="text">
      <style:text-properties fo:background-color="transparent" loext:char-shading-value="0"/>
    </style:style>
    <style:style style:name="T184" style:family="text">
      <style:text-properties style:font-name="Nimbus Mono PS" fo:language="it" fo:country="IT" fo:background-color="transparent" loext:char-shading-value="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46cm, 0cm, 0.46cm, 0cm)"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45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1.36cm, 0cm, 0cm)" draw:luminance="0%" draw:contrast="0%" draw:red="0%" draw:green="0%" draw:blue="0%" draw:gamma="100%" draw:color-inversion="false" draw:image-opacity="100%" draw:color-mode="standard" draw:wrap-influence-on-position="once-concurrent" loext:allow-overlap="true" loext:rel-width-rel="paragraph" loext:decorative="false"/>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6cm, 0.06cm, 0cm, 0.06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1.5pt solid #ff0000" style:mirror="none" fo:clip="rect(-0.026cm, -0.026cm, -0.026cm, -0.026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019cm, 0.019cm, 0c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601cm, 0cm, 0cm, 0cm)" draw:luminance="0%" draw:contrast="0%" draw:red="0%" draw:green="0%" draw:blue="0%" draw:gamma="100%" draw:color-inversion="false" draw:image-opacity="100%" draw:color-mode="standard" loext:decorative="false"/>
    </style:style>
    <style:style style:name="fr1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solid" draw:fill-color="#ffffff" draw:textarea-vertical-align="top" draw:auto-grow-height="false" fo:min-height="5.932cm" fo:min-width="16.829cm" fo:padding-top="0cm" fo:padding-bottom="0cm" fo:padding-left="0cm" fo:padding-right="0cm" fo:wrap-option="wrap" loext:decorative="false" fo:margin-left="0cm" fo:margin-right="0cm" fo:margin-top="0cm" fo:margin-bottom="0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cm" svg:stroke-color="#3465a4" draw:fill="none" loext:fill-use-slide-background="false" draw:textarea-horizontal-align="center" draw:textarea-vertical-align="top" draw:auto-grow-height="false" fo:padding-top="0.125cm" fo:padding-bottom="0.125cm" fo:padding-left="0.25cm" fo:padding-right="0.25cm" fo:wrap-option="wrap" loext:decorative="false" fo:margin-left="0.002cm" fo:margin-right="0.002cm" fo:margin-top="0.002cm" fo:margin-bottom="0.0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solid" draw:fill-color="#ffffff" draw:textarea-vertical-align="top" draw:auto-grow-height="false" fo:min-height="22.752cm" fo:min-width="14.854cm" fo:padding-top="0cm" fo:padding-bottom="0cm" fo:padding-left="0cm" fo:padding-right="0cm" fo:wrap-option="wrap" loext:decorative="fals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cm" draw:fill="solid" draw:fill-color="#ffffff" draw:textarea-vertical-align="top" draw:auto-grow-height="false" fo:min-height="18.309cm" fo:min-width="17.591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5" style:family="graphic" style:parent-style-name="Frame">
      <style:graphic-properties draw:stroke="none" svg:stroke-width="0cm" draw:fill="solid" draw:fill-color="#ffffff" draw:textarea-vertical-align="top" draw:auto-grow-height="false" fo:min-height="7.493cm" fo:min-width="17.016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cm" draw:fill="solid" draw:fill-color="#ffffff" draw:textarea-vertical-align="top" draw:auto-grow-height="false" fo:min-height="7.431cm" fo:min-width="14.399cm" fo:padding-top="0cm" fo:padding-bottom="0cm" fo:padding-left="0cm" fo:padding-right="0cm" fo:wrap-option="wrap" loext:decorative="fals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cm" draw:fill="solid" draw:fill-color="#ffffff" draw:textarea-vertical-align="top" draw:auto-grow-height="false" fo:min-height="11.508cm" fo:min-width="17.288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8" style:family="graphic" style:parent-style-name="Frame">
      <style:graphic-properties draw:stroke="none" svg:stroke-width="0cm" draw:fill="solid" draw:fill-color="#ffffff" draw:textarea-vertical-align="top" draw:auto-grow-height="false" fo:min-height="3.752cm" fo:min-width="11.67cm" fo:padding-top="0cm" fo:padding-bottom="0cm" fo:padding-left="0cm" fo:padding-right="0cm" fo:wrap-option="wrap" loext:decorative="false" fo:margin-left="-0.002cm" fo:margin-right="0.002cm" fo:margin-top="0cm" fo:margin-bottom="0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9" style:family="graphic" style:parent-style-name="Frame">
      <style:graphic-properties draw:stroke="none" svg:stroke-width="0cm" draw:fill="solid" draw:fill-color="#ffffff" draw:textarea-vertical-align="top" draw:auto-grow-height="false" fo:min-height="3.514cm" fo:min-width="12.384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10" style:family="graphic" style:parent-style-name="Frame">
      <style:graphic-properties draw:stroke="none" svg:stroke-width="0cm" draw:fill="solid" draw:fill-color="#ffffff" draw:textarea-vertical-align="top" draw:auto-grow-height="false" fo:min-height="3.567cm" fo:min-width="12.384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11" style:family="graphic" style:parent-style-name="Frame">
      <style:graphic-properties draw:stroke="none" svg:stroke-width="0cm" draw:fill="solid" draw:fill-color="#ffffff" draw:textarea-vertical-align="top" draw:auto-grow-height="false" fo:min-height="10.241cm" fo:min-width="17.591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12" style:family="graphic" style:parent-style-name="Frame">
      <style:graphic-properties draw:stroke="none" svg:stroke-width="0cm" draw:fill="solid" draw:fill-color="#ffffff" draw:textarea-vertical-align="top" draw:auto-grow-height="false" fo:min-height="3.805cm" fo:min-width="12.358cm" fo:padding-top="0cm" fo:padding-bottom="0cm" fo:padding-left="0cm" fo:padding-right="0cm" fo:wrap-option="wrap" loext:decorative="false" fo:margin-left="-0.002cm" fo:margin-right="0.002cm" fo:margin-top="0cm" fo:margin-bottom="0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13" style:family="graphic" style:parent-style-name="Frame">
      <style:graphic-properties draw:stroke="none" svg:stroke-width="0cm" draw:fill="solid" draw:fill-color="#ffffff" draw:textarea-vertical-align="top" draw:auto-grow-height="false" fo:min-height="10.888cm" fo:min-width="17.591cm" fo:padding-top="0cm" fo:padding-bottom="0cm" fo:padding-left="0cm" fo:padding-right="0cm" fo:wrap-option="wrap" loext:decorative="fals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4" style:family="graphic" style:parent-style-name="Frame">
      <style:graphic-properties draw:stroke="none" svg:stroke-width="0cm" draw:fill="solid" draw:fill-color="#ffffff" draw:textarea-vertical-align="top" draw:auto-grow-height="false" fo:min-height="11.523cm" fo:min-width="17.591cm" fo:padding-top="0cm" fo:padding-bottom="0cm" fo:padding-left="0cm" fo:padding-right="0cm" fo:wrap-option="wrap" loext:decorative="fals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5" style:family="graphic" style:parent-style-name="Frame">
      <style:graphic-properties draw:stroke="none" svg:stroke-width="0cm" draw:fill="solid" draw:fill-color="#ffffff" draw:textarea-vertical-align="top" draw:auto-grow-height="false" fo:min-height="6.662cm" fo:min-width="17.591cm" fo:padding-top="0cm" fo:padding-bottom="0cm" fo:padding-left="0cm" fo:padding-right="0cm" fo:wrap-option="wrap" loext:decorative="fals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6" style:family="graphic" style:parent-style-name="Frame">
      <style:graphic-properties draw:stroke="none" svg:stroke-width="0cm" draw:fill="solid" draw:fill-color="#ffffff" draw:textarea-vertical-align="top" draw:auto-grow-height="false" fo:min-height="7.74cm" fo:min-width="17.591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17" style:family="graphic" style:parent-style-name="Frame">
      <style:graphic-properties draw:stroke="none" svg:stroke-width="0cm" draw:fill="solid" draw:fill-color="#ffffff" draw:textarea-vertical-align="top" draw:auto-grow-height="false" fo:min-height="7.385cm" fo:min-width="15.21cm" fo:padding-top="0cm" fo:padding-bottom="0cm" fo:padding-left="0cm" fo:padding-right="0cm" fo:wrap-option="wrap" loext:decorative="false" fo:margin-left="0cm" fo:margin-right="0cm" fo:margin-top="0cm" fo:margin-bottom="0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18" style:family="graphic" style:parent-style-name="Frame">
      <style:graphic-properties draw:stroke="none" svg:stroke-width="0cm" draw:fill="solid" draw:fill-color="#ffffff" draw:textarea-vertical-align="top" draw:auto-grow-height="false" fo:min-height="3.602cm" fo:min-width="12.285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19" style:family="graphic" style:parent-style-name="Frame">
      <style:graphic-properties draw:stroke="none" svg:stroke-width="0cm" draw:fill="solid" draw:fill-color="#ffffff" draw:textarea-vertical-align="top" draw:auto-grow-height="false" fo:min-height="12.831cm" fo:min-width="17.591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20" style:family="graphic" style:parent-style-name="Frame">
      <style:graphic-properties draw:stroke="none" svg:stroke-width="0cm" draw:fill="solid" draw:fill-color="#ffffff" draw:textarea-vertical-align="top" draw:auto-grow-height="false" fo:min-height="16.143cm" fo:min-width="15.616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1" style:family="graphic" style:parent-style-name="Frame">
      <style:graphic-properties draw:stroke="none" svg:stroke-width="0cm" draw:fill="solid" draw:fill-color="#ffffff" draw:textarea-vertical-align="top" draw:auto-grow-height="false" fo:min-height="4.787cm" fo:min-width="11.67cm" fo:padding-top="0cm" fo:padding-bottom="0cm" fo:padding-left="0cm" fo:padding-right="0cm" fo:wrap-option="wrap" loext:decorative="false" fo:margin-left="-0.002cm" fo:margin-right="0.002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22" style:family="graphic" style:parent-style-name="Frame">
      <style:graphic-properties draw:stroke="none" svg:stroke-width="0cm" draw:fill="solid" draw:fill-color="#ffffff" draw:textarea-vertical-align="top" draw:auto-grow-height="false" fo:min-height="7.527cm" fo:min-width="17.591cm" fo:padding-top="0cm" fo:padding-bottom="0cm" fo:padding-left="0cm" fo:padding-right="0cm" fo:wrap-option="wrap" loext:decorative="fals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3" style:family="graphic" style:parent-style-name="Frame">
      <style:graphic-properties draw:stroke="none" svg:stroke-width="0cm" draw:fill="solid" draw:fill-color="#ffffff" draw:textarea-vertical-align="top" draw:auto-grow-height="false" fo:min-height="6.272cm" fo:min-width="16.487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4" style:family="graphic" style:parent-style-name="Frame">
      <style:graphic-properties draw:stroke="none" svg:stroke-width="0cm" draw:fill="solid" draw:fill-color="#ffffff" draw:textarea-vertical-align="top" draw:auto-grow-height="false" fo:min-height="7.721cm" fo:min-width="17.593cm" fo:padding-top="0cm" fo:padding-bottom="0cm" fo:padding-left="0cm" fo:padding-right="0cm" fo:wrap-option="wrap" loext:decorative="false" fo:margin-left="-0.002cm" fo:margin-right="0.002cm" fo:margin-top="0cm" fo:margin-bottom="0cm" style:run-through="foreground" style:wrap="none" style:vertical-pos="from-top" style:vertical-rel="paragraph" style:horizontal-pos="center" style:horizontal-rel="paragraph" draw:wrap-influence-on-position="once-concurrent" loext:allow-overlap="true" style:flow-with-text="false"/>
    </style:style>
    <style:style style:name="gr25" style:family="graphic" style:parent-style-name="Frame">
      <style:graphic-properties draw:stroke="none" svg:stroke-width="0cm" draw:fill="solid" draw:fill-color="#ffffff" draw:textarea-vertical-align="top" draw:auto-grow-height="false" fo:min-height="8.502cm" fo:min-width="9.594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6" style:family="graphic" style:parent-style-name="Frame">
      <style:graphic-properties draw:stroke="none" svg:stroke-width="0cm" draw:fill="solid" draw:fill-color="#ffffff" draw:textarea-vertical-align="top" draw:auto-grow-height="false" fo:min-height="12.73cm" fo:min-width="9.22cm" fo:padding-top="0cm" fo:padding-bottom="0cm" fo:padding-left="0cm" fo:padding-right="0cm" fo:wrap-option="wrap" loext:decorative="false"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27" style:family="graphic" style:parent-style-name="Frame">
      <style:graphic-properties draw:stroke="none" svg:stroke-width="0cm" draw:fill="solid" draw:fill-color="#ffffff" draw:textarea-vertical-align="top" draw:auto-grow-height="false" fo:min-height="22.583cm" fo:min-width="13.945cm" fo:padding-top="0cm" fo:padding-bottom="0cm" fo:padding-left="0cm" fo:padding-right="0cm" fo:wrap-option="wrap" loext:decorative="false" fo:margin-left="-0.002cm" fo:margin-right="0.002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8" style:family="graphic" style:parent-style-name="Frame">
      <style:graphic-properties draw:stroke="none" svg:stroke-width="0cm" draw:fill="solid" draw:fill-color="#ffffff" draw:textarea-vertical-align="top" draw:auto-grow-height="false" fo:min-height="5.749cm" fo:min-width="9.093cm" fo:padding-top="0cm" fo:padding-bottom="0cm" fo:padding-left="0cm" fo:padding-right="0cm" fo:wrap-option="wrap" loext:decorative="false" fo:margin-left="0cm" fo:margin-right="0cm" fo:margin-top="0cm" fo:margin-bottom="0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29" style:family="graphic" style:parent-style-name="Frame">
      <style:graphic-properties draw:stroke="none" svg:stroke-width="0cm" draw:fill="solid" draw:fill-color="#ffffff" draw:textarea-vertical-align="top" draw:auto-grow-height="false" fo:min-height="14.242cm" fo:min-width="15.281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30" style:family="graphic" style:parent-style-name="Frame">
      <style:graphic-properties draw:stroke="none" svg:stroke-width="0cm" draw:fill="solid" draw:fill-color="#ffffff" draw:textarea-vertical-align="top" draw:auto-grow-height="false" fo:min-height="11.926cm" fo:min-width="17.591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31" style:family="graphic" style:parent-style-name="Frame">
      <style:graphic-properties draw:stroke="none" svg:stroke-width="0cm" draw:fill="solid" draw:fill-color="#ffffff" draw:textarea-vertical-align="top" draw:auto-grow-height="false" fo:min-height="11.001cm" fo:min-width="10.633cm" fo:padding-top="0cm" fo:padding-bottom="0cm" fo:padding-left="0cm" fo:padding-right="0cm" fo:wrap-option="wrap" loext:decorative="false" fo:margin-left="-0.002cm" fo:margin-right="0.002cm" fo:margin-top="0cm" fo:margin-bottom="0cm" style:run-through="foreground" style:wrap="none" style:vertical-pos="from-top" style:vertical-rel="paragraph" style:horizontal-pos="center" style:horizontal-rel="paragraph" draw:wrap-influence-on-position="once-concurrent" loext:allow-overlap="true" style:flow-with-text="false"/>
    </style:style>
    <style:style style:name="gr32" style:family="graphic" style:parent-style-name="Frame">
      <style:graphic-properties draw:stroke="none" svg:stroke-width="0cm" draw:fill="solid" draw:fill-color="#ffffff" draw:textarea-vertical-align="top" draw:auto-grow-height="false" fo:min-height="14.594cm" fo:min-width="17.591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33" style:family="graphic" style:parent-style-name="Frame">
      <style:graphic-properties draw:stroke="none" svg:stroke-width="0cm" draw:fill="solid" draw:fill-color="#ffffff" draw:textarea-vertical-align="top" draw:auto-grow-height="false" fo:min-height="13.645cm" fo:min-width="15.716cm" fo:padding-top="0cm" fo:padding-bottom="0cm" fo:padding-left="0cm" fo:padding-right="0cm" fo:wrap-option="wrap" loext:decorative="false" fo:margin-left="-0.002cm" fo:margin-right="0.002cm" fo:margin-top="0cm" fo:margin-bottom="0.002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4" style:family="graphic" style:parent-style-name="Frame">
      <style:graphic-properties draw:stroke="none" svg:stroke-width="0cm" draw:fill="solid" draw:fill-color="#ffffff" draw:textarea-vertical-align="top" draw:auto-grow-height="false" fo:min-height="9.62cm" fo:min-width="14.871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35" style:family="graphic" style:parent-style-name="Frame">
      <style:graphic-properties draw:stroke="none" svg:stroke-width="0cm" draw:fill="solid" draw:fill-color="#ffffff" draw:textarea-vertical-align="top" draw:auto-grow-height="false" fo:min-height="15.556cm" fo:min-width="11.351cm" fo:padding-top="0cm" fo:padding-bottom="0cm" fo:padding-left="0cm" fo:padding-right="0cm" fo:wrap-option="wrap" loext:decorative="false" fo:margin-left="0cm" fo:margin-right="0cm" fo:margin-top="0cm" fo:margin-bottom="0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number:date-style style:name="N10036" number:language="it" number:country="IT"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Tabella"/>
      </text:sequence-decls>
      <text:list xml:id="list3339998633" text:style-name="WWNum3">
        <text:list-item>
          <text:h text:style-name="P40" text:outline-level="1" loext:marker-style-name="T1"/>
        </text:list-item>
      </text:list>
      <text:p text:style-name="P98" loext:marker-style-name="T1"><text:span text:style-name="T22">Rischi on line [ROL]</text:span><text:span text:style-name="T22"/></text:p>
      <text:list xml:id="list3987656334" text:style-name="WWNum1">
        <text:list-item>
          <text:list>
            <text:list-item>
              <text:list>
                <text:list-item>
                  <text:list>
                    <text:list-item>
                      <text:h text:style-name="P91" text:outline-level="4" loext:marker-style-name="T65"/>
                    </text:list-item>
                    <text:list-item>
                      <text:p text:style-name="P264" loext:marker-style-name="T1"><text:bookmark-start text:name="__RefHeading___Toc1762_569295140"/><text:span text:style-name="T1">Software di mappatura, analisi e gestione dei rischi corruttivi </text:span><text:bookmark-end text:name="__RefHeading___Toc1762_569295140"/><text:span text:style-name="T1"/></text:p>
                    </text:list-item>
                    <text:list-item>
                      <text:p text:style-name="P264" loext:marker-style-name="T1"><text:bookmark-start text:name="__RefHeading___Toc1764_569295140"/><text:span text:style-name="T1">cui possono essere esposti i processi organizzativi in Ateneo</text:span><text:bookmark-end text:name="__RefHeading___Toc1764_569295140"/><text:span text:style-name="T1"/></text:p>
                    </text:list-item>
                  </text:list>
                </text:list-item>
              </text:list>
            </text:list-item>
          </text:list>
        </text:list-item>
      </text:list>
      <text:p text:style-name="P27" loext:marker-style-name="T66"/>
      <text:p text:style-name="P103" loext:marker-style-name="T66"/>
      <text:list xml:id="list294415986" text:style-name="WWNum4">
        <text:list-item>
          <text:list>
            <text:list-item>
              <text:list>
                <text:list-item>
                  <text:list>
                    <text:list-item>
                      <text:list>
                        <text:list-item>
                          <text:list>
                            <text:list-item>
                              <text:h text:style-name="P95" text:outline-level="6" loext:marker-style-name="T1"><text:span text:style-name="T66">Documentazione di Progetto</text:span><text:span text:style-name="T66"/></text:h>
                              <text:list>
                                <text:list-item>
                                  <text:list>
                                    <text:list-item>
                                      <text:h text:style-name="P97" text:outline-level="8" loext:marker-style-name="T66"/>
                                    </text:list-item>
                                    <text:list-item>
                                      <text:h text:style-name="P96" text:outline-level="8" loext:marker-style-name="T66"><text:span text:style-name="T66">(SINTETICA)</text:span><text:span text:style-name="T66"/></text:h>
                                    </text:list-item>
                                  </text:list>
                                </text:list-item>
                              </text:list>
                            </text:list-item>
                          </text:list>
                        </text:list-item>
                      </text:list>
                    </text:list-item>
                  </text:list>
                </text:list-item>
              </text:list>
            </text:list-item>
          </text:list>
        </text:list-item>
      </text:list>
      <text:p text:style-name="P103" loext:marker-style-name="T66"/>
      <text:p text:style-name="Standard" loext:marker-style-name="T73"><text:span text:style-name="T67">Diario delle revisioni</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1" loext:marker-style-name="T1"><text:span text:style-name="T68">Release 0.1</text:span><text:span text:style-name="T68"/></text:p>
          </table:table-cell>
          <table:table-cell table:style-name="Table1.A1" office:value-type="string">
            <text:p text:style-name="P111" loext:marker-style-name="T1"><text:span text:style-name="T66">23/03/2022</text:span><text:span text:style-name="T66"/></text:p>
          </table:table-cell>
          <table:table-cell table:style-name="Table1.A1" office:value-type="string">
            <text:p text:style-name="P111" loext:marker-style-name="T1"><text:span text:style-name="T66">TG</text:span><text:span text:style-name="T66"/></text:p>
          </table:table-cell>
        </table:table-row>
        <table:table-row table:style-name="Table1.1">
          <table:table-cell table:style-name="Table1.A1" office:value-type="string">
            <text:p text:style-name="P111" loext:marker-style-name="T1"><text:span text:style-name="T68">Release 0.2</text:span><text:span text:style-name="T68"/></text:p>
          </table:table-cell>
          <table:table-cell table:style-name="Table1.A1" office:value-type="string">
            <text:p text:style-name="P111" loext:marker-style-name="T1"><text:span text:style-name="T66">04/05/2022</text:span><text:span text:style-name="T66"/></text:p>
          </table:table-cell>
          <table:table-cell table:style-name="Table1.A1" office:value-type="string">
            <text:p text:style-name="P111" loext:marker-style-name="T1"><text:span text:style-name="T66">TG</text:span><text:span text:style-name="T66"/></text:p>
          </table:table-cell>
        </table:table-row>
        <table:table-row table:style-name="Table1.1">
          <table:table-cell table:style-name="Table1.A1" office:value-type="string">
            <text:p text:style-name="P111" loext:marker-style-name="T1"><text:span text:style-name="T68">Release 0.3</text:span><text:span text:style-name="T68"/></text:p>
          </table:table-cell>
          <table:table-cell table:style-name="Table1.A1" office:value-type="string">
            <text:p text:style-name="P111" loext:marker-style-name="T1"><text:span text:style-name="T66">13/10/2022</text:span><text:span text:style-name="T66"/></text:p>
          </table:table-cell>
          <table:table-cell table:style-name="Table1.A1" office:value-type="string">
            <text:p text:style-name="P111" loext:marker-style-name="T1"><text:span text:style-name="T66">TG</text:span><text:span text:style-name="T66"/></text:p>
          </table:table-cell>
        </table:table-row>
        <table:table-row table:style-name="Table1.1">
          <table:table-cell table:style-name="Table1.A1" office:value-type="string">
            <text:p text:style-name="P111" loext:marker-style-name="T1"><text:span text:style-name="T68">Release 0.4</text:span><text:span text:style-name="T68"/></text:p>
          </table:table-cell>
          <table:table-cell table:style-name="Table1.A1" office:value-type="string">
            <text:p text:style-name="P111" loext:marker-style-name="T1"><text:span text:style-name="T66">14/10/2022</text:span><text:span text:style-name="T66"/></text:p>
          </table:table-cell>
          <table:table-cell table:style-name="Table1.A1" office:value-type="string">
            <text:p text:style-name="P111" loext:marker-style-name="T1"><text:span text:style-name="T66">TG</text:span><text:span text:style-name="T66"/></text:p>
          </table:table-cell>
        </table:table-row>
        <table:table-row table:style-name="Table1.1">
          <table:table-cell table:style-name="Table1.A1" office:value-type="string">
            <text:p text:style-name="P111" loext:marker-style-name="T1"><text:span text:style-name="T68">Release 0.5</text:span><text:span text:style-name="T68"/></text:p>
          </table:table-cell>
          <table:table-cell table:style-name="Table1.A1" office:value-type="string">
            <text:p text:style-name="P111" loext:marker-style-name="T1"><text:span text:style-name="T66">26/06/2023</text:span><text:span text:style-name="T66"/></text:p>
          </table:table-cell>
          <table:table-cell table:style-name="Table1.A1" office:value-type="string">
            <text:p text:style-name="P111" loext:marker-style-name="T1"><text:span text:style-name="T66">TG</text:span><text:span text:style-name="T66"/></text:p>
          </table:table-cell>
        </table:table-row>
        <table:table-row table:style-name="Table1.1">
          <table:table-cell table:style-name="Table1.A1" office:value-type="string">
            <text:p text:style-name="P111" loext:marker-style-name="T1"><text:span text:style-name="T68">Release 0.6</text:span><text:span text:style-name="T68"/></text:p>
          </table:table-cell>
          <table:table-cell table:style-name="Table1.A1" office:value-type="string">
            <text:p text:style-name="P111" loext:marker-style-name="T1"><text:span text:style-name="T66">27/06/2023</text:span><text:span text:style-name="T66"/></text:p>
          </table:table-cell>
          <table:table-cell table:style-name="Table1.A1" office:value-type="string">
            <text:p text:style-name="P111" loext:marker-style-name="T1"><text:span text:style-name="T66">TG</text:span><text:span text:style-name="T66"/></text:p>
          </table:table-cell>
        </table:table-row>
        <table:table-row table:style-name="Table1.1">
          <table:table-cell table:style-name="Table1.A1" office:value-type="string">
            <text:p text:style-name="P111" loext:marker-style-name="T1"><text:span text:style-name="T68">Release 0.7</text:span><text:span text:style-name="T68"/></text:p>
          </table:table-cell>
          <table:table-cell table:style-name="Table1.A1" office:value-type="string">
            <text:p text:style-name="P111" loext:marker-style-name="T1"><text:span text:style-name="T66">19/07/2023</text:span><text:span text:style-name="T66"/></text:p>
          </table:table-cell>
          <table:table-cell table:style-name="Table1.A1" office:value-type="string">
            <text:p text:style-name="P111" loext:marker-style-name="T1"><text:span text:style-name="T66">TG</text:span><text:span text:style-name="T66"/></text:p>
          </table:table-cell>
        </table:table-row>
        <table:table-row table:style-name="Table1.1">
          <table:table-cell table:style-name="Table1.A1" office:value-type="string">
            <text:p text:style-name="P111" loext:marker-style-name="T1"><text:span text:style-name="T68">Release 0.8</text:span><text:span text:style-name="T68"/></text:p>
          </table:table-cell>
          <table:table-cell table:style-name="Table1.A1" office:value-type="string">
            <text:p text:style-name="P111" loext:marker-style-name="T1"><text:span text:style-name="T66">01/09/2023</text:span><text:span text:style-name="T66"/></text:p>
          </table:table-cell>
          <table:table-cell table:style-name="Table1.A1" office:value-type="string">
            <text:p text:style-name="P111" loext:marker-style-name="T1"><text:span text:style-name="T66">TG</text:span><text:span text:style-name="T66"/></text:p>
          </table:table-cell>
        </table:table-row>
        <table:table-row table:style-name="Table1.1">
          <table:table-cell table:style-name="Table1.A1" office:value-type="string">
            <text:p text:style-name="P111" loext:marker-style-name="T1"><text:span text:style-name="T68">Release 0.9</text:span><text:span text:style-name="T68"/></text:p>
          </table:table-cell>
          <table:table-cell table:style-name="Table1.A1" office:value-type="string">
            <text:p text:style-name="P111" loext:marker-style-name="T1"><text:span text:style-name="T66">22/01/2024</text:span><text:span text:style-name="T66"/></text:p>
          </table:table-cell>
          <table:table-cell table:style-name="Table1.A1" office:value-type="string">
            <text:p text:style-name="P111" loext:marker-style-name="T1"><text:span text:style-name="T66">TG</text:span><text:span text:style-name="T66"/></text:p>
          </table:table-cell>
        </table:table-row>
        <table:table-row table:style-name="Table1.1">
          <table:table-cell table:style-name="Table1.A1" office:value-type="string">
            <text:p text:style-name="P111" loext:marker-style-name="T1"><text:span text:style-name="T68">Release 1.0</text:span><text:span text:style-name="T68"/></text:p>
          </table:table-cell>
          <table:table-cell table:style-name="Table1.A1" office:value-type="string">
            <text:p text:style-name="P111" loext:marker-style-name="T1"><text:span text:style-name="T66">24/01/2024</text:span><text:span text:style-name="T66"/></text:p>
          </table:table-cell>
          <table:table-cell table:style-name="Table1.A1" office:value-type="string">
            <text:p text:style-name="P111" loext:marker-style-name="T1"><text:span text:style-name="T66">TG</text:span><text:span text:style-name="T66"/></text:p>
          </table:table-cell>
        </table:table-row>
        <table:table-row table:style-name="Table1.1">
          <table:table-cell table:style-name="Table1.A1" office:value-type="string">
            <text:p text:style-name="P111" loext:marker-style-name="T1"><text:span text:style-name="T68">Release 1.1</text:span><text:span text:style-name="T68"/></text:p>
          </table:table-cell>
          <table:table-cell table:style-name="Table1.A1" office:value-type="string">
            <text:p text:style-name="P111" loext:marker-style-name="T1"><text:span text:style-name="T66">15/02/2024</text:span><text:span text:style-name="T66"/></text:p>
          </table:table-cell>
          <table:table-cell table:style-name="Table1.A1" office:value-type="string">
            <text:p text:style-name="P111" loext:marker-style-name="T1"><text:span text:style-name="T66">TG</text:span><text:span text:style-name="T66"/></text:p>
          </table:table-cell>
        </table:table-row>
        <table:table-row table:style-name="Table1.1">
          <table:table-cell table:style-name="Table1.A1" office:value-type="string">
            <text:p text:style-name="P111" loext:marker-style-name="T1"><text:span text:style-name="T68">Release 1.2</text:span><text:span text:style-name="T68"/></text:p>
          </table:table-cell>
          <table:table-cell table:style-name="Table1.A1" office:value-type="string">
            <text:p text:style-name="P111" loext:marker-style-name="T1"><text:span text:style-name="T66">23/02/2024</text:span><text:span text:style-name="T66"/></text:p>
          </table:table-cell>
          <table:table-cell table:style-name="Table1.A1" office:value-type="string">
            <text:p text:style-name="P111" loext:marker-style-name="T1"><text:span text:style-name="T66">TG</text:span><text:span text:style-name="T66"/></text:p>
          </table:table-cell>
        </table:table-row>
        <table:table-row table:style-name="Table1.1">
          <table:table-cell table:style-name="Table1.A1" office:value-type="string">
            <text:p text:style-name="P111" loext:marker-style-name="T1"><text:span text:style-name="T68">Release 1.3</text:span><text:span text:style-name="T68"/></text:p>
          </table:table-cell>
          <table:table-cell table:style-name="Table1.A1" office:value-type="string">
            <text:p text:style-name="P111" loext:marker-style-name="T1"><text:span text:style-name="T66">27/02/2024</text:span><text:span text:style-name="T66"/></text:p>
          </table:table-cell>
          <table:table-cell table:style-name="Table1.A1" office:value-type="string">
            <text:p text:style-name="P111" loext:marker-style-name="T1"><text:span text:style-name="T66">TG</text:span><text:span text:style-name="T66"/></text:p>
          </table:table-cell>
        </table:table-row>
        <table:table-row table:style-name="Table1.1">
          <table:table-cell table:style-name="Table1.A1" office:value-type="string">
            <text:p text:style-name="P111" loext:marker-style-name="T1"><text:span text:style-name="T68">Release 1.4</text:span><text:span text:style-name="T68"/></text:p>
          </table:table-cell>
          <table:table-cell table:style-name="Table1.A1" office:value-type="string">
            <text:p text:style-name="P112" loext:marker-style-name="T1"><text:span text:style-name="T69">01/03/2024</text:span><text:span text:style-name="T69"/></text:p>
          </table:table-cell>
          <table:table-cell table:style-name="Table1.A1" office:value-type="string">
            <text:p text:style-name="P112" loext:marker-style-name="T1"><text:span text:style-name="T66">TG</text:span><text:span text:style-name="T66"/></text:p>
          </table:table-cell>
        </table:table-row>
        <table:table-row table:style-name="Table1.1">
          <table:table-cell table:style-name="Table1.A15" office:value-type="string">
            <text:p text:style-name="P111" loext:marker-style-name="T1"><text:span text:style-name="T68">Release 1.5</text:span><text:span text:style-name="T68"/></text:p>
          </table:table-cell>
          <table:table-cell table:style-name="Table1.A15" office:value-type="string">
            <text:p text:style-name="P112" loext:marker-style-name="T1"><text:span text:style-name="T69">07/03/2024</text:span><text:span text:style-name="T69"/></text:p>
          </table:table-cell>
          <table:table-cell table:style-name="Table1.A15" office:value-type="string">
            <text:p text:style-name="P112" loext:marker-style-name="T1"><text:span text:style-name="T66">TG</text:span><text:span text:style-name="T66"/></text:p>
          </table:table-cell>
        </table:table-row>
        <table:table-row table:style-name="Table1.1">
          <table:table-cell table:style-name="Table1.A15" office:value-type="string">
            <text:p text:style-name="P111" loext:marker-style-name="T1"><text:span text:style-name="T68">Release 1.6</text:span><text:span text:style-name="T68"/></text:p>
          </table:table-cell>
          <table:table-cell table:style-name="Table1.A15" office:value-type="string">
            <text:p text:style-name="P112" loext:marker-style-name="T1"><text:span text:style-name="T69">08/03/2024</text:span><text:span text:style-name="T69"/></text:p>
          </table:table-cell>
          <table:table-cell table:style-name="Table1.A15" office:value-type="string">
            <text:p text:style-name="P112" loext:marker-style-name="T1"><text:span text:style-name="T66">TG</text:span><text:span text:style-name="T66"/></text:p>
          </table:table-cell>
        </table:table-row>
        <table:table-row table:style-name="Table1.1">
          <table:table-cell table:style-name="Table1.A15" office:value-type="string">
            <text:p text:style-name="P111" loext:marker-style-name="T1"><text:span text:style-name="T68">Release 1.7</text:span><text:span text:style-name="T68"/></text:p>
          </table:table-cell>
          <table:table-cell table:style-name="Table1.A15" office:value-type="string">
            <text:p text:style-name="P112" loext:marker-style-name="T1"><text:span text:style-name="T69">22/04/2024</text:span><text:span text:style-name="T69"/></text:p>
          </table:table-cell>
          <table:table-cell table:style-name="Table1.A15" office:value-type="string">
            <text:p text:style-name="P112" loext:marker-style-name="T1"><text:span text:style-name="T66">TG</text:span><text:span text:style-name="T66"/></text:p>
          </table:table-cell>
        </table:table-row>
        <table:table-row table:style-name="Table1.1">
          <table:table-cell table:style-name="Table1.A15" office:value-type="string">
            <text:p text:style-name="P111" loext:marker-style-name="T1"><text:span text:style-name="T68">Release 1.8</text:span><text:span text:style-name="T68"/></text:p>
          </table:table-cell>
          <table:table-cell table:style-name="Table1.A15" office:value-type="string">
            <text:p text:style-name="P112" loext:marker-style-name="T1"><text:span text:style-name="T69">24/07/2024</text:span><text:span text:style-name="T69"/></text:p>
          </table:table-cell>
          <table:table-cell table:style-name="Table1.A15" office:value-type="string">
            <text:p text:style-name="P112" loext:marker-style-name="T1"><text:span text:style-name="T66">TG</text:span><text:span text:style-name="T66"/></text:p>
          </table:table-cell>
        </table:table-row>
        <table:table-row table:style-name="Table1.1">
          <table:table-cell table:style-name="Table1.A15" office:value-type="string">
            <text:p text:style-name="P111" loext:marker-style-name="T1"><text:span text:style-name="T68">Release 1.9</text:span><text:span text:style-name="T68"/></text:p>
          </table:table-cell>
          <table:table-cell table:style-name="Table1.A15" office:value-type="string">
            <text:p text:style-name="P112" loext:marker-style-name="T1"><text:span text:style-name="T69">01/08/2024</text:span><text:span text:style-name="T69"/></text:p>
          </table:table-cell>
          <table:table-cell table:style-name="Table1.A15" office:value-type="string">
            <text:p text:style-name="P112" loext:marker-style-name="T1"><text:span text:style-name="T66">TG</text:span><text:span text:style-name="T66"/></text:p>
          </table:table-cell>
        </table:table-row>
        <table:table-row table:style-name="Table1.1">
          <table:table-cell table:style-name="Table1.A15" office:value-type="string">
            <text:p text:style-name="P111" loext:marker-style-name="T1"><text:span text:style-name="T68">Release 2.0</text:span><text:span text:style-name="T68"/></text:p>
          </table:table-cell>
          <table:table-cell table:style-name="Table1.A15" office:value-type="string">
            <text:p text:style-name="P112" loext:marker-style-name="T1"><text:span text:style-name="T69">09/01/2025</text:span><text:span text:style-name="T69"/></text:p>
          </table:table-cell>
          <table:table-cell table:style-name="Table1.A15" office:value-type="string">
            <text:p text:style-name="P112" loext:marker-style-name="T1"><text:span text:style-name="T66">TG</text:span><text:span text:style-name="T66"/></text:p>
          </table:table-cell>
        </table:table-row>
        <table:table-row table:style-name="Table1.1">
          <table:table-cell table:style-name="Table1.A15" office:value-type="string">
            <text:p text:style-name="P111" loext:marker-style-name="T1"><text:span text:style-name="T68">Release 2.1</text:span><text:span text:style-name="T68"/></text:p>
          </table:table-cell>
          <table:table-cell table:style-name="Table1.A15" office:value-type="string">
            <text:p text:style-name="P112" loext:marker-style-name="T1"><text:span text:style-name="T69">20/01/2025</text:span><text:span text:style-name="T69"/></text:p>
          </table:table-cell>
          <table:table-cell table:style-name="Table1.A15" office:value-type="string">
            <text:p text:style-name="P112" loext:marker-style-name="T1"><text:span text:style-name="T66">TG</text:span><text:span text:style-name="T66"/></text:p>
          </table:table-cell>
        </table:table-row>
        <table:table-row table:style-name="Table1.1">
          <table:table-cell table:style-name="Table1.A15" office:value-type="string">
            <text:p text:style-name="P111" loext:marker-style-name="T1"><text:span text:style-name="T68">Release 2.2</text:span><text:span text:style-name="T68"/></text:p>
          </table:table-cell>
          <table:table-cell table:style-name="Table1.A15" office:value-type="string">
            <text:p text:style-name="P112" loext:marker-style-name="T1"><text:span text:style-name="T69">11/12/2025</text:span><text:span text:style-name="T69"/></text:p>
          </table:table-cell>
          <table:table-cell table:style-name="Table1.A15" office:value-type="string">
            <text:p text:style-name="P112" loext:marker-style-name="T1"><text:span text:style-name="T66">TG</text:span><text:span text:style-name="T66"/></text:p>
          </table:table-cell>
        </table:table-row>
        <table:table-row table:style-name="Table1.1">
          <table:table-cell table:style-name="Table1.A15" office:value-type="string">
            <text:p text:style-name="P111" loext:marker-style-name="T1"><text:span text:style-name="T68">Release 2.3</text:span><text:span text:style-name="T68"/></text:p>
          </table:table-cell>
          <table:table-cell table:style-name="Table1.A15" office:value-type="string">
            <text:p text:style-name="P112" loext:marker-style-name="T1"><text:span text:style-name="T69">02/03/2026</text:span><text:span text:style-name="T69"/></text:p>
          </table:table-cell>
          <table:table-cell table:style-name="Table1.A15" office:value-type="string">
            <text:p text:style-name="P112" loext:marker-style-name="T1"><text:span text:style-name="T66">TG</text:span><text:span text:style-name="T66"/></text:p>
          </table:table-cell>
        </table:table-row>
        <table:table-row table:style-name="Table1.1">
          <table:table-cell table:style-name="Table1.A15" office:value-type="string">
            <text:p text:style-name="P111" loext:marker-style-name="T1"><text:span text:style-name="T68">Release 2.4</text:span><text:span text:style-name="T68"/></text:p>
          </table:table-cell>
          <table:table-cell table:style-name="Table1.A15" office:value-type="string">
            <text:p text:style-name="P111" loext:marker-style-name="T1"><text:span text:style-name="T66">07/07/2026, 08/07/2026</text:span><text:span text:style-name="T66"/></text:p>
          </table:table-cell>
          <table:table-cell table:style-name="Table1.A15" office:value-type="string">
            <text:p text:style-name="P111" loext:marker-style-name="T1"><text:span text:style-name="T66">TG</text:span><text:span text:style-name="T66"/></text:p>
          </table:table-cell>
        </table:table-row>
        <table:table-row table:style-name="Table1.1">
          <table:table-cell table:style-name="Table1.A15" office:value-type="string">
            <text:p text:style-name="P111" loext:marker-style-name="T1"><text:span text:style-name="T68">Release 2.5</text:span><text:span text:style-name="T68"/></text:p>
          </table:table-cell>
          <table:table-cell table:style-name="Table1.A15" office:value-type="string">
            <text:p text:style-name="P112" loext:marker-style-name="T1"><text:span text:style-name="T69">13/07/2026</text:span><text:span text:style-name="T69"/></text:p>
          </table:table-cell>
          <table:table-cell table:style-name="Table1.A15" office:value-type="string">
            <text:p text:style-name="P112" loext:marker-style-name="T1"><text:span text:style-name="T66">TG</text:span><text:span text:style-name="T66"/></text:p>
          </table:table-cell>
        </table:table-row>
      </table:table>
      <text:p text:style-name="P103" loext:marker-style-name="T66"/>
      <text:p text:style-name="P99" loext:marker-style-name="T1"><text:bookmark-start text:name="__RefHeading___Toc103510928"/><text:span text:style-name="T71">Sommario</text:span><text:bookmark-end text:name="__RefHeading___Toc103510928"/></text:p>
      <text:p text:style-name="P100" loext:marker-style-name="T1"><text:span text:style-name="T71"/></text:p>
      <text:list xml:id="list172212915336647" text:continue-list="list3339998633" text:style-name="WWNum3">
        <text:list-item>
          <text:h text:style-name="P41" text:outline-level="1" loext:marker-style-name="T70"/>
        </text:list-item>
      </text:list>
      <text:table-of-content text:style-name="Sect1" text:protected="true"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5" text:outline-level="1"><text:a xlink:type="simple" xlink:href="#__RefHeading___Toc103510929" text:style-name="Index_20_Link" text:visited-style-name="Index_20_Link">Introduzione<text:tab/>4</text:a></text:h>
          <text:p text:style-name="P7"><text:a xlink:type="simple" xlink:href="#__RefHeading___Toc103510930" text:style-name="Index_20_Link" text:visited-style-name="Index_20_Link">OBIETTIVO<text:tab/>4</text:a></text:p>
          <text:p text:style-name="P7"><text:a xlink:type="simple" xlink:href="#__RefHeading___Toc1035109302" text:style-name="Index_20_Link" text:visited-style-name="Index_20_Link">PIANIFICAZIONE DEL PROGETTO<text:tab/>4</text:a></text:p>
          <text:h text:style-name="P5" text:outline-level="1"><text:a xlink:type="simple" xlink:href="#__RefHeading___Toc6894_3671668814" text:style-name="Index_20_Link" text:visited-style-name="Index_20_Link">Contesto applicativo<text:tab/>6</text:a></text:h>
          <text:p text:style-name="P6"><text:a xlink:type="simple" xlink:href="#__RefHeading___Toc1035109302111111_Copy_" text:style-name="Index_20_Link" text:visited-style-name="Index_20_Link">I PROCESSI E I RISCHI<text:tab/>6</text:a></text:p>
          <text:p text:style-name="P7"><text:a xlink:type="simple" xlink:href="#__RefHeading___Toc1035109302_Copy_1" text:style-name="Index_20_Link" text:visited-style-name="Index_20_Link">L’INTERVISTA<text:tab/>7</text:a></text:p>
          <text:p text:style-name="P7"><text:a xlink:type="simple" xlink:href="#__RefHeading___Toc10351093021" text:style-name="Index_20_Link" text:visited-style-name="Index_20_Link">IL QUARTO LIVELLO DI DESCRIZIONE DEI PROCESSI<text:tab/>10</text:a></text:p>
          <text:p text:style-name="P7"><text:a xlink:type="simple" xlink:href="#__RefHeading___Toc1035109302111" text:style-name="Index_20_Link" text:visited-style-name="Index_20_Link">AMBITI DI ANALISI GENERICI E SPECIFICI<text:tab/>15</text:a></text:p>
          <text:p text:style-name="P7"><text:a xlink:type="simple" xlink:href="#__RefHeading___Toc10351093021111" text:style-name="Index_20_Link" text:visited-style-name="Index_20_Link">I FATTORI ABILITANTI<text:tab/>15</text:a></text:p>
          <text:p text:style-name="P7"><text:a xlink:type="simple" xlink:href="#__RefHeading___Toc103510930211111" text:style-name="Index_20_Link" text:visited-style-name="Index_20_Link">GLI INDICATORI DI RISCHIO<text:tab/>17</text:a></text:p>
          <text:p text:style-name="P8"><text:a xlink:type="simple" xlink:href="#__RefHeading___Toc1400_499460115" text:style-name="Index_20_Link" text:visited-style-name="Index_20_Link">Disposizioni con ripetizione - D'(n,k)<text:tab/>20</text:a></text:p>
          <text:p text:style-name="P6"><text:a xlink:type="simple" xlink:href="#__RefHeading___Toc1035109302111111" text:style-name="Index_20_Link" text:visited-style-name="Index_20_Link">LE MISURE<text:tab/>23</text:a></text:p>
          <text:p text:style-name="P7"><text:a xlink:type="simple" xlink:href="#__RefHeading___Toc10351093021111111" text:style-name="Index_20_Link" text:visited-style-name="Index_20_Link">I NUOVI ATTORI<text:tab/>24</text:a></text:p>
          <text:p text:style-name="P8"><text:a xlink:type="simple" xlink:href="#__RefHeading___Toc4036_2171737923" text:style-name="Index_20_Link" text:visited-style-name="Index_20_Link">1. la misura di riduzione del rischio<text:tab/>24</text:a></text:p>
          <text:p text:style-name="P8"><text:a xlink:type="simple" xlink:href="#__RefHeading___Toc4038_2171737923" text:style-name="Index_20_Link" text:visited-style-name="Index_20_Link">2. l’indicatore di monitoraggio<text:tab/>24</text:a></text:p>
          <text:p text:style-name="P8"><text:a xlink:type="simple" xlink:href="#__RefHeading___Toc4040_2171737923" text:style-name="Index_20_Link" text:visited-style-name="Index_20_Link">3. la tipologia della misura<text:tab/>24</text:a></text:p>
          <text:p text:style-name="P7"><text:a xlink:type="simple" xlink:href="#__RefHeading___Toc103510930211111111" text:style-name="Index_20_Link" text:visited-style-name="Index_20_Link">LA MISURA DI PREVENZIONE DEL RISCHIO CORRUTTIVO<text:tab/>24</text:a></text:p>
          <text:p text:style-name="P8"><text:a xlink:type="simple" xlink:href="#__RefHeading___Toc4429_2037361864" text:style-name="Index_20_Link" text:visited-style-name="Index_20_Link">TIPOLOGIA<text:tab/>25</text:a></text:p>
          <text:p text:style-name="P8"><text:a xlink:type="simple" xlink:href="#__RefHeading___Toc4432_2037361864" text:style-name="Index_20_Link" text:visited-style-name="Index_20_Link">CARATTERE<text:tab/>25</text:a></text:p>
          <text:p text:style-name="P8"><text:a xlink:type="simple" xlink:href="#__RefHeading___Toc4434_2037361864" text:style-name="Index_20_Link" text:visited-style-name="Index_20_Link">SOSTENIBILITÀ ORGANIZZATIVA<text:tab/>25</text:a></text:p>
          <text:p text:style-name="P8"><text:a xlink:type="simple" xlink:href="#__RefHeading___Toc4436_2037361864" text:style-name="Index_20_Link" text:visited-style-name="Index_20_Link">SOSTENIBILITÀ ECONOMICA<text:tab/>26</text:a></text:p>
          <text:p text:style-name="P8"><text:a xlink:type="simple" xlink:href="#__RefHeading___Toc4438_2037361864" text:style-name="Index_20_Link" text:visited-style-name="Index_20_Link">RELAZIONE VERSO LA STRUTTURA<text:tab/>26</text:a></text:p>
          <text:p text:style-name="P7"><text:a xlink:type="simple" xlink:href="#__RefHeading___Toc1035109302111111111" text:style-name="Index_20_Link" text:visited-style-name="Index_20_Link">VISTA DELL’IMPLEMENTAZIONE<text:tab/>30</text:a></text:p>
          <text:p text:style-name="P8"><text:a xlink:type="simple" xlink:href="#__RefHeading___Toc10351093021111111112" text:style-name="Index_20_Link" text:visited-style-name="Index_20_Link">1. REGISTRO DELLE MISURE<text:tab/>30</text:a></text:p>
          <text:p text:style-name="P8"><text:a xlink:type="simple" xlink:href="#__RefHeading___Toc10351093021111111111" text:style-name="Index_20_Link" text:visited-style-name="Index_20_Link">2. ASSOCIAZIONE TRA MISURA E RISCHIO<text:tab/>33</text:a></text:p>
          <text:p text:style-name="P7"><text:a xlink:type="simple" xlink:href="#__RefHeading___Toc1770_569295140" text:style-name="Index_20_Link" text:visited-style-name="Index_20_Link">IL PxI DEI RISCHI<text:tab/>35</text:a></text:p>
          <text:p text:style-name="P8"><text:a xlink:type="simple" xlink:href="#__RefHeading___Toc2676_1922363239" text:style-name="Index_20_Link" text:visited-style-name="Index_20_Link">CONCLUSIONI<text:tab/>36</text:a></text:p>
          <text:p text:style-name="P7"><text:a xlink:type="simple" xlink:href="#__RefHeading___Toc2118_785337907" text:style-name="Index_20_Link" text:visited-style-name="Index_20_Link">ALGORITMI DI MITIGAZIONE E RICALCOLO<text:tab/>40</text:a></text:p>
          <text:p text:style-name="P8"><text:a xlink:type="simple" xlink:href="#__RefHeading___Toc2678_1922363239" text:style-name="Index_20_Link" text:visited-style-name="Index_20_Link">OBIETTIVO<text:tab/>40</text:a></text:p>
          <text:p text:style-name="P8"><text:a xlink:type="simple" xlink:href="#__RefHeading___Toc2680_1922363239" text:style-name="Index_20_Link" text:visited-style-name="Index_20_Link">L’ALGORITMO DI CONTENIMENTO (O MITIGAZIONE) DEL RISCHIO<text:tab/>41</text:a></text:p>
          <text:p text:style-name="P8"><text:a xlink:type="simple" xlink:href="#__RefHeading___Toc2682_1922363239" text:style-name="Index_20_Link" text:visited-style-name="Index_20_Link">L’ALGORITMO DI RICALCOLO<text:tab/>45</text:a></text:p>
          <text:p text:style-name="P7"><text:a xlink:type="simple" xlink:href="#__RefHeading___Toc10351093021111111113" text:style-name="Index_20_Link" text:visited-style-name="Index_20_Link">VISTA DELL’IMPLEMENTAZIONE<text:tab/>48</text:a></text:p>
          <text:p text:style-name="P8"><text:a xlink:type="simple" xlink:href="#__RefHeading___Toc103510930211111111121" text:style-name="Index_20_Link" text:visited-style-name="Index_20_Link">3. REPORT PxI DEI RISCHI (E DELLE MISURE)<text:tab/>48</text:a></text:p>
          <text:p text:style-name="P8"><text:a xlink:type="simple" xlink:href="#__RefHeading___Toc3784_3254581194" text:style-name="Index_20_Link" text:visited-style-name="Index_20_Link">4. TABELLA DELLE MISURE<text:tab/>50</text:a></text:p>
          <text:p text:style-name="P6"><text:a xlink:type="simple" xlink:href="#__RefHeading___Toc10351093021111112" text:style-name="Index_20_Link" text:visited-style-name="Index_20_Link">IL MONITORAGGIO<text:tab/>52</text:a></text:p>
          <text:p text:style-name="P7"><text:a xlink:type="simple" xlink:href="#__RefHeading___Toc10351093021111111_Copy" text:style-name="Index_20_Link" text:visited-style-name="Index_20_Link">I NUOVI ATTORI<text:tab/>52</text:a></text:p>
          <text:p text:style-name="P8"><text:a xlink:type="simple" xlink:href="#__RefHeading___Toc4036_2171737923_Copy_1" text:style-name="Index_20_Link" text:visited-style-name="Index_20_Link">la fase di attuazione<text:tab/>52</text:a></text:p>
          <text:p text:style-name="P8"><text:a xlink:type="simple" xlink:href="#__RefHeading___Toc4040_2171737923_Copy_1" text:style-name="Index_20_Link" text:visited-style-name="Index_20_Link">la misurazione<text:tab/>52</text:a></text:p>
          <text:p text:style-name="P7"><text:a xlink:type="simple" xlink:href="#__RefHeading___Toc1035109302111111113" text:style-name="Index_20_Link" text:visited-style-name="Index_20_Link">L’INDICATORE DI MONITORAGGIO<text:tab/>52</text:a></text:p>
          <text:p text:style-name="P7"><text:a xlink:type="simple" xlink:href="#__RefHeading___Toc10351093021111111132" text:style-name="Index_20_Link" text:visited-style-name="Index_20_Link">LA FASE DI ATTUAZIONE<text:tab/>54</text:a></text:p>
          <text:p text:style-name="P7"><text:a xlink:type="simple" xlink:href="#__RefHeading___Toc10351093021111111131" text:style-name="Index_20_Link" text:visited-style-name="Index_20_Link">MISURA E MISURAZIONE<text:tab/>56</text:a></text:p>
          <text:p text:style-name="P7"><text:a xlink:type="simple" xlink:href="#__RefHeading___Toc4221_1544842616" text:style-name="Index_20_Link" text:visited-style-name="Index_20_Link">COMPLETEZZA DEL MONITORAGGIO<text:tab/>57</text:a></text:p>
          <text:p text:style-name="P7"><text:a xlink:type="simple" xlink:href="#__RefHeading___Toc4221_1544842616_Copy_1" text:style-name="Index_20_Link" text:visited-style-name="Index_20_Link">ALGORITMO DELL’APPLICAZIONE DEL MONITORAGGIO<text:tab/>59</text:a></text:p>
          <text:h text:style-name="P5" text:outline-level="1"><text:a xlink:type="simple" xlink:href="#__RefHeading___Toc4382_1492729285" text:style-name="Index_20_Link" text:visited-style-name="Index_20_Link">Flusso informativo<text:tab/>63</text:a></text:h>
          <text:p text:style-name="P6"><text:a xlink:type="simple" xlink:href="#__RefHeading___Toc4384_1492729285" text:style-name="Index_20_Link" text:visited-style-name="Index_20_Link">WORKFLOW DI INSERIMENTO MACRO/PROCESSO<text:tab/>63</text:a></text:p>
          <text:p text:style-name="P7"><text:a xlink:type="simple" xlink:href="#__RefHeading___Toc4592_419530422" text:style-name="Index_20_Link" text:visited-style-name="Index_20_Link">SCELTA LIVELLO DI PROCESSO<text:tab/>64</text:a></text:p>
          <text:p text:style-name="P7"><text:a xlink:type="simple" xlink:href="#__RefHeading___Toc4594_419530422" text:style-name="Index_20_Link" text:visited-style-name="Index_20_Link"><text:soft-page-break/>INSERIMENTO MACRO/PROCESSO<text:tab/>64</text:a></text:p>
          <text:p text:style-name="P7"><text:a xlink:type="simple" xlink:href="#__RefHeading___Toc4596_419530422" text:style-name="Index_20_Link" text:visited-style-name="Index_20_Link">INSERIMENTO INPUT<text:tab/>65</text:a></text:p>
          <text:p text:style-name="P7"><text:a xlink:type="simple" xlink:href="#__RefHeading___Toc4598_419530422" text:style-name="Index_20_Link" text:visited-style-name="Index_20_Link">INSERIMENTO FASI<text:tab/>66</text:a></text:p>
          <text:p text:style-name="P6"><text:a xlink:type="simple" xlink:href="#__RefHeading___Toc4384_1492729285_Copy_1" text:style-name="Index_20_Link" text:visited-style-name="Index_20_Link">STORICIZZAZIONE<text:tab/>69</text:a></text:p>
          <text:p text:style-name="P7"><text:a xlink:type="simple" xlink:href="#__RefHeading___Toc4598_419530422_Copy_1" text:style-name="Index_20_Link" text:visited-style-name="Index_20_Link">STORICIZZAZIONE DEI PXI<text:tab/>71</text:a></text:p>
          <text:p text:style-name="P7"><text:a xlink:type="simple" xlink:href="#__RefHeading___Toc4598_419530422_Copy_1_" text:style-name="Index_20_Link" text:visited-style-name="Index_20_Link">STORICIZZAZIONE DELLE MISURE<text:tab/>72</text:a></text:p>
          <text:p text:style-name="P7"><text:a xlink:type="simple" xlink:href="#__RefHeading___Toc4598_419530422_Copy_11" text:style-name="Index_20_Link" text:visited-style-name="Index_20_Link">STORICIZZAZIONE DEGLI INDICATORI DI MONITORAGGIO<text:tab/>73</text:a></text:p>
          <text:p text:style-name="P7"><text:a xlink:type="simple" xlink:href="#__RefHeading___Toc4598_419530422_Copy_13" text:style-name="Index_20_Link" text:visited-style-name="Index_20_Link">ADEGUAMENTO DELLA REPORTISTICA<text:tab/>74</text:a></text:p>
        </text:index-body>
      </text:table-of-content>
      <text:p text:style-name="P110" loext:marker-style-name="T72"/>
      <text:p text:style-name="P103" loext:marker-style-name="T66"/>
      <text:p text:style-name="P103" loext:marker-style-name="T66"/>
      <text:p text:style-name="P103" loext:marker-style-name="T66"/>
      <text:p text:style-name="P103" loext:marker-style-name="T66"/>
      <text:p text:style-name="P103" loext:marker-style-name="T66"/>
      <text:p text:style-name="P103" loext:marker-style-name="T66"/>
      <text:p text:style-name="P103" loext:marker-style-name="T66"/>
      <text:p text:style-name="P113" loext:marker-style-name="T1"><text:span text:style-name="T23">Stampato il</text:span><text:span text:style-name="T66">: </text:span><text:span text:style-name="T66"><text:date style:data-style-name="N10036" text:date-value="2026-07-22T17:22:11.803259742">22/07/2026</text:date></text:span></text:p>
      <text:p text:style-name="P114" loext:marker-style-name="T2"/>
      <text:p text:style-name="P131" loext:marker-style-name="T1"><text:span text:style-name="T24">Salvato il </text:span><text:span text:style-name="T24"><text:date style:data-style-name="N10036" text:date-value="2026-07-22T17:22:11.803791574">22/07/2026</text:date></text:span><text:span text:style-name="T24"><text:s/>pagg. </text:span><text:span text:style-name="T24"><text:page-count>74</text:page-count></text:span></text:p>
      <text:p text:style-name="P104" loext:marker-style-name="T66"/>
      <text:p text:style-name="P103" loext:marker-style-name="T66"/>
      <text:p text:style-name="P103" loext:marker-style-name="T66"/>
      <text:p text:style-name="P103" loext:marker-style-name="T66"/>
      <text:p text:style-name="P103" loext:marker-style-name="T66"/>
      <text:p text:style-name="P103" loext:marker-style-name="T66"/>
      <text:list xml:id="list172213540431815" text:continue-list="list294415986" text:style-name="WWNum82">
        <text:list-item>
          <text:h text:style-name="P56" text:outline-level="1" loext:marker-style-name="T1"/>
        </text:list-item>
        <text:list-item text:style-override="WWNum83">
          <text:h text:style-name="P57" text:outline-level="1" loext:marker-style-name="T1"><text:bookmark-start text:name="__RefHeading___Toc103510929"/><text:span text:style-name="T70">Introduzione</text:span><text:bookmark-end text:name="__RefHeading___Toc103510929"/><text:span text:style-name="T70"/></text:h>
        </text:list-item>
      </text:list>
      <text:p text:style-name="P105" loext:marker-style-name="T70"/>
      <text:p text:style-name="P12" loext:marker-style-name="T76"><text:span text:style-name="T5">Questo documento rappresenta una sintesi della documentazione relativa all</text:span><text:span text:style-name="T28">a realizzazione di un sistema software per la mappatura dell’esposizione dei processi organizzativi relativamente al rischio corruttivo e relativo trattamento. </text:span></text:p>
      <text:p text:style-name="P107" loext:marker-style-name="T66"/>
      <text:p text:style-name="P106" loext:marker-style-name="T70"/>
      <text:list xml:id="list172213473835445" text:continue-list="list172212915336647" text:style-name="WWNum84">
        <text:list-item>
          <text:list>
            <text:list-item>
              <text:list>
                <text:list-item>
                  <text:h text:style-name="P67" text:outline-level="3" loext:marker-style-name="T1"><text:bookmark-start text:name="__RefHeading___Toc103510930"/><text:span text:style-name="T38">OBIETTIVO</text:span><text:span text:style-name="T1"> </text:span><text:bookmark-end text:name="__RefHeading___Toc103510930"/></text:h>
                </text:list-item>
              </text:list>
            </text:list-item>
          </text:list>
        </text:list-item>
      </text:list>
      <text:p text:style-name="P10" loext:marker-style-name="T76"><text:span text:style-name="T29">Il rischio corruttivo è una delle dimensioni significative in cui i processi organizzativi possono essere inquadrati.</text:span><text:span text:style-name="T39"/></text:p>
      <text:p text:style-name="P197" loext:marker-style-name="T77"/>
      <text:p text:style-name="P10" loext:marker-style-name="T76"><text:span text:style-name="T29">Una funzione classica della mappatura dei processi organizzativi è quella di fornire una rappresentazione “plastica” delle allocazioni delle quote parte di lavoro erogate sulle attività di processo, e quindi fornire specifici indicatori di efficienza ed efficacia dei singoli processi ed offrire una base su cui possono essere appoggiate decisioni di revisione e razionalizzazione dell’organizzazione stessa.</text:span><text:span text:style-name="T39"/></text:p>
      <text:p text:style-name="P208" loext:marker-style-name="T39"/>
      <text:p text:style-name="P10" loext:marker-style-name="T76"><text:span text:style-name="T29">Tuttavia, uno degli aspetti più significativi di un progetto di mappatura dei processi consiste <text:s/></text:span><text:span text:style-name="T30">nell’analisi del rischio corruttivo</text:span><text:span text:style-name="T29"> cui i processi stessi sono esposti: avendo costruito un dizionario dei processi, ed avendo rappresentato </text:span><text:span text:style-name="T31">l’effort</text:span><text:span text:style-name="T29"> dell’organizzazione in termini di quote parte lavorate sui processi stessi, completare il quadro con i tasselli relativi alla dimensione del rischio corruttivo cui i processi sono esposti consente di arricchire la mappatura dei processi con una dimensione di rilevante significato - ancor più importante per l’istituzione pubblica, che deve rendere conto anche al cittadino della modalità in cui i fondi e le sovvenzioni pubbliche vengono impiegate e delle contromisure messe in atto dall’organizzazione stessa per far fronte al rischio di infiltrazioni, in particolare su processi organizzativi a questo punto identificati come sensibilmente esposti al rischio.</text:span></text:p>
      <text:p text:style-name="P197" loext:marker-style-name="T77"/>
      <text:p text:style-name="P106" loext:marker-style-name="T70"/>
      <text:list xml:id="list172213961962877" text:continue-list="list172213473835445" text:style-name="WWNum85">
        <text:list-item>
          <text:list>
            <text:list-item>
              <text:list>
                <text:list-item>
                  <text:h text:style-name="P68" text:outline-level="3" loext:marker-style-name="T1"><text:bookmark-start text:name="__RefHeading___Toc1035109302"/><text:span text:style-name="T26">PIANIFICAZIONE DEL PROGETTO</text:span><text:span text:style-name="T66"> </text:span><text:bookmark-end text:name="__RefHeading___Toc1035109302"/></text:h>
                </text:list-item>
              </text:list>
            </text:list-item>
          </text:list>
        </text:list-item>
      </text:list>
      <text:p text:style-name="P10" loext:marker-style-name="T76"><text:span text:style-name="T1">La schematizzazione dei lavori prevede di procedere attraverso una serie di step:</text:span><text:span text:style-name="T77"/></text:p>
      <text:p text:style-name="P197" loext:marker-style-name="T77"/>
      <text:p text:style-name="P140" loext:marker-style-name="T76"><text:span text:style-name="T1"><text:tab/>i. A</text:span><text:span text:style-name="T29">nalisi e sviluppo delle funzionalità di mappatura dei processi organizzativi e delle strutture di organigramma</text:span></text:p>
      <text:p text:style-name="P197" loext:marker-style-name="T77"/>
      <text:p text:style-name="P191" loext:marker-style-name="T76"><text:span text:style-name="T1"><text:tab/>ii. A</text:span><text:span text:style-name="T29">nalisi e sviluppo delle funzionalità di mappatura dei rischi corruttivi e della loro <text:tab/>associazione con i processi mappati e i fattori abilitanti</text:span></text:p>
      <text:p text:style-name="P199" loext:marker-style-name="T77"/>
      <text:p text:style-name="P141" loext:marker-style-name="T76"><text:soft-page-break/><text:span text:style-name="T1"><text:tab/>iii. </text:span><text:span text:style-name="T29">Implementazione del sistema software per la memorizzazione delle risposte date alle domande che indagano il rischio corruttivo e per il calcolo dei livelli di rischio ai processi, sulla base delle risposte date (algoritmi di calcolo del rischio corruttivo)</text:span></text:p>
      <text:p text:style-name="P208" loext:marker-style-name="T39"/>
      <text:p text:style-name="P192" loext:marker-style-name="T76"><text:span text:style-name="T1"><text:tab/>iv. </text:span><text:span text:style-name="T28">Effettuazione del censimento, costituito da una serie di interviste, effettuate con gli uffici amministrativi, per raccogliere le risposte che permettono di ricostruire una mappa dei livelli di rischio cui i processi presidiati dalle strutture intervistate sono esposti.</text:span><text:span text:style-name="T5"> <text:line-break/><text:line-break/>v. A</text:span><text:span text:style-name="T29">nalisi e sviluppo delle misure di mitigazione e del loro impatto sui livelli di rischio (algoritmi <text:s/>di stima della mitigazione) <text:line-break/><text:line-break/>vi. Analisi e sviluppo del sistema di monitoraggio (algoritmi di riduzione effettiva dei livelli di rischio)<text:line-break/><text:line-break/>vii. Implementazione della storicizzazione<text:line-break/><text:line-break/>viii. Effettuazione del monitoraggio annuale</text:span></text:p>
      <text:p text:style-name="P203" loext:marker-style-name="T76"/>
      <text:p text:style-name="P203" loext:marker-style-name="T76"/>
      <text:p text:style-name="P203" loext:marker-style-name="T76"/>
      <text:p text:style-name="P193" loext:marker-style-name="T76"><text:span text:style-name="T29">Tali step non sono necessariamente sequenziali ma vengono applicati tramite un modello di sviluppo incrementale.</text:span><text:span text:style-name="T39"/></text:p>
      <text:p text:style-name="P108" loext:marker-style-name="T66"/>
      <text:p text:style-name="P109" loext:marker-style-name="T66"/>
      <text:list xml:id="list172212321031490" text:continue-list="list172213540431815" text:style-name="WWNum86">
        <text:list-item>
          <text:h text:style-name="P58" text:outline-level="1" loext:marker-style-name="T1"><text:bookmark-start text:name="__RefHeading___Toc6894_3671668814"/><text:span text:style-name="T27">Contesto applicativo</text:span><text:bookmark-end text:name="__RefHeading___Toc6894_3671668814"/><text:span text:style-name="T27"/></text:h>
        </text:list-item>
      </text:list>
      <text:list xml:id="list172213337994685" text:continue-list="list172213961962877" text:style-name="WWNum87">
        <text:list-item>
          <text:list>
            <text:list-item>
              <text:list>
                <text:list-item>
                  <text:h text:style-name="P60" text:outline-level="2" loext:marker-style-name="T1"><text:bookmark-start text:name="__RefHeading___Toc1035109302111111_Copy_"/><text:span text:style-name="T1">I PROCESSI E I RISCHI</text:span><text:bookmark-end text:name="__RefHeading___Toc1035109302111111_Copy_"/><text:span text:style-name="T1"/></text:h>
                </text:list-item>
              </text:list>
            </text:list-item>
            <text:list-item text:style-override="WWNum88">
              <text:h text:style-name="P61" text:outline-level="2" loext:marker-style-name="T33"><text:bookmark text:name="__RefHeading___Toc1035109302_Copy_2"/></text:h>
            </text:list-item>
          </text:list>
        </text:list-item>
      </text:list>
      <text:p text:style-name="P12" loext:marker-style-name="T76"><text:span text:style-name="T29">All’inizio dell’analisi, si è tentato a lungo di rendere la mappatura dei processi finalizzata alla valutazione del rischio – cioè la mappatura realizzata tramite questo progetto ROL – compatibile con la mappatura già esistente, realizzata a fini di efficientamento; a tal scopo sono stati anche predisposti degli specifici connettori. </text:span><text:span text:style-name="T39"/></text:p>
      <text:p text:style-name="P214" loext:marker-style-name="T29"/>
      <text:p text:style-name="P219" loext:marker-style-name="T23"><draw:custom-shape text:anchor-type="char" draw:z-index="1" draw:name="Cornice4" draw:style-name="gr35" draw:text-style-name="P265" svg:width="11.35cm" svg:height="15.555cm" svg:x="3.12cm" svg:y="0.002cm"><text:p text:style-name="P28" loext:marker-style-name="T42"><text:span text:style-name="T86"><draw:frame draw:style-name="fr2" draw:name="Immagine2" text:anchor-type="as-char" svg:width="11.347cm" svg:height="14.642cm" draw:z-index="20"><draw:image xlink:href="Pictures/100000010000023F000002E6A3EEFF4B.png" xlink:type="simple" xlink:show="embed" xlink:actuate="onLoad" draw:mime-type="image/png"/></draw:frame></text:span><text:span text:style-name="T42">Figura </text:span><text:span text:style-name="T42"><text:sequence text:ref-name="refFigura0" text:name="Figura" text:formula="ooow:Figura+1" style:num-format="1">1</text:sequence></text:span><text:span text:style-name="T42">: Mappa della webapp ROL (prima bozz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0" loext:marker-style-name="T23"/>
      <text:p text:style-name="P220" loext:marker-style-name="T23"/>
      <text:p text:style-name="P220" loext:marker-style-name="T23"/>
      <text:p text:style-name="P220" loext:marker-style-name="T23"/>
      <text:p text:style-name="P220" loext:marker-style-name="T23"/>
      <text:p text:style-name="P220" loext:marker-style-name="T23"/>
      <text:p text:style-name="P220" loext:marker-style-name="T23"/>
      <text:p text:style-name="P220" loext:marker-style-name="T23"/>
      <text:p text:style-name="P220" loext:marker-style-name="T23"/>
      <text:p text:style-name="P220" loext:marker-style-name="T23"/>
      <text:p text:style-name="P220" loext:marker-style-name="T23"/>
      <text:p text:style-name="P220" loext:marker-style-name="T23"/>
      <text:p text:style-name="P220" loext:marker-style-name="T23"/>
      <text:p text:style-name="P220" loext:marker-style-name="T23"/>
      <text:p text:style-name="P220" loext:marker-style-name="T23"/>
      <text:p text:style-name="P220" loext:marker-style-name="T23"/>
      <text:p text:style-name="P220" loext:marker-style-name="T23"/>
      <text:p text:style-name="P220" loext:marker-style-name="T23"/>
      <text:p text:style-name="P220" loext:marker-style-name="T23"/>
      <text:p text:style-name="P220" loext:marker-style-name="T23"/>
      <text:p text:style-name="P220" loext:marker-style-name="T23"/>
      <text:p text:style-name="P220" loext:marker-style-name="T23"/>
      <text:p text:style-name="P220" loext:marker-style-name="T23"/>
      <text:p text:style-name="P220" loext:marker-style-name="T23"/>
      <text:p text:style-name="P220" loext:marker-style-name="T23"/>
      <text:p text:style-name="P220" loext:marker-style-name="T23"/>
      <text:p text:style-name="P220" loext:marker-style-name="T23"/>
      <text:p text:style-name="P220" loext:marker-style-name="T23"/>
      <text:p text:style-name="P220" loext:marker-style-name="T23"/>
      <text:p text:style-name="P220" loext:marker-style-name="T23"/>
      <text:p text:style-name="P204" loext:marker-style-name="T76"/>
      <text:p text:style-name="P204" loext:marker-style-name="T76"/>
      <text:p text:style-name="P205" loext:marker-style-name="T76"/>
      <text:p text:style-name="P12" loext:marker-style-name="T76"><text:span text:style-name="T29">Tuttavia, dopo un’attenta analisi della mappatura esistente, si è ritenuto che fosse necessario creare un nuovo dizionario dei processi, dal momento che il precedente dizionario, basato sul progetto </text:span><text:span text:style-name="T31">Good Practice</text:span><text:span text:style-name="T29">, non si attagliava bene al contesto della valutazione dei processi in rapporto al rischio corruttivo.</text:span></text:p>
      <text:p text:style-name="P204" loext:marker-style-name="T76"/>
      <text:p text:style-name="P12" loext:marker-style-name="T76">Il dizionario dei processi organizzativi esistente nasceva infatti con lo scopo di mappare l’attività dell’organizzazione al fine di tracciare e “fotografare” l’attività prodotta dagli uffici, mentre il progetto della mappatura dei processi in rapporto al rischio corruttivo può richiedere l’approfondimento di specifici aspetti, quindi di spacchettare magari quello che era un macroprocesso organizzativo in più macroprocessi distinti; pertanto, il dizionario dei processi rispetto al rischio corruttivo risulta trasversale e “incompatibile” rispetto a quello dei processi organizzativi. <text:span text:style-name="T76"/></text:p>
      <text:p text:style-name="P220" loext:marker-style-name="T23"/>
      <text:p text:style-name="P12" loext:marker-style-name="T76"><text:span text:style-name="T29">Di conseguenza, pur partendo ed ereditando il database dei processi esistenti, è stato necessario creare ulteriori entità, con lo scopo di memorizzare un nuovo dizionario, peraltro articolato su una granularità a 3 livelli (macroprocesso, processo e sottoprocesso) - cui si aggiunge un ulteriore aggregatore: l’area di rischio - piuttosto che su due, come nella mappatura dei processi organizzativi esistente. </text:span><text:span text:style-name="T39"/></text:p>
      <text:p text:style-name="P12" loext:marker-style-name="T76"><text:span text:style-name="T29">Di più, è stato previsto addirittura un ulteriore livello, quello delle attività, o fasi, che sono trasversali a processi e sottoprocessi. </text:span><text:span text:style-name="T39"/></text:p>
      <text:p text:style-name="P214" loext:marker-style-name="T29"/>
      <text:p text:style-name="P12" loext:marker-style-name="T76"><text:span text:style-name="T29">Il connettore tra i processi dell’anticorruzione e quelli organizzativi cui si faceva riferimento sopra è costituito da un’apposita entità debole associativa, in cui ogni riga è costituita dall’identificativo del sottoprocesso organizzativo cui corrisponde l’identificativo del sottoprocesso della mappatura anticorruttiva. </text:span><text:span text:style-name="T39"/></text:p>
      <text:p text:style-name="P214" loext:marker-style-name="T29"/>
      <text:list xml:id="list172213901130966" text:continue-list="list172213337994685" text:style-name="WWNum89">
        <text:list-item>
          <text:list>
            <text:list-item>
              <text:list>
                <text:list-item>
                  <text:h text:style-name="P69" text:outline-level="3" loext:marker-style-name="T1"><text:bookmark-start text:name="__RefHeading___Toc1035109302_Copy_1"/><text:span text:style-name="T66">L’INTERVISTA</text:span><text:bookmark-end text:name="__RefHeading___Toc1035109302_Copy_1"/><text:span text:style-name="T66"/></text:h>
                </text:list-item>
              </text:list>
            </text:list-item>
          </text:list>
        </text:list-item>
      </text:list>
      <text:p text:style-name="P10">Dopo aver caricato le strutture di organigramma ed effettuato la mappatura dei processi, si passa all’intervista (o audit), costituita da una serie di quesiti rivolti alle strutture che erogano i processi; le risposte ai quesiti, volte a investigare il modo in cui i processi stessi vengono salvaguardati e monitorati rispetto al rischio corruttivo, vengono “macinate” da specifici algoritmi di calcolo del rischio, producendo i valori di rischio ottenuti dal processo su specifici indicatori.</text:p>
      <text:p text:style-name="P206" loext:marker-style-name="T76"/>
      <text:p text:style-name="P10">Per effettuare un audit, <text:span text:style-name="T29">si identifica anzitutto la struttura intervistata e il processo di cui si vuole quantificare l’esposizione al rischio, tramite un apposito wizard (v. Figura 2).</text:span></text:p>
      <text:p text:style-name="P208" loext:marker-style-name="T39"/>
      <text:p text:style-name="P12">Il gestore dell’intervista, che raccoglie le informazioni, identifica la struttura che sta intervistando e il processo o il sottoprocesso esaminato (non è sufficiente identificare il macroprocesso ma è necessario scegliere almeno un processo). Quindi clicca su Invio.</text:p>
      <text:p text:style-name="P220" loext:marker-style-name="T23"><draw:custom-shape text:anchor-type="char" draw:z-index="10" draw:name="Cornice5" draw:style-name="gr31" draw:text-style-name="P265" svg:width="10.632cm" svg:height="11cm" svg:x="3.478cm" svg:y="0.31cm"><text:p text:style-name="P28" loext:marker-style-name="T43"><text:span text:style-name="T86"><draw:frame draw:style-name="fr2" draw:name="Immagine3" text:anchor-type="as-char" svg:width="10.629cm" svg:height="9.601cm" draw:z-index="43"><draw:image xlink:href="Pictures/1000000100000205000001D367C10DED.png" xlink:type="simple" xlink:show="embed" xlink:actuate="onLoad" draw:mime-type="image/png"/></draw:frame></text:span><text:span text:style-name="T42">Figura </text:span><text:span text:style-name="T42"><text:sequence text:ref-name="refFigura1" text:name="Figura" text:formula="ooow:Figura+1" style:num-format="1">2</text:sequence></text:span><text:span text:style-name="T42">: Prototipo dell'interfaccia dei primi step di inserimento di una nuova intervist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220" loext:marker-style-name="T23"/>
      <text:p text:style-name="P12"/>
      <text:p text:style-name="P12" loext:marker-style-name="T76"><text:span text:style-name="T29">Questa azione produce la generazione dei quesiti, raggruppati in ambiti di analisi (v. Figura 3).</text:span><text:span text:style-name="T39"/></text:p>
      <text:p text:style-name="P204" loext:marker-style-name="T76"/>
      <text:p text:style-name="P12" loext:marker-style-name="T76"><text:span text:style-name="T29">A questo punto, l’intervistatore deve rivolgere almeno una parte di questi quesiti al responsabile di struttura intervistato, e riportare le risposte fornite. </text:span><text:span text:style-name="T39"/></text:p>
      <text:p text:style-name="P12" loext:marker-style-name="T76"><text:span text:style-name="T29">Per ogni quesito, inoltre, è compilabile facoltativamente un campo note.</text:span><text:span text:style-name="T39"/></text:p>
      <text:p text:style-name="P214" loext:marker-style-name="T29"/>
      <text:p text:style-name="P12" loext:marker-style-name="T76"><text:span text:style-name="T29">Ogni volta che si procede ad effettuare un’intervista con una struttura, l’applicazione mostra al gestore tutti i quesiti, </text:span><text:span text:style-name="T30">non soltanto un sottoinsieme</text:span><text:span text:style-name="T29">. Potrebbe, infatti, verificarsi che, nel corso dell’intervista, alcune riposte o commenti dell’intervistato, riportati poi nelle note dal gestore, attivino l’attenzione del gestore su aspetti che in precedenza non aveva pensato di investigare, ma che si rende conto che è opportuno invece approfondire. Pertanto, i quesiti mostrati sono ad ogni intervista l’elenco completo, ma tuttavia non è obbligatorio rispondere a tutti.</text:span></text:p>
      <text:p text:style-name="P214" loext:marker-style-name="T29"/>
      <text:p text:style-name="P12" loext:marker-style-name="T76"><text:span text:style-name="T29">Dal punto di vista dello schema logico, l’entità </text:span><text:span text:style-name="T31">quesito</text:span><text:span text:style-name="T29"> è collegata a tre enumerativi dinamici: </text:span></text:p>
      <text:list text:style-name="WWNum53">
        <text:list-item>
          <text:p text:style-name="P215">il primo è l’ambito di analisi (l’argomento, ovvero una semplice “tag” del quesito, in base al quale i quesiti stessi possono essere raggruppati nella pagina in riquadri, colori, etc.); </text:p>
        </text:list-item>
        <text:list-item>
          <text:p text:style-name="P215">il secondo è il tipo di quesito. </text:p>
        </text:list-item>
      </text:list>
      <text:p text:style-name="P115" loext:marker-style-name="T1"><draw:custom-shape text:anchor-type="char" draw:z-index="20" draw:name="Cornice6" draw:style-name="gr26" draw:text-style-name="P265" svg:width="9.219cm" svg:height="12.729cm" svg:x="4.187cm" svg:y="3.709cm"><text:p text:style-name="P28" loext:marker-style-name="T43"><text:span text:style-name="T86"><draw:frame draw:style-name="fr2" draw:name="Immagine4" text:anchor-type="as-char" svg:width="9.216cm" svg:height="11.329cm" draw:z-index="55"><draw:image xlink:href="Pictures/10000001000002A00000033A9B55BA1F.png" xlink:type="simple" xlink:show="embed" xlink:actuate="onLoad" draw:mime-type="image/png"/></draw:frame></text:span><text:span text:style-name="T42">Figura </text:span><text:span text:style-name="T42"><text:sequence text:ref-name="refFigura2" text:name="Figura" text:formula="ooow:Figura+1" style:num-format="1">3</text:sequence></text:span><text:span text:style-name="T42">: Prototipo della funzionalità di compilazione risposte ai quesit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 loext:marker-style-name="T76"><text:soft-page-break/><text:span text:style-name="T29">Possono esistere, infatti, svariati tipi di quesiti. </text:span><text:span text:style-name="T39"/></text:p>
      <text:p text:style-name="P12" loext:marker-style-name="T76"><text:span text:style-name="T29">Il primo tipo è rappresentato da quesiti di tipo “On/Off”, ovvero “Si/No”, vale a dire quesiti misurabili su scala nominale: la tipologia delle risposte a questi quesiti sarà quindi di tipo qualitativo. </text:span><text:span text:style-name="T39"/></text:p>
      <text:p text:style-name="P12" loext:marker-style-name="T76"><text:span text:style-name="T29">Ad esempio: </text:span><text:span text:style-name="T31">“Si sono verificati fino ad oggi</text:span><text:span text:style-name="T31"><text:note text:id="ftn1" text:note-class="footnote"><text:note-citation>1</text:note-citation><text:note-body><text:p text:style-name="Footnote" loext:marker-style-name="T1"><text:span text:style-name="T6">Oggi</text:span><text:span text:style-name="T1"> corrisponde alla data in cui viene fatta l’intervista, inserita in automatico nella base di dati tramite lo speciale valore </text:span><text:span text:style-name="T147">CURRENT_DATE</text:span></text:p></text:note-body></text:note></text:span><text:span text:style-name="T31"> episodi di Whistleblowing?”</text:span><text:span text:style-name="T29"> </text:span></text:p>
      <text:p text:style-name="P214" loext:marker-style-name="T29"/>
      <text:p text:style-name="P214" loext:marker-style-name="T29"/>
      <text:p text:style-name="P12" loext:marker-style-name="T76"><text:span text:style-name="T29">A questa domanda si può rispondere o “si” oppure “no”, quindi le risposte stesse non sono espresse in termini di “quantità” ma solo di “qualità”.</text:span><text:span text:style-name="T39"/></text:p>
      <text:p text:style-name="P115" loext:marker-style-name="T1"/>
      <text:p text:style-name="P12" loext:marker-style-name="T76"><text:span text:style-name="T29">Un altro tipo di quesiti è rappresentato da quesiti di tipo quantitativo. </text:span><text:span text:style-name="T39"/></text:p>
      <text:p text:style-name="P12" loext:marker-style-name="T76"><text:span text:style-name="T29">P.es., se si chiedesse </text:span><text:span text:style-name="T31">“Quanti episodi di Whistleblowing si sono verificati fino ad oggi?”</text:span><text:span text:style-name="T29"> la risposta sarebbe costituita da un numero appartenente ad N (l’insieme dei numeri naturali); quindi questa risposta è misurabile su una scala a rapporti.</text:span></text:p>
      <text:p text:style-name="P214" loext:marker-style-name="T29"/>
      <text:p text:style-name="P214" loext:marker-style-name="T29"/>
      <text:p text:style-name="P12" loext:marker-style-name="T76"><text:span text:style-name="T29">Un ulteriore tipo di quesito è rappresentato da domande che necessitano di una risposta descrittiva.</text:span><text:span text:style-name="T39"/></text:p>
      <text:p text:style-name="P214" loext:marker-style-name="T29"/>
      <text:list text:style-name="WWNum54">
        <text:list-item>
          <text:p text:style-name="P216">Il terzo enumerativo dinamico cui è collegato il quesito è la “formulazione del quesito”. Nella figura seguente viene riportata la struttura di questa entità.</text:p>
        </text:list-item>
      </text:list>
      <text:p text:style-name="P209" loext:marker-style-name="T39"/>
      <text:p text:style-name="P220" loext:marker-style-name="T23"><draw:custom-shape text:anchor-type="char" draw:z-index="22" draw:name="Cornice7" draw:style-name="gr24" draw:text-style-name="P265" svg:width="17.592cm" svg:height="7.72cm" svg:x="-0.002cm" svg:y="0.002cm"><text:p text:style-name="P30" loext:marker-style-name="T43"><draw:frame draw:style-name="fr10" draw:name="Immagine5" text:anchor-type="as-char" svg:width="17.59cm" svg:height="5.99cm" draw:z-index="87"><draw:image xlink:href="Pictures/10000000000003280000012AF077070F.png" xlink:type="simple" xlink:show="embed" xlink:actuate="onLoad" draw:mime-type="image/png"/></draw:frame></text:p><text:p text:style-name="P28" loext:marker-style-name="T43"><text:span text:style-name="T42">Figura </text:span><text:span text:style-name="T42"><text:sequence text:ref-name="refFigura3" text:name="Figura" text:formula="ooow:Figura+1" style:num-format="1">4</text:sequence></text:span><text:span text:style-name="T42">: La tabella "tipo_formulazion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 loext:marker-style-name="T76"><text:span text:style-name="T29">La formulazione del quesito esprime il “verso” dell’identificazione di un dato rischio da parte di un dato quesito. </text:span><text:span text:style-name="T39"/></text:p>
      <text:p text:style-name="P12" loext:marker-style-name="T76"><text:span text:style-name="T29">Questo dato è necessario perché una stessa risposta può identificare un rischio alto o un rischio basso a seconda di come è formulata la domanda.</text:span><text:span text:style-name="T39"/></text:p>
      <text:p text:style-name="P214" loext:marker-style-name="T29"><text:soft-page-break/></text:p>
      <text:p text:style-name="P12" loext:marker-style-name="T76"><text:span text:style-name="T29">Ad esempio: il quesito: </text:span><text:span text:style-name="T39"/></text:p>
      <text:p text:style-name="P135" loext:marker-style-name="T80"><text:span text:style-name="T32">“Si sono verificati in passato provvedimenti disciplinari legati a comportamenti che hanno esposto al rischio corruttivo?” </text:span></text:p>
      <text:p text:style-name="P12" loext:marker-style-name="T76"><text:span text:style-name="T29">è un quesito di tipo “Vero/Falso” (quindi si risponde o sì o no). Se si risponde sì, il quesito è fortemente identificante un rischio corruttivo, perché è evidente che se in passato ci sono stati episodi del genere, c’è da aspettarsi che se ne possano verificare ulteriori. Quindi la “quota parte” di identificazione di un dato rischio sarà alta (p.es. 80%). Ma per capire se è la risposta “sì” o la risposta “no” quella che fa scattare il rischio, bisogna guardare come è formulato il quesito; p.es. questo quesito è formulato in modo affermativo, cioè la formulazione che identifica il rischio è la risposta sì (p.es. “id_formulazione_identificante” = 1).</text:span><text:span text:style-name="T39"/></text:p>
      <text:p text:style-name="P12" loext:marker-style-name="T76"><text:span text:style-name="T29">Invece, al quesito: </text:span><text:span text:style-name="T39"/></text:p>
      <text:p text:style-name="P135" loext:marker-style-name="T80"><text:span text:style-name="T145">“Il processo è sottoposto al vaglio di due distinti soggetti verificatori?” </text:span><text:span text:style-name="T80"/></text:p>
      <text:p text:style-name="P12" loext:marker-style-name="T76"><text:span text:style-name="T29">sarà la risposta “no” a far scattare il rischio, cioè la risposta negativa, perché la risposta che fa scattare l’allarme è la risposta “no”, non la risposta “si”. </text:span><text:span text:style-name="T39"/></text:p>
      <text:p text:style-name="P214" loext:marker-style-name="T29"/>
      <text:p text:style-name="P12" loext:marker-style-name="T76"><text:span text:style-name="T29">Quindi la formulazione del quesito è indicativa di quale è la risposta (o l’ammontare, nel caso di quesiti con risposta numerica) collegata al rischio. </text:span><text:span text:style-name="T39"/></text:p>
      <text:p text:style-name="P214" loext:marker-style-name="T29"/>
      <text:p text:style-name="P12" loext:marker-style-name="T76"><text:span text:style-name="T29">L’identificazione del rischio dalla risposta in funzione del modo in cui è formulata la domanda vale infatti anche per quesiti di tipo quantitativo. </text:span><text:span text:style-name="T39"/></text:p>
      <text:p text:style-name="P12" loext:marker-style-name="T76"><text:span text:style-name="T29">Ad esempio, se il quesito fosse: </text:span><text:span text:style-name="T39"/></text:p>
      <text:p text:style-name="P135" loext:marker-style-name="T80"><text:span text:style-name="T145">“Quanti soggetti verificatori controllano il processo dal punto di vista del rischio corruttivo?” </text:span><text:span text:style-name="T80"/></text:p>
      <text:p text:style-name="P12" loext:marker-style-name="T76"><text:span text:style-name="T29">la risposta che fa scattare l’allarme sarebbe 0 mentre 1 potrebbe far scattare un rischio moderato, mentre 2 potrebbe correlare la risposta a un rischio basso.</text:span><text:span text:style-name="T39"/></text:p>
      <text:p text:style-name="P209" loext:marker-style-name="T39"/>
      <text:p text:style-name="P12" loext:marker-style-name="T76"><text:span text:style-name="T29">Una volta compilati tutti i quesiti, o comunque quelli che il gestore ritiene opportuno rivolgere, il gestore avvia il workflow di calcolo in tempo reale del rischio, scatenando gli algoritmi di calcolo dei valori degli indicatori di rischio.</text:span><text:span text:style-name="T39"/></text:p>
      <text:p text:style-name="P209" loext:marker-style-name="T39"/>
      <text:p text:style-name="P200" loext:marker-style-name="T78"/>
      <text:list xml:id="list172212778291438" text:continue-list="list172213901130966" text:style-name="WWNum90">
        <text:list-item>
          <text:list>
            <text:list-item>
              <text:list>
                <text:list-item>
                  <text:h text:style-name="P70" text:outline-level="3" loext:marker-style-name="T1"><text:bookmark-start text:name="__RefHeading___Toc10351093021"/><text:span text:style-name="T26">IL QUARTO LIVELLO DI DESCRIZIONE DEI PROCESSI</text:span><text:bookmark-end text:name="__RefHeading___Toc10351093021"/><text:span text:style-name="T26"/></text:h>
                </text:list-item>
              </text:list>
            </text:list-item>
          </text:list>
        </text:list-item>
      </text:list>
      <text:p text:style-name="P10" loext:marker-style-name="T76"><text:span text:style-name="T29">In precedenza è stata esaminata la strutturazione dei processi censiti dall’anticorruzione determinandone 3 livelli:</text:span><text:span text:style-name="T39"/></text:p>
      <text:list text:style-name="WWNum5">
        <text:list-item>
          <text:p text:style-name="P142" loext:marker-style-name="T76"><text:span text:style-name="T29">macroprocesso</text:span><text:span text:style-name="T39"/></text:p>
        </text:list-item>
        <text:list-item>
          <text:p text:style-name="P142" loext:marker-style-name="T76"><text:span text:style-name="T29">processo</text:span><text:span text:style-name="T39"/></text:p>
        </text:list-item>
        <text:list-item>
          <text:p text:style-name="P142" loext:marker-style-name="T76"><text:span text:style-name="T29">sottoprocesso</text:span><text:span text:style-name="T39"/></text:p>
        </text:list-item>
      </text:list>
      <text:p text:style-name="P208" loext:marker-style-name="T39"/>
      <text:p text:style-name="P10" loext:marker-style-name="T76"><text:span text:style-name="T29">Tuttavia vi è un quarto livello che bisogna sicuramente rappresentare e che corrisponde alle fasi (anche chiamate “attività”) in cui i processi (ed eventualmente i sottoprocessi) si articolano.</text:span><text:span text:style-name="T39"/></text:p>
      <text:p text:style-name="P208" loext:marker-style-name="T39"><text:soft-page-break/></text:p>
      <text:p text:style-name="P10" loext:marker-style-name="T76"><text:span text:style-name="T29">Nella letteratura sulla mappatura dei processi, normalmente le fasi costituiscono un’ulteriore specificazione di dettaglio dell’ultimo livello di descrizione dei processi, quindi, nel caso specifico, dovrebbero essere l’articolazione interna dei sottoprocessi. Siccome, tuttavia, nel dizionario dei processi censiti a fini anticorruttivi i sottoprocessi sono stati previsti ma non identificati fin da subito, si è deciso di procedere associando le fasi sia ai processi sia ai sottoprocessi, in modo ortogonale. </text:span><text:span text:style-name="T39"/></text:p>
      <text:p text:style-name="P208" loext:marker-style-name="T39"/>
      <text:p text:style-name="P10" loext:marker-style-name="T76"><text:span text:style-name="T29">Una singola fase deve avere almeno un processo associato (altrimenti non avrebbe senso la sua esistenza) e, al più, può essere associata ad un solo processo (vi possono essere fasi aventi lo stesso nome, ma si tratta in tal caso di semplici omonimie).</text:span><text:span text:style-name="T39"/></text:p>
      <text:p text:style-name="P10" loext:marker-style-name="T76"><text:span text:style-name="T29">Il processo censito dall’anticorruzione, dal canto suo, può avere nessuna o molte fasi associate.</text:span><text:span text:style-name="T39"/></text:p>
      <text:p text:style-name="P10" loext:marker-style-name="T76"><text:span text:style-name="T29">(Stesso tipo di relazione sussiste tra la fase ed il livello di maggior dettaglio, ovvero il sottoprocesso censito con finalità anticorruttiva. Nel contesto di questa analisi - tranne ove specificamente indicato - il termine “processo” è utilizzato per designare, indifferentemente, processi e sottoprocessi censiti a fini anticorruttivi).</text:span><text:span text:style-name="T39"/></text:p>
      <text:p text:style-name="P206" loext:marker-style-name="T76"/>
      <text:p text:style-name="P221" loext:marker-style-name="T23"><draw:custom-shape text:anchor-type="char" draw:z-index="39" draw:name="Cornice1" draw:style-name="gr18" draw:text-style-name="P265" svg:width="12.284cm" svg:height="3.601cm" svg:x="2.653cm" svg:y="0.002cm"><text:p text:style-name="P28" loext:marker-style-name="T148"><text:span text:style-name="T86"><draw:frame draw:style-name="fr9" draw:name="Immagine6" text:anchor-type="as-char" svg:width="12.28cm" svg:height="2.2cm" draw:z-index="116"><draw:image xlink:href="Pictures/10000001000001D100000054F618CF78.png" xlink:type="simple" xlink:show="embed" xlink:actuate="onLoad" draw:mime-type="image/png"/></draw:frame></text:span><text:span text:style-name="T87">Figura </text:span><text:span text:style-name="T87"><text:sequence text:ref-name="refFigura4" text:name="Figura" text:formula="ooow:Figura+1" style:num-format="1">5</text:sequence></text:span><text:span text:style-name="T87">: Cardinalità della partecipazione delle due entità PROCESSO e FASE alla relativa associazion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1" loext:marker-style-name="T23"/>
      <text:p text:style-name="P107" loext:marker-style-name="T66"/>
      <text:p text:style-name="P220" loext:marker-style-name="T23"/>
      <text:p text:style-name="P220" loext:marker-style-name="T23"/>
      <text:p text:style-name="P220" loext:marker-style-name="T23"/>
      <text:p text:style-name="P220" loext:marker-style-name="T23"/>
      <text:p text:style-name="P220" loext:marker-style-name="T23"/>
      <text:p text:style-name="P221" loext:marker-style-name="T23"/>
      <text:p text:style-name="P221" loext:marker-style-name="T23"/>
      <text:p text:style-name="P143" loext:marker-style-name="T76"><text:span text:style-name="T90">Per quanto riguarda invece il livello di aggregazione maggiore, non è stata stabilita la possibilità di strutturare in fasi un </text:span><text:span text:style-name="T92">macroprocesso</text:span><text:span text:style-name="T90"> perché questo è di livello troppo alto per suddividerlo direttamente in fasi e il suo “spacchettamento” identificherà quindi processi, non fasi.</text:span></text:p>
      <text:p text:style-name="P220" loext:marker-style-name="T23"/>
      <text:p text:style-name="P220" loext:marker-style-name="T23"/>
      <text:p text:style-name="P12" loext:marker-style-name="T76"><text:span text:style-name="T29">Un’altra associazione si può avere </text:span><text:span text:style-name="T30">tra la fase ed il rischio corruttivo</text:span><text:span text:style-name="T29">; è infatti possibile pensare di associare, </text:span><text:span text:style-name="T30">facoltativamente</text:span><text:span text:style-name="T29">, una specifica fase ad uno specifico rischio corruttivo. A differenza della relazione tra il processo e la fase, quella tra il rischio e la fase è di tipo </text:span><text:span text:style-name="T31">n : m</text:span><text:span text:style-name="T29"> dal momento che non solo uno stesso rischio può essere associato a più fasi, ma anche una specifica fase può essere associata a più rischi. La relazione, quindi, va normalizzata.</text:span></text:p>
      <text:p text:style-name="P209" loext:marker-style-name="T39"/>
      <text:p text:style-name="P12" loext:marker-style-name="T76"><text:span text:style-name="T29">La relazione che sussiste </text:span><text:span text:style-name="T30">tra la fase e la struttura</text:span><text:span text:style-name="T29"> ha il compito di mappare quale/i struttura/e interviene/intervengono, in qualità di “struttura erogante”, nell’attuazione della fase. </text:span></text:p>
      <text:p text:style-name="P12" loext:marker-style-name="T76"><text:span text:style-name="T29">Su una stessa fase potrebbero contribuire più strutture, mentre su un’altra fase potrebbe non esservi il contributo di alcuna struttura “gregaria” ma solo della struttura “capofila”, ovvero di quella che eroga il processo. Anche in quest’ultimo caso, però, l’associazione va valorizzata, perché non si può assumere a </text:span><text:soft-page-break/><text:span text:style-name="T29">priori che la struttura capofila sia sempre associata a ogni fase di un processo che eroga; una, o più, delle fasi, infatti, potrebbero essere in carico a strutture che non hanno niente a che fare con la struttura che eroga il processo. </text:span><text:span text:style-name="T39"/></text:p>
      <text:p text:style-name="P220" loext:marker-style-name="T23"/>
      <text:p text:style-name="P220" loext:marker-style-name="T23"><draw:custom-shape text:anchor-type="char" draw:z-index="54" draw:name="Cornice9" draw:style-name="gr12" draw:text-style-name="P265" svg:width="12.357cm" svg:height="3.804cm" svg:x="2.616cm" svg:y="0.002cm"><text:p text:style-name="P28" loext:marker-style-name="T83"><text:span text:style-name="T86"><draw:frame draw:style-name="fr2" draw:name="Immagine10" text:anchor-type="as-char" svg:width="12.356cm" svg:height="2.381cm" draw:z-index="117"><draw:image xlink:href="Pictures/10000001000001D30000005AAD0BD790.png" xlink:type="simple" xlink:show="embed" xlink:actuate="onLoad" draw:mime-type="image/png"/></draw:frame></text:span><text:span text:style-name="T95">Figura </text:span><text:span text:style-name="T95"><text:sequence text:ref-name="refFigura5" text:name="Figura" text:formula="ooow:Figura+1" style:num-format="1">6</text:sequence></text:span><text:span text:style-name="T95">: Cardinalità della partecipazione delle due entità STRUTTURA e FASE alla relativa associazion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0" loext:marker-style-name="T23"/>
      <text:p text:style-name="P220" loext:marker-style-name="T23"/>
      <text:p text:style-name="P220" loext:marker-style-name="T23"/>
      <text:p text:style-name="P220" loext:marker-style-name="T23"/>
      <text:p text:style-name="P220" loext:marker-style-name="T23"/>
      <text:p text:style-name="P220" loext:marker-style-name="T23"/>
      <text:p text:style-name="P220" loext:marker-style-name="T23"/>
      <text:p text:style-name="P220" loext:marker-style-name="T23"/>
      <text:p text:style-name="P12" loext:marker-style-name="T76"><text:span text:style-name="T29">Quindi questa relazione va valorizzata esplicitamente anche per la struttura capofila; in pratica, dal punto di vista della fase non ha senso la distinzione tra struttura capofila e struttura gregaria: una fase deve essere sempre associata ad almeno una struttura, che è quella che la eroga; che poi tale struttura coincida con la struttura che sovrintende al processo o meno, non ha alcun significato a livello dell’associazione tra la fase e la struttura stessa.</text:span><text:span text:style-name="T39"/></text:p>
      <text:p text:style-name="P209" loext:marker-style-name="T39"/>
      <text:p text:style-name="P12" loext:marker-style-name="T76"><text:span text:style-name="T33">Altre entità introdotte sono state l’INPUT <text:s/>e l’OUTPUT. Si tratta degli elementi che, negli schemi classici di mappatura dei processi organizzativi, di tipo ingegneristico, rispettivamente danno origine al processo stesso e rappresentano i risultati prodotti dal processo.</text:span><text:span text:style-name="T40"/></text:p>
      <text:p text:style-name="P222" loext:marker-style-name="T25"/>
      <text:p text:style-name="P116" loext:marker-style-name="T1"><draw:custom-shape text:anchor-type="char" draw:z-index="55" draw:name="Cornice8" draw:style-name="gr11" draw:text-style-name="P265" svg:width="17.59cm" svg:height="10.24cm" svg:x="0cm" svg:y="0.002cm"><text:p text:style-name="P28" loext:marker-style-name="T148"><text:span text:style-name="T86"><draw:frame draw:style-name="fr2" draw:name="Immagine9" text:anchor-type="as-char" svg:width="17.59cm" svg:height="9.329cm" draw:z-index="118"><draw:image xlink:href="Pictures/10000000000003C90000020260706662.png" xlink:type="simple" xlink:show="embed" xlink:actuate="onLoad" draw:mime-type="image/png"/></draw:frame></text:span><text:span text:style-name="T87">Figura </text:span><text:span text:style-name="T87"><text:sequence text:ref-name="refFigura6" text:name="Figura" text:formula="ooow:Figura+1" style:num-format="1">7</text:sequence></text:span><text:span text:style-name="T87">: Il modello ingegneristico dei processi organizzativi (Fonte: CEPAS 200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4" loext:marker-style-name="T76"><text:soft-page-break/><text:span text:style-name="T33">Un input è caratterizzato, oltre che dai normali attributi, da una relazione verso i processi di tipo </text:span><text:span text:style-name="T31">n : m</text:span><text:span text:style-name="T33">; infatti, non solo uno stesso processo potrebbe essere innescato da più di un input, ma anche uno stesso input potrebbe dare origine a più processi distinti; lo stesso discorso vale per il sottoprocesso. Invece, si è evitato di mappare la associazione tra il macroprocesso e l’input perché gli input dei macroprocessi potrebbero facilmente derivare dall’unione degli input dei loro processi: quindi, mappato il dato con granularità più fine, il dato aggregato potrà essere facilmente ricavato (in sostanza, gli input di un macroprocesso sono l’unione degli input dei suoi processi).</text:span></text:p>
      <text:p text:style-name="P223" loext:marker-style-name="T25"/>
      <text:p text:style-name="P223" loext:marker-style-name="T25"><draw:custom-shape text:anchor-type="char" draw:z-index="57" draw:name="Cornice10" draw:style-name="gr10" draw:text-style-name="P265" svg:width="12.383cm" svg:height="3.566cm" svg:x="2.604cm" svg:y="0.002cm"><text:p text:style-name="P28" loext:marker-style-name="T83"><text:span text:style-name="T86"><draw:frame draw:style-name="fr2" draw:name="Immagine11" text:anchor-type="as-char" svg:width="12.383cm" svg:height="2.143cm" draw:z-index="122"><draw:image xlink:href="Pictures/10000001000001D40000005162B9CE6D.png" xlink:type="simple" xlink:show="embed" xlink:actuate="onLoad" draw:mime-type="image/png"/></draw:frame></text:span><text:span text:style-name="T95">Figura </text:span><text:span text:style-name="T95"><text:sequence text:ref-name="refFigura7" text:name="Figura" text:formula="ooow:Figura+1" style:num-format="1">8</text:sequence></text:span><text:span text:style-name="T95">: Cardinalità della partecipazione delle due entità PROCESSO e INPUT alla relativa associazion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3" loext:marker-style-name="T25"/>
      <text:p text:style-name="P223" loext:marker-style-name="T25"/>
      <text:p text:style-name="P223" loext:marker-style-name="T25"/>
      <text:p text:style-name="P223" loext:marker-style-name="T25"/>
      <text:p text:style-name="P223" loext:marker-style-name="T25"/>
      <text:p text:style-name="P223" loext:marker-style-name="T25"/>
      <text:p text:style-name="P223" loext:marker-style-name="T25"/>
      <text:p text:style-name="P223" loext:marker-style-name="T25"/>
      <text:p text:style-name="P223" loext:marker-style-name="T25"/>
      <text:p text:style-name="P12" loext:marker-style-name="T76"><text:span text:style-name="T33">A differenza degli input, che non solo potrebbero concorrere in molti a scatenare uno stesso processo, ma potrebbero essere condivisi tra più processi, </text:span><text:span text:style-name="T34">il processo dell’output dev’essere unico</text:span><text:span text:style-name="T35">.</text:span></text:p>
      <text:p text:style-name="P217" loext:marker-style-name="T33"/>
      <text:p text:style-name="P12" loext:marker-style-name="T76"><text:span text:style-name="T33">Viceversa, uno stesso processo potrebbe produrre più di un risultato, per cui un processo può avere più output contemporaneamente</text:span><text:span text:style-name="T40"/></text:p>
      <text:p text:style-name="P210" loext:marker-style-name="T40"/>
      <text:p text:style-name="P223" loext:marker-style-name="T25"><draw:custom-shape text:anchor-type="char" draw:z-index="58" draw:name="Cornice11" draw:style-name="gr9" draw:text-style-name="P265" svg:width="12.383cm" svg:height="3.513cm" svg:x="2.604cm" svg:y="0.002cm"><text:p text:style-name="P28" loext:marker-style-name="T83"><text:span text:style-name="T86"><draw:frame draw:style-name="fr2" draw:name="Immagine12" text:anchor-type="as-char" svg:width="12.383cm" svg:height="2.09cm" draw:z-index="123"><draw:image xlink:href="Pictures/10000001000001D40000004F5D9F92E7.png" xlink:type="simple" xlink:show="embed" xlink:actuate="onLoad" draw:mime-type="image/png"/></draw:frame></text:span><text:span text:style-name="T95">Figura </text:span><text:span text:style-name="T95"><text:sequence text:ref-name="refFigura8" text:name="Figura" text:formula="ooow:Figura+1" style:num-format="1">9</text:sequence></text:span><text:span text:style-name="T95">: Cardinalità della partecipazione delle due entità PROCESSO e OUTPUT alla relativa associazion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3" loext:marker-style-name="T25"/>
      <text:p text:style-name="P223" loext:marker-style-name="T25"/>
      <text:p text:style-name="P223" loext:marker-style-name="T25"/>
      <text:p text:style-name="P223" loext:marker-style-name="T25"/>
      <text:p text:style-name="P223" loext:marker-style-name="T25"/>
      <text:p text:style-name="P223" loext:marker-style-name="T25"/>
      <text:p text:style-name="P223" loext:marker-style-name="T25"/>
      <text:p text:style-name="P210" loext:marker-style-name="T40"/>
      <text:p text:style-name="P12" loext:marker-style-name="T76"><text:span text:style-name="T33">Uno specifico output di uno specifico processo potrebbe fare da input di un altro processo, per cui vi è anche una relazione 1 : 1, facoltativa, tra queste due entità</text:span><text:span text:style-name="T40"/></text:p>
      <text:p text:style-name="P223" loext:marker-style-name="T25"/>
      <text:p text:style-name="P223" loext:marker-style-name="T25"/>
      <text:p text:style-name="P223" loext:marker-style-name="T25"><draw:custom-shape text:anchor-type="char" draw:z-index="62" draw:name="Cornice12" draw:style-name="gr8" draw:text-style-name="P265" svg:width="11.669cm" svg:height="3.751cm" svg:x="2.96cm" svg:y="0.002cm"><text:p text:style-name="P28" loext:marker-style-name="T83"><text:span text:style-name="T86"><draw:frame draw:style-name="fr2" draw:name="Immagine13" text:anchor-type="as-char" svg:width="11.668cm" svg:height="2.328cm" draw:z-index="124"><draw:image xlink:href="Pictures/10000001000001B90000005834D58F27.png" xlink:type="simple" xlink:show="embed" xlink:actuate="onLoad" draw:mime-type="image/png"/></draw:frame></text:span><text:span text:style-name="T95">Figura </text:span><text:span text:style-name="T95"><text:sequence text:ref-name="refFigura9" text:name="Figura" text:formula="ooow:Figura+1" style:num-format="1">10</text:sequence></text:span><text:span text:style-name="T95">: Cardinalità della partecipazione delle due entità INPUT e OUTPUT alla relativa associazion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3" loext:marker-style-name="T25"/>
      <text:p text:style-name="P223" loext:marker-style-name="T25"/>
      <text:p text:style-name="P223" loext:marker-style-name="T25"/>
      <text:p text:style-name="P223" loext:marker-style-name="T25"/>
      <text:p text:style-name="P223" loext:marker-style-name="T25"/>
      <text:p text:style-name="P223" loext:marker-style-name="T25"/>
      <text:p text:style-name="P223" loext:marker-style-name="T25"><text:soft-page-break/></text:p>
      <text:p text:style-name="P223" loext:marker-style-name="T25"/>
      <text:p text:style-name="P223" loext:marker-style-name="T25"/>
      <text:p text:style-name="P143" loext:marker-style-name="T76"><text:span text:style-name="T90">Input e Output sono enumerati in rispettive entità dizionario (registro degli input e registro degli output). </text:span></text:p>
      <text:p text:style-name="P143" loext:marker-style-name="T76"><text:span text:style-name="T90">Infatti, gli Input sono in relazione n : m con i processi. </text:span></text:p>
      <text:p text:style-name="P143" loext:marker-style-name="T76"><text:span text:style-name="T90">Anche gli Output, pur essendo in linea di massima legati a un solo processo, sono comunque stati implementati utilizzando una tabella di relazione tra output e processo, per cui </text:span><text:span text:style-name="T91">sia gli input sia gli output vanno riutilizzati</text:span><text:span text:style-name="T90"> (ciò che viene inserito ex-novo è una riga nella relativa relazione). </text:span></text:p>
      <text:p text:style-name="P143" loext:marker-style-name="T76"><text:span text:style-name="T90">In altri termini, </text:span><text:span text:style-name="T93">se un nuovo input da inserire su un processo si chiama come un input precedentemente inserito, va utilizzato l’input precedentemente inserito.</text:span></text:p>
      <text:p text:style-name="P143" loext:marker-style-name="T76"><text:span text:style-name="T93">Questo discorso vale anche per gli Output.</text:span></text:p>
      <text:p text:style-name="P220" loext:marker-style-name="T23"/>
      <text:p text:style-name="P225" loext:marker-style-name="T1"><text:span text:style-name="T84">NOTA: Tabella Input, campo “interno”, tipo boolean: se </text:span><text:span text:style-name="T146">true</text:span><text:span text:style-name="T84"> implica che l’input proviene da soggetti interni all’ateneo, se </text:span><text:span text:style-name="T146">false</text:span><text:span text:style-name="T84"> da soggetti esterni.</text:span></text:p>
      <text:p text:style-name="P220" loext:marker-style-name="T23"/>
      <text:p text:style-name="P220" loext:marker-style-name="T23"/>
      <text:p text:style-name="P220" loext:marker-style-name="T23"/>
      <text:p text:style-name="P226" loext:marker-style-name="T23"><draw:custom-shape text:anchor-type="char" draw:z-index="65" draw:name="Cornice13" draw:style-name="gr7" draw:text-style-name="P265" svg:width="17.287cm" svg:height="11.507cm" svg:x="0.152cm" svg:y="0.002cm"><text:p text:style-name="P32" loext:marker-style-name="T96"><draw:frame draw:style-name="fr2" draw:name="Immagine21" text:anchor-type="as-char" svg:width="8.186cm" svg:height="9.322cm" draw:z-index="125"><draw:image xlink:href="Pictures/100000010000012F00000165FD43F447.png" xlink:type="simple" xlink:show="embed" xlink:actuate="onLoad" draw:mime-type="image/png"/></draw:frame></text:p><text:p text:style-name="P33" loext:marker-style-name="T96"><text:span text:style-name="T96">Figura </text:span><text:span text:style-name="T96"><text:sequence text:ref-name="refFigura10" text:name="Figura" text:formula="ooow:Figura+1" style:num-format="1">11</text:sequence></text:span><text:span text:style-name="T96">: Nella tabella associativa tra output e processo_at si nota che a uno stesso processo corrispondono output diversi e anche che uno stesso output è generato da processi diversi, rappresentando una relazione n : 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3"><text:line-break/></text:span><text:span text:style-name="T23"/></text:p>
      <text:p text:style-name="P220" loext:marker-style-name="T23"/>
      <text:p text:style-name="P220" loext:marker-style-name="T23"><text:soft-page-break/></text:p>
      <text:list xml:id="list172212575600001" text:continue-list="list172212778291438" text:style-name="WWNum91">
        <text:list-item>
          <text:list>
            <text:list-item>
              <text:list>
                <text:list-item>
                  <text:h text:style-name="P71" text:outline-level="3" loext:marker-style-name="T1"><text:bookmark-start text:name="__RefHeading___Toc1035109302111"/><text:span text:style-name="T26">AMBITI DI ANALISI GENERICI E SPECIFICI</text:span><text:bookmark-end text:name="__RefHeading___Toc1035109302111"/><text:span text:style-name="T26"/></text:h>
                </text:list-item>
              </text:list>
            </text:list-item>
          </text:list>
        </text:list-item>
      </text:list>
      <text:p text:style-name="P10"><text:span text:style-name="T33">Quando si parla di ambiti di analisi, normalmente si intende ambiti generali (generici), tabella</text:span><text:span text:style-name="T25"> </text:span><text:span text:style-name="T46">ambito_analisi</text:span><text:span text:style-name="T25">, </text:span><text:span text:style-name="T33">che vengono presentati all’intervistatore a prescindere dalla struttura sondata e dal processo scelto.</text:span></text:p>
      <text:p text:style-name="P10" loext:marker-style-name="T76"><text:span text:style-name="T33">Tuttavia è possibile implementare un meccanismo che preveda di mostrare solo alcuni ambiti.</text:span><text:span text:style-name="T40"/></text:p>
      <text:p text:style-name="P10"><text:span text:style-name="T33">La tabella </text:span><text:span text:style-name="T46">ambito_specifico</text:span><text:span text:style-name="T33"> lega l’ambito di analisi al macroprocesso (e, volendo, anche al processo e al sottoprocesso) in modo che, scegliendo questi elementi, sia possibile visualizzare un contenuto dinamico.</text:span></text:p>
      <text:p text:style-name="P12" loext:marker-style-name="T82"><text:span text:style-name="T84">Questo meccanismo non è stato implementato.</text:span><text:span text:style-name="T82"/></text:p>
      <text:p text:style-name="P207" loext:marker-style-name="T82"/>
      <text:list xml:id="list172213756166673" text:continue-list="list172212575600001" text:style-name="WWNum92">
        <text:list-item>
          <text:list>
            <text:list-item>
              <text:list>
                <text:list-item>
                  <text:h text:style-name="P72" text:outline-level="3" loext:marker-style-name="T1"><text:bookmark-start text:name="__RefHeading___Toc10351093021111"/><text:span text:style-name="T26">I FATTORI ABILITANTI</text:span><text:bookmark-end text:name="__RefHeading___Toc10351093021111"/><text:span text:style-name="T26"/></text:h>
                </text:list-item>
              </text:list>
            </text:list-item>
          </text:list>
        </text:list-item>
      </text:list>
      <text:p text:style-name="P225" loext:marker-style-name="T76"><text:span text:style-name="T33">I fattori abilitanti sono elementi <text:s/>che concorrono all’individuazione delle misure di contrasto al rischio corruttivo.</text:span><text:span text:style-name="T40"/></text:p>
      <text:p text:style-name="P225" loext:marker-style-name="T76"><text:span text:style-name="T33">Di seguito il registro dei fattori abilitanti alla versione 2.67 dell’applicazione “Rischi On Line”.</text:span><text:span text:style-name="T40"/></text:p>
      <text:p text:style-name="P213" loext:marker-style-name="T40"/>
      <text:p text:style-name="P35" loext:marker-style-name="T1"><text:span text:style-name="T1">Tabella </text:span><text:span text:style-name="T1"><text:sequence text:ref-name="refTabella0" text:name="Tabella" text:formula="ooow:Tabella+1" style:num-format="1">1</text:sequence></text:span><text:span text:style-name="T1">: Il registro dei fattori abilitanti</text:span></text:p>
      <table:table table:name="Table2" table:style-name="Table2">
        <table:table-column table:style-name="Table2.A"/>
        <table:table-row table:style-name="Table2.1">
          <table:table-cell table:style-name="Table2.A1" office:value-type="string">
            <text:p text:style-name="P1" loext:marker-style-name="T1"><text:span text:style-name="T150">FATTORI ABILITANTI</text:span><text:span text:style-name="T150"/></text:p>
          </table:table-cell>
        </table:table-row>
        <table:table-row table:style-name="Table2.2">
          <table:table-cell table:style-name="Table2.A2" office:value-type="string">
            <text:p text:style-name="P227" loext:marker-style-name="T1"><text:span text:style-name="T151">alterazione, manipolazione e utilizzo improprio di informazioni e documentazione</text:span><text:span text:style-name="T151"/></text:p>
          </table:table-cell>
        </table:table-row>
        <table:table-row table:style-name="Table2.2">
          <table:table-cell table:style-name="Table2.A3" office:value-type="string">
            <text:p text:style-name="P227" loext:marker-style-name="T1"><text:span text:style-name="T151">eccessiva regolamentazione e scarsa chiarezza della normativa di riferimento</text:span><text:span text:style-name="T151"/></text:p>
          </table:table-cell>
        </table:table-row>
        <table:table-row table:style-name="Table2.4">
          <table:table-cell table:style-name="Table2.A3" office:value-type="string">
            <text:p text:style-name="P227" loext:marker-style-name="T1"><text:span text:style-name="T151">esercizio prolungato ed esclusivo della responsabilità di un processo da parte di pochi o di un unico soggetto</text:span><text:span text:style-name="T151"/></text:p>
          </table:table-cell>
        </table:table-row>
        <table:table-row table:style-name="Table2.2">
          <table:table-cell table:style-name="Table2.A3" office:value-type="string">
            <text:p text:style-name="P227" loext:marker-style-name="T1"><text:span text:style-name="T151">inadeguata diffusione della cultura della legalità</text:span><text:span text:style-name="T151"/></text:p>
          </table:table-cell>
        </table:table-row>
        <table:table-row table:style-name="Table2.2">
          <table:table-cell table:style-name="Table2.A3" office:value-type="string">
            <text:p text:style-name="P227" loext:marker-style-name="T1"><text:span text:style-name="T151">inadeguatezza o assenza di competenze del personale</text:span><text:span text:style-name="T151"/></text:p>
          </table:table-cell>
        </table:table-row>
        <table:table-row table:style-name="Table2.2">
          <table:table-cell table:style-name="Table2.A3" office:value-type="string">
            <text:p text:style-name="P227" loext:marker-style-name="T1"><text:span text:style-name="T151">mancanza di controlli</text:span><text:span text:style-name="T151"/></text:p>
          </table:table-cell>
        </table:table-row>
        <table:table-row table:style-name="Table2.2">
          <table:table-cell table:style-name="Table2.A3" office:value-type="string">
            <text:p text:style-name="P227" loext:marker-style-name="T1"><text:span text:style-name="T151">mancanza di misure di prevenzione del rischio</text:span><text:span text:style-name="T151"/></text:p>
          </table:table-cell>
        </table:table-row>
        <table:table-row table:style-name="Table2.2">
          <table:table-cell table:style-name="Table2.A3" office:value-type="string">
            <text:p text:style-name="P227" loext:marker-style-name="T1"><text:span text:style-name="T151">mancanza di strumenti informatici</text:span><text:span text:style-name="T151"/></text:p>
          </table:table-cell>
        </table:table-row>
        <table:table-row table:style-name="Table2.2">
          <table:table-cell table:style-name="Table2.A3" office:value-type="string">
            <text:p text:style-name="P227" loext:marker-style-name="T1"><text:span text:style-name="T151">mancanza di trasparenza</text:span><text:span text:style-name="T151"/></text:p>
          </table:table-cell>
        </table:table-row>
        <table:table-row table:style-name="Table2.2">
          <table:table-cell table:style-name="Table2.A3" office:value-type="string">
            <text:p text:style-name="P227" loext:marker-style-name="T1"><text:span text:style-name="T151">scarsa responsabilizzazione interna</text:span><text:span text:style-name="T151"/></text:p>
          </table:table-cell>
        </table:table-row>
        <table:table-row table:style-name="Table2.2">
          <table:table-cell table:style-name="Table2.A3" office:value-type="string">
            <text:p text:style-name="P227" loext:marker-style-name="T1"><text:span text:style-name="T151">uso improprio o distorto della discrezionalità</text:span><text:span text:style-name="T151"/></text:p>
          </table:table-cell>
        </table:table-row>
        <table:table-row table:style-name="Table2.2">
          <table:table-cell table:style-name="Table2.A13" office:value-type="string">
            <text:p text:style-name="P227" loext:marker-style-name="T1"><text:span text:style-name="T151">procedure interne poco efficienti</text:span><text:span text:style-name="T151"/></text:p>
          </table:table-cell>
        </table:table-row>
      </table:table>
      <text:p text:style-name="P229" loext:marker-style-name="T152"/>
      <text:p text:style-name="P211" loext:marker-style-name="T40"/>
      <text:p text:style-name="P10"><text:span text:style-name="T33">I fattori abilitanti sono elementi descrittivi, poco variabili nel tempo; per questo motivo non necessitano né di un codice univoco, né di una storicizzazione; quindi l’entità “fattore_abilitante” avrà semplicemente un i</text:span><text:span text:style-name="T46">d</text:span><text:span text:style-name="T33"> e un </text:span><text:span text:style-name="T46">nome</text:span><text:span text:style-name="T33"> e non dipenderà dalla rilevazione, e quindi sarà un’entità forte.</text:span></text:p>
      <text:p text:style-name="P211" loext:marker-style-name="T40"><text:soft-page-break/></text:p>
      <text:p text:style-name="P10" loext:marker-style-name="T76"><text:span text:style-name="T33">Per quanto riguarda, invece, la relazione tra i fattori abilitanti, i rischi ed i processi, la situazione è più complessa. È necessario generare una </text:span><text:span text:style-name="T34">relazione ternaria</text:span><text:span text:style-name="T33">, dal momento che il significato dell’associazione tra il fattore abilitante ed il processo è contestuale al rischio e non può essere considerata indipendentemente da questo (e viceversa).</text:span></text:p>
      <text:p text:style-name="P10" loext:marker-style-name="T76"><text:span text:style-name="T33">In altri termini, non è possibile associare un fattore abilitante ad un rischio e desumere i processi associati al fattore abilitante da quelli associati al rischio.</text:span><text:span text:style-name="T40"/></text:p>
      <text:p text:style-name="P10" loext:marker-style-name="T76"><text:span text:style-name="T33">Ricavare i processi associati al fattore abilitante dai processi già associati al rischio connesso al fattore stesso non permette di ottenere la granularità sufficiente per rappresentare il dato di realtà. </text:span><text:span text:style-name="T40"/></text:p>
      <text:p text:style-name="P223" loext:marker-style-name="T25"/>
      <text:p text:style-name="P223" loext:marker-style-name="T25"><draw:custom-shape text:anchor-type="char" draw:z-index="23" draw:name="Cornice16" draw:style-name="gr23" draw:text-style-name="P265" svg:width="16.486cm" svg:height="6.271cm" svg:x="0.815cm" svg:y="0.053cm"><text:p text:style-name="P32" loext:marker-style-name="T96"><draw:frame draw:style-name="fr8" draw:name="Immagine17" text:anchor-type="as-char" svg:width="9.199cm" svg:height="3.877cm" draw:z-index="37"><draw:image xlink:href="Pictures/10000001000005340000025C4D9B1F65.png" xlink:type="simple" xlink:show="embed" xlink:actuate="onLoad" draw:mime-type="image/png"/></draw:frame></text:p><text:p text:style-name="P33" loext:marker-style-name="T96"><text:span text:style-name="T96">Figura </text:span><text:span text:style-name="T96"><text:sequence text:ref-name="refFigura11" text:name="Figura" text:formula="ooow:Figura+1" style:num-format="1">12</text:sequence></text:span><text:span text:style-name="T96">: Modello </text:span><text:span text:style-name="T154">errato</text:span><text:span text:style-name="T96"> di associazione tra processo e fattore abilitan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3" loext:marker-style-name="T25"/>
      <text:p text:style-name="P223" loext:marker-style-name="T25"/>
      <text:p text:style-name="P223" loext:marker-style-name="T25"/>
      <text:p text:style-name="P223" loext:marker-style-name="T25"/>
      <text:p text:style-name="P223" loext:marker-style-name="T25"/>
      <text:p text:style-name="P223" loext:marker-style-name="T25"/>
      <text:p text:style-name="P223" loext:marker-style-name="T25"/>
      <text:p text:style-name="P223" loext:marker-style-name="T25"/>
      <text:p text:style-name="P223" loext:marker-style-name="T25"/>
      <text:p text:style-name="P223" loext:marker-style-name="T25"/>
      <text:p text:style-name="P223" loext:marker-style-name="T25"/>
      <text:p text:style-name="P223" loext:marker-style-name="T25"/>
      <text:p text:style-name="P223" loext:marker-style-name="T25"/>
      <text:p text:style-name="P210" loext:marker-style-name="T40"/>
      <text:p text:style-name="P12" loext:marker-style-name="T76"><text:span text:style-name="T33">Infatti, nel contesto di un dato processo, un dato fattore abilitante potrebbe essere associato ad un rischio cui il processo è esposto ma non ad un altro. Un esempio della situazione da rappresentare è quindi simile al seguente:</text:span><text:span text:style-name="T40"/></text:p>
      <text:p text:style-name="P36" loext:marker-style-name="T1"><text:span text:style-name="T1">Tabella </text:span><text:span text:style-name="T1"><text:sequence text:ref-name="refTabella1" text:name="Tabella" text:formula="ooow:Tabella+1" style:num-format="1">2</text:sequence></text:span><text:span text:style-name="T1">: Esempio di associazioni tra rischi e fattori abilitanti nel contesto di un dato processo</text:span></text:p>
      <table:table table:name="Table3" table:style-name="Table3">
        <table:table-column table:style-name="Table3.A" table:number-columns-repeated="2"/>
        <table:table-row table:style-name="Table3.1">
          <table:table-cell table:style-name="Table3.A1" table:number-columns-spanned="2" office:value-type="string">
            <text:p text:style-name="P42" loext:marker-style-name="T1"><text:span text:style-name="T99">PROCESSO 1</text:span><text:span text:style-name="T99"/></text:p>
          </table:table-cell>
          <table:covered-table-cell/>
        </table:table-row>
        <table:table-row table:style-name="Table3.1">
          <table:table-cell table:style-name="Table3.A2" office:value-type="string">
            <text:p text:style-name="P43" loext:marker-style-name="T1"><text:span text:style-name="T101">RISCHIO 1</text:span><text:span text:style-name="T101"/></text:p>
          </table:table-cell>
          <table:table-cell table:style-name="Table3.B2" office:value-type="string">
            <text:p text:style-name="P43" loext:marker-style-name="T1"><text:span text:style-name="T101">FA 1</text:span><text:span text:style-name="T101"/></text:p>
          </table:table-cell>
        </table:table-row>
        <table:table-row table:style-name="Table3.1">
          <table:table-cell table:style-name="Table3.A2" office:value-type="string">
            <text:p text:style-name="P43" loext:marker-style-name="T1"><text:span text:style-name="T101">RISCHIO 2</text:span><text:span text:style-name="T101"/></text:p>
          </table:table-cell>
          <table:table-cell table:style-name="Table3.B3" office:value-type="string">
            <text:p text:style-name="P43" loext:marker-style-name="T1"><text:span text:style-name="T101">FA1</text:span><text:span text:style-name="T101"/></text:p>
            <text:p text:style-name="P43" loext:marker-style-name="T1"><text:span text:style-name="T101">FA2</text:span><text:span text:style-name="T101"/></text:p>
          </table:table-cell>
        </table:table-row>
        <table:table-row table:style-name="Table3.1">
          <table:table-cell table:style-name="Table3.A2" office:value-type="string">
            <text:p text:style-name="P43" loext:marker-style-name="T1"><text:span text:style-name="T101">RISCHIO 3</text:span><text:span text:style-name="T101"/></text:p>
          </table:table-cell>
          <table:table-cell table:style-name="Table3.B4" office:value-type="string">
            <text:p text:style-name="P43" loext:marker-style-name="T1"><text:span text:style-name="T101">FA3</text:span><text:span text:style-name="T101"/></text:p>
            <text:p text:style-name="P43" loext:marker-style-name="T1"><text:span text:style-name="T101">FA4</text:span><text:span text:style-name="T101"/></text:p>
          </table:table-cell>
        </table:table-row>
        <table:table-row table:style-name="Table3.1">
          <table:table-cell table:style-name="Table3.A5" office:value-type="string">
            <text:p text:style-name="P43" loext:marker-style-name="T1"><text:span text:style-name="T101">RISCHIO 4</text:span><text:span text:style-name="T101"/></text:p>
          </table:table-cell>
          <table:table-cell table:style-name="Table3.B5" office:value-type="string">
            <text:p text:style-name="P43" loext:marker-style-name="T1"><text:span text:style-name="T101"><text:s text:c="3"/>-</text:span><text:span text:style-name="T101"/></text:p>
          </table:table-cell>
        </table:table-row>
      </table:table>
      <text:p text:style-name="P210" loext:marker-style-name="T40"/>
      <text:p text:style-name="P12" loext:marker-style-name="T76"><text:span text:style-name="T33">Nell’esempio, ci troviamo nel Processo 1; esso è esposto a 4 rischi corruttivi; </text:span><text:span text:style-name="T40"/></text:p>
      <text:list text:style-name="WWNum6">
        <text:list-item>
          <text:p text:style-name="P148" loext:marker-style-name="T76"><text:span text:style-name="T33">il rischio 1 è associato al fattore abilitante 1; </text:span><text:span text:style-name="T40"/></text:p>
        </text:list-item>
        <text:list-item>
          <text:p text:style-name="P148" loext:marker-style-name="T76"><text:span text:style-name="T33">il rischio 2 è associato al fattore abilitante 1 (di nuovo) e anche al fattore abilitante 2;</text:span><text:span text:style-name="T40"/></text:p>
        </text:list-item>
        <text:list-item>
          <text:p text:style-name="P148" loext:marker-style-name="T76"><text:span text:style-name="T33">il rischio 3 è associato ai fattori abilitanti 3 e 4</text:span><text:span text:style-name="T40"/></text:p>
        </text:list-item>
        <text:list-item>
          <text:p text:style-name="P148" loext:marker-style-name="T76"><text:span text:style-name="T33">il rischio 4 non è associato (ancora) ad alcun fattore abilitante.</text:span><text:span text:style-name="T40"/></text:p>
        </text:list-item>
      </text:list>
      <text:p text:style-name="P12" loext:marker-style-name="T76"><text:soft-page-break/><text:span text:style-name="T33">Queste associazioni tra rischio e fattore abilitante sono contestuali al processo 1, ma nel processo 2, anche in presenza dei medesimi rischi, la situazione potrebbe essere totalmente diversa. </text:span><text:span text:style-name="T40"/></text:p>
      <text:p text:style-name="P12" loext:marker-style-name="T76"><text:span text:style-name="T33">Occorre quindi una granularità molto fine nell’associazione tra rischio e fattore abilitante, che tenga conto del processo, perché tale associazione dipende da questi tre elementi.</text:span><text:span text:style-name="T40"/></text:p>
      <text:p text:style-name="P12" loext:marker-style-name="T76"><text:span text:style-name="T33">Deve essere quindi disegnata una relazione ternaria. </text:span><text:span text:style-name="T40"/></text:p>
      <text:p text:style-name="P12" loext:marker-style-name="T76"><text:span text:style-name="T33">Nell’analisi, era stata considerata la possibilità che uno stesso fattore abilitante non potesse essere ripetuto su più rischi nello stesso processo, ma poi questo vincolo è stato scartato perché poco sensato. Il vincolo inserito nella relazione, quindi, è solo sulla terna.</text:span><text:span text:style-name="T40"/></text:p>
      <text:p text:style-name="P204" loext:marker-style-name="T76"/>
      <text:list xml:id="list172213424761919" text:continue-list="list172213756166673" text:style-name="WWNum93">
        <text:list-item>
          <text:list>
            <text:list-item>
              <text:list>
                <text:list-item>
                  <text:h text:style-name="P73" text:outline-level="3" loext:marker-style-name="T1"><text:bookmark-start text:name="__RefHeading___Toc103510930211111"/><text:span text:style-name="T26">GLI INDICATORI DI RISCHIO</text:span><text:bookmark-end text:name="__RefHeading___Toc103510930211111"/><text:span text:style-name="T26"/></text:h>
                </text:list-item>
              </text:list>
            </text:list-item>
          </text:list>
        </text:list-item>
      </text:list>
      <text:p text:style-name="P10" loext:marker-style-name="T76"><text:span text:style-name="T33">Lo scopo finale dell’intervista su un processo - cioè della raccolta delle risposte date dal personale di una struttura a quesiti declinati su uno specifico processo - è quello di ottenere un indice sintetico che esprima il rischio corruttivo cui tale processo è esposto. Questo indice sintetico si chiama “pi per i” (P x I), talvolta detto, per estensione, “giudizio sintetico” (in realtà il “giudizio sintetico” dovrebbe includere, in [ROL], anche una motivazione testuale).</text:span><text:span text:style-name="T40"/></text:p>
      <text:p text:style-name="P218" loext:marker-style-name="T33"/>
      <text:p text:style-name="P10" loext:marker-style-name="T76"><text:span text:style-name="T33">Tale indice sintetico è una sintesi di vari indici intermedi che concorrono a tale valore complessivo.</text:span><text:span text:style-name="T40"/></text:p>
      <text:p text:style-name="P10" loext:marker-style-name="T76"><text:span text:style-name="T33">Questi indici intermedi vengono calcolati come misure di rispettivi indicatori di rischio, i quali dipendono a loro volta da un sottoinsieme dei quesiti.</text:span><text:span text:style-name="T40"/></text:p>
      <text:p text:style-name="P218" loext:marker-style-name="T33"/>
      <text:p text:style-name="P10" loext:marker-style-name="T76"><text:span text:style-name="T33">Riepilogando: </text:span><text:span text:style-name="T40"/></text:p>
      <text:p text:style-name="P10" loext:marker-style-name="T76"><text:span text:style-name="T33">vari sottoinsiemi di quesiti concorrono al valore di altrettanti indicatori. </text:span><text:span text:style-name="T40"/></text:p>
      <text:p text:style-name="P10" loext:marker-style-name="T76"><text:span text:style-name="T33">Il valore di ogni indicatore è funzione dalle risposte che sono state date ai quesiti corrispondenti nel contesto di una o più interviste. </text:span><text:span text:style-name="T40"/></text:p>
      <text:p text:style-name="P10" loext:marker-style-name="T76"><text:span text:style-name="T33">I valori degli indicatori concorrono al valore finale, o generale, del livello di rischio cui è esposto un determinato processo (P x I).</text:span><text:span text:style-name="T40"/></text:p>
      <text:p text:style-name="P211" loext:marker-style-name="T40"/>
      <text:p text:style-name="P10" loext:marker-style-name="T76"><text:span text:style-name="T33">Esistono due tipologie di indicatori:</text:span><text:span text:style-name="T40"/></text:p>
      <text:list text:style-name="WWNum7">
        <text:list-item>
          <text:p text:style-name="P149" loext:marker-style-name="T76"><text:span text:style-name="T33">indicatori di probabilità (P)</text:span><text:span text:style-name="T40"/></text:p>
        </text:list-item>
        <text:list-item>
          <text:p text:style-name="P149" loext:marker-style-name="T76"><text:span text:style-name="T33">indicatori di impatto (I)</text:span><text:span text:style-name="T40"/></text:p>
        </text:list-item>
      </text:list>
      <text:p text:style-name="P211" loext:marker-style-name="T40"/>
      <text:p text:style-name="P10" loext:marker-style-name="T76"><text:span text:style-name="T33">I primi fanno riferimento a quanto è probabile che l’evento dannoso si verifichi mentre i secondi fanno riferimento a quanto è grave l’evento dannoso se si verifica.</text:span><text:span text:style-name="T40"/></text:p>
      <text:p text:style-name="P10" loext:marker-style-name="T76"><text:span text:style-name="T33">Il giudizio sintetico incrocia questi due valori (P x I).</text:span><text:span text:style-name="T40"/></text:p>
      <text:p text:style-name="P10" loext:marker-style-name="T76"><text:span text:style-name="T33">Per poter calcolare gli indici intermedi, bisogna controllare il valore ottenuto dalle risposte a specifici quesiti; ogni indicatore si basa su un insieme di quesiti specifico e diverso da quello di ogni altro indicatore. A seconda del numero di quesiti coinvolti e dalla tipologia di riposte, si ottiene un algoritmo di calcolo specifico per ciascun indicatore.</text:span><text:span text:style-name="T40"/></text:p>
      <text:p text:style-name="P10" loext:marker-style-name="T76"><text:span text:style-name="T33">A titolo di esempio viene riportato, in pseudolinguaggio, l’algoritmo di calcolo del primo indicatore di probabilità (P1):</text:span><text:span text:style-name="T40"/></text:p>
      <text:p text:style-name="P15"><text:soft-page-break/><text:span text:style-name="T157">Se la risposta al quesito con ID 20 è negativa, il rischio è basso.</text:span></text:p>
      <text:p text:style-name="P21">Altrimenti, se essa è positiva, bisogna controllare la risposta al quesito 21; </text:p>
      <text:p text:style-name="P21"><text:tab/>se il valore di tale risposta è inferiore al 100%, allora il rischio è medio, </text:p>
      <text:p text:style-name="P21"><text:tab/>altrimenti, se è 100% il rischio diventa alto.</text:p>
      <text:p text:style-name="P218" loext:marker-style-name="T33"><draw:custom-shape text:anchor-type="char" draw:z-index="14" draw:name="Cornice19" draw:style-name="gr28" draw:text-style-name="P265" svg:width="9.092cm" svg:height="5.748cm" svg:x="4.249cm" svg:y="0.002cm"><text:p text:style-name="P33" loext:marker-style-name="T96"><text:span text:style-name="T86"><draw:frame draw:style-name="fr2" draw:name="Immagine22" text:anchor-type="as-char" svg:width="9.091cm" svg:height="4.325cm" draw:z-index="35"><draw:image xlink:href="Pictures/10002F5000002383000010E5025C1D5E.emf" xlink:type="simple" xlink:show="embed" xlink:actuate="onLoad" draw:mime-type="image/x-emf"/><draw:image xlink:href="Pictures/1000000100000158000000A3853A176E.png" xlink:type="simple" xlink:show="embed" xlink:actuate="onLoad" draw:mime-type="image/png"/></draw:frame></text:span><text:span text:style-name="T96">Figura </text:span><text:span text:style-name="T96"><text:sequence text:ref-name="refFigura12" text:name="Figura" text:formula="ooow:Figura+1" style:num-format="1">13</text:sequence></text:span><text:span text:style-name="T96">: Tabella di calcolo del valore dell'indicatore P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draw:custom-shape text:anchor-type="char" draw:z-index="35" draw:name="Cornice20" draw:style-name="gr20" draw:text-style-name="P265" svg:width="15.615cm" svg:height="16.142cm" svg:x="0.988cm" svg:y="0.15cm"><text:p text:style-name="P32" loext:marker-style-name="T96"><draw:frame draw:style-name="fr2" draw:name="Immagine23" text:anchor-type="as-char" svg:width="8.744cm" svg:height="14.607cm" draw:z-index="115"><draw:image xlink:href="Pictures/1000000000000524000008009918481E.png" xlink:type="simple" xlink:show="embed" xlink:actuate="onLoad" draw:mime-type="image/png"/></draw:frame></text:p><text:p text:style-name="P33" loext:marker-style-name="T96"><text:span text:style-name="T96">Figura </text:span><text:span text:style-name="T96"><text:sequence text:ref-name="refFigura13" text:name="Figura" text:formula="ooow:Figura+1" style:num-format="1">14</text:sequence></text:span><text:span text:style-name="T96">: Il diagramma di flusso dell'algoritmo di calcolo del valore dell'indicatore P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10" loext:marker-style-name="T76"><text:soft-page-break/><text:span text:style-name="T33">Alcuni algoritmi sono più complessi da calcolare (e quindi implementare) che altri.</text:span><text:span text:style-name="T40"/></text:p>
      <text:p text:style-name="P10" loext:marker-style-name="T76"><text:span text:style-name="T33">Di seguito viene mostrata la tabella che permette di determinare i livelli di rischio dell’indicatore P4</text:span><text:span text:style-name="T40"/></text:p>
      <text:p text:style-name="P224" loext:marker-style-name="T25"><draw:custom-shape text:anchor-type="char" draw:z-index="21" draw:name="Cornice21" draw:style-name="gr25" draw:text-style-name="P265" svg:width="9.593cm" svg:height="8.501cm" svg:x="4.217cm" svg:y="0.074cm"><text:p text:style-name="P32" loext:marker-style-name="T96"><draw:frame draw:style-name="fr7" draw:name="Immagine25" text:anchor-type="as-char" svg:width="9.029cm" svg:height="7.301cm" draw:z-index="72"><draw:image xlink:href="Pictures/100000000000015A000001166966E16E.png" xlink:type="simple" xlink:show="embed" xlink:actuate="onLoad" draw:mime-type="image/png"/></draw:frame></text:p><text:p text:style-name="P33" loext:marker-style-name="T96"><text:span text:style-name="T96">Figura </text:span><text:span text:style-name="T96"><text:sequence text:ref-name="refFigura14" text:name="Figura" text:formula="ooow:Figura+1" style:num-format="1">15</text:sequence></text:span><text:span text:style-name="T96">: Tabella di calcolo dell'indicatore P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224" loext:marker-style-name="T25"/>
      <text:p text:style-name="P10" loext:marker-style-name="T76"><text:span text:style-name="T33">I casi mappati per l’indicatore P4 (test effettuati sull’implementazione dell’algoritmo) sono riportati nella tabella seguente:</text:span><text:span text:style-name="T40"/></text:p>
      <text:p text:style-name="P225" loext:marker-style-name="T158"><text:span text:style-name="T47">ID1<text:tab/>ID2<text:tab/>ID13<text:tab/>ID14<text:tab/>RESULT</text:span><text:span text:style-name="T47"/></text:p>
      <text:p text:style-name="P225" loext:marker-style-name="T158"><text:span text:style-name="T47">disposizioni 1a riga</text:span><text:span text:style-name="T47"/></text:p>
      <text:p text:style-name="P225" loext:marker-style-name="T158"><text:span text:style-name="T47">SI<text:tab/>SI<text:tab/>SI<text:tab/>&gt;=2<text:tab/></text:span><text:span text:style-name="T136">BASSO</text:span></text:p>
      <text:p text:style-name="P225" loext:marker-style-name="T158"><text:span text:style-name="T47">SI <text:tab/>SI<text:tab/>NO<text:tab/>&gt;=2<text:tab/></text:span><text:span text:style-name="T136">BASSO</text:span></text:p>
      <text:p text:style-name="P225" loext:marker-style-name="T158"><text:span text:style-name="T47">SI<text:tab/>NO<text:tab/>SI<text:tab/>&gt;=2<text:tab/></text:span><text:span text:style-name="T136">BASSO</text:span></text:p>
      <text:p text:style-name="P225" loext:marker-style-name="T158"><text:span text:style-name="T47">SI<text:tab/>NO<text:tab/>NO<text:tab/>&gt;=2<text:tab/></text:span><text:span text:style-name="T136">BASSO</text:span></text:p>
      <text:p text:style-name="P225" loext:marker-style-name="T158"><text:span text:style-name="T47">disposizioni 2a riga</text:span><text:span text:style-name="T47"/></text:p>
      <text:p text:style-name="P225" loext:marker-style-name="T158"><text:span text:style-name="T47">NO<text:tab/>SI <text:tab/>SI <text:tab/>&gt;=2<text:tab/></text:span><text:span text:style-name="T136">BASSO</text:span></text:p>
      <text:p text:style-name="P225" loext:marker-style-name="T158"><text:span text:style-name="T47">NO<text:tab/>SI<text:tab/>NO<text:tab/>&gt;=2<text:tab/></text:span><text:span text:style-name="T136">BASSO</text:span></text:p>
      <text:p text:style-name="P225" loext:marker-style-name="T158"><text:span text:style-name="T47">disposizioni 3a riga</text:span><text:span text:style-name="T47"/></text:p>
      <text:p text:style-name="P225" loext:marker-style-name="T158"><text:span text:style-name="T47">SI<text:tab/>SI<text:tab/>NO<text:tab/>&gt;=2<text:tab/></text:span><text:span text:style-name="T136">BASSO</text:span></text:p>
      <text:p text:style-name="P225" loext:marker-style-name="T158"><text:span text:style-name="T47">NO<text:tab/>SI<text:tab/>NO<text:tab/>&gt;=2<text:tab/>rientra nelle combinazioni 2a riga (</text:span><text:span text:style-name="T136">BASSO</text:span><text:span text:style-name="T47">)</text:span></text:p>
      <text:p text:style-name="P225" loext:marker-style-name="T158"><text:span text:style-name="T47">disposizioni indecidibili</text:span><text:span text:style-name="T47"/></text:p>
      <text:p text:style-name="P225" loext:marker-style-name="T158"><text:span text:style-name="T47">NO<text:tab/>NO<text:tab/>SI<text:tab/>&gt;=2<text:tab/>NON DETERMINABILE</text:span><text:span text:style-name="T47"/></text:p>
      <text:p text:style-name="P225" loext:marker-style-name="T158"><text:span text:style-name="T47">--------------------------------------------------------------------</text:span><text:span text:style-name="T47"/></text:p>
      <text:p text:style-name="P225" loext:marker-style-name="T158"><text:span text:style-name="T47">disposizioni 4a riga</text:span><text:span text:style-name="T47"/></text:p>
      <text:p text:style-name="P225" loext:marker-style-name="T158"><text:span text:style-name="T47">SI<text:tab/>SI<text:tab/>NO<text:tab/>&lt;2<text:tab/></text:span><text:span text:style-name="T137">MEDIO</text:span></text:p>
      <text:p text:style-name="P225" loext:marker-style-name="T158"><text:span text:style-name="T47">SI<text:tab/>NO<text:tab/>NO<text:tab/>&lt;2<text:tab/></text:span><text:span text:style-name="T137">MEDIO</text:span></text:p>
      <text:p text:style-name="P225" loext:marker-style-name="T158"><text:span text:style-name="T47">disposizioni 5a riga</text:span><text:span text:style-name="T47"/></text:p>
      <text:p text:style-name="P225" loext:marker-style-name="T158"><text:span text:style-name="T47">SI<text:tab/>SI<text:tab/>NO<text:tab/>&lt;2<text:tab/>rientra nelle combinazioni 4a riga (</text:span><text:span text:style-name="T137">MEDIO</text:span><text:span text:style-name="T47">)</text:span></text:p>
      <text:p text:style-name="P225" loext:marker-style-name="T158"><text:span text:style-name="T47">NO<text:tab/>SI<text:tab/>NO<text:tab/>&lt;2<text:tab/></text:span><text:span text:style-name="T137">MEDIO</text:span></text:p>
      <text:p text:style-name="P225" loext:marker-style-name="T158"><text:span text:style-name="T47">disposizioni 6a riga</text:span><text:span text:style-name="T47"/></text:p>
      <text:p text:style-name="P225" loext:marker-style-name="T158"><text:span text:style-name="T47">SI<text:tab/>SI<text:tab/>SI<text:tab/>&lt;2<text:tab/></text:span><text:span text:style-name="T137">MEDIO</text:span></text:p>
      <text:p text:style-name="P225" loext:marker-style-name="T158"><text:span text:style-name="T47">SI<text:tab/>NO<text:tab/>SI<text:tab/>&lt;2<text:tab/></text:span><text:span text:style-name="T137">MEDIO</text:span></text:p>
      <text:p text:style-name="P225" loext:marker-style-name="T158"><text:span text:style-name="T47">--------------------------------------------------------------------</text:span><text:span text:style-name="T47"/></text:p>
      <text:p text:style-name="P225" loext:marker-style-name="T158"><text:span text:style-name="T47">disposizioni 7a riga</text:span><text:span text:style-name="T47"/></text:p>
      <text:p text:style-name="P225" loext:marker-style-name="T158"><text:span text:style-name="T47">NO<text:tab/>NO<text:tab/>NO<text:tab/>*<text:tab/></text:span><text:span text:style-name="T138">ALTO</text:span></text:p>
      <text:p text:style-name="P212" loext:marker-style-name="T40"/>
      <text:p text:style-name="P10" loext:marker-style-name="T76"><text:span text:style-name="T33">A livello di implementazione, la procedura per il calcolo è la seguente:</text:span><text:span text:style-name="T40"/></text:p>
      <text:list text:style-name="WWNum8">
        <text:list-item>
          <text:p text:style-name="P150" loext:marker-style-name="T76"><text:span text:style-name="T33">per ogni indicatore si estraggono i quesiti collegati;</text:span><text:span text:style-name="T40"/></text:p>
        </text:list-item>
        <text:list-item>
          <text:p text:style-name="P150" loext:marker-style-name="T76"><text:span text:style-name="T33">nel contesto di un’intervista, si esaminano le risposte ai quesiti in base all’algoritmo di calcolo (valutando anche eventuali valori spuri, che non permettono di determinare il livello di rischio per l’indicatore considerato);</text:span><text:span text:style-name="T40"/></text:p>
        </text:list-item>
        <text:list-item>
          <text:p text:style-name="P150" loext:marker-style-name="T76"><text:span text:style-name="T33">nel contesto di un processo, si esaminano i valori di rischio ottenuti per ciascuno dei 7 + 4 indicatori attraverso tutte le interviste che hanno coinvolto il processo stesso, adottando un approccio prudente (“in dubio pro peior”) in caso si siano ottenuti livelli di rischio contrastanti nello stesso indicatore in interviste differenti;</text:span><text:span text:style-name="T40"/></text:p>
        </text:list-item>
        <text:list-item>
          <text:p text:style-name="P150" loext:marker-style-name="T76"><text:span text:style-name="T33">nel contesto di un processo, si ottengono quindi gli indici sintetici di P e di I e si applica uno specifico algoritmo per il calcolo del P x I.</text:span><text:span text:style-name="T40"/></text:p>
        </text:list-item>
      </text:list>
      <text:p text:style-name="P211" loext:marker-style-name="T40"/>
      <text:p text:style-name="P10" loext:marker-style-name="T76"><text:span text:style-name="T35">Considerando</text:span><text:span text:style-name="T33"> che P ed I hanno ciascuno 3 valori possibili, matematicamente il calcolo degli incroci dei valori di P e dei valori di I è il calcolo delle disposizioni (con ripetizione) di 3 elementi presi a 2 a 2.</text:span></text:p>
      <text:p text:style-name="P224" loext:marker-style-name="T25"/>
      <text:p text:style-name="P34" loext:marker-style-name="T25"/>
      <text:list xml:id="list3109720939" text:style-name="WWNum2">
        <text:list-item>
          <text:list>
            <text:list-item>
              <text:h text:style-name="P63" text:outline-level="2" loext:marker-style-name="T25"/>
            </text:list-item>
          </text:list>
        </text:list-item>
      </text:list>
      <text:list xml:id="list172214001374441" text:continue-list="list3987656334" text:style-name="WWNum1">
        <text:list-item>
          <text:list>
            <text:list-item>
              <text:list>
                <text:list-item>
                  <text:list>
                    <text:list-item>
                      <text:h text:style-name="P89" text:outline-level="4" loext:marker-style-name="T1"><text:bookmark-start text:name="__RefHeading___Toc1400_499460115"/><text:span text:style-name="T1">Disposizioni con ripetizione - D'(n,k)</text:span><text:bookmark-end text:name="__RefHeading___Toc1400_499460115"/><text:span text:style-name="T1"/></text:h>
                    </text:list-item>
                  </text:list>
                </text:list-item>
              </text:list>
            </text:list-item>
          </text:list>
        </text:list-item>
      </text:list>
      <text:p text:style-name="Text_20_body"><text:span text:style-name="Strong_20_Emphasis"><text:span text:style-name="T1">Definizione</text:span></text:span><text:span text:style-name="T1">.</text:span></text:p>
      <text:p text:style-name="Text_20_body"><text:span text:style-name="T1">Dati </text:span><text:span text:style-name="Variabile"><text:span text:style-name="T1">n</text:span></text:span><text:span text:style-name="T1"> elementi distinti e un numero </text:span><text:span text:style-name="Variabile"><text:span text:style-name="T1">k&lt;=n</text:span></text:span><text:span text:style-name="T1"> si dicono disposizioni con ripetizione di questi </text:span><text:span text:style-name="Variabile"><text:span text:style-name="T1">n</text:span></text:span><text:span text:style-name="T1"> elementi, presi a </text:span><text:span text:style-name="Variabile"><text:span text:style-name="T1">k</text:span></text:span><text:span text:style-name="T1"> a </text:span><text:span text:style-name="Variabile"><text:span text:style-name="T1">k</text:span></text:span><text:span text:style-name="T1"> (o di classe </text:span><text:span text:style-name="Variabile"><text:span text:style-name="T1">k</text:span></text:span><text:span text:style-name="T1">), </text:span><text:span text:style-name="Strong_20_Emphasis"><text:span text:style-name="T1">D'(n,k)</text:span></text:span><text:span text:style-name="T1">, tutti i gruppi che si possono formare con gli elementi dati, in modo che:</text:span></text:p>
      <text:list text:style-name="WWNum9">
        <text:list-item>
          <text:p text:style-name="P243"><text:span text:style-name="T1">ogni gruppo contenga </text:span><text:span text:style-name="Variabile"><text:span text:style-name="T1">k</text:span></text:span><text:span text:style-name="T1"> elementi non necessariamente distinti </text:span></text:p>
        </text:list-item>
        <text:list-item>
          <text:p text:style-name="P243"><text:span text:style-name="T1">ogni elemento possa trovarsi ripetuto nel gruppo fino a </text:span><text:span text:style-name="Variabile"><text:span text:style-name="T1">k</text:span></text:span><text:span text:style-name="T1"> volte </text:span></text:p>
        </text:list-item>
        <text:list-item>
          <text:p text:style-name="P244">due gruppi qualunque differiscano fra loro per qualche elemento oppure per l'ordine in cui gli elementi sono disposti </text:p>
        </text:list-item>
      </text:list>
      <text:p text:style-name="Text_20_body"><text:span text:style-name="Strong_20_Emphasis"><text:span text:style-name="T1">Esempi</text:span></text:span><text:span text:style-name="T1">.</text:span></text:p>
      <text:p text:style-name="Text_20_body" loext:marker-style-name="T1"><text:span text:style-name="T1">Le disposizioni con ripetizione di 3 elementi (abc) presi a 2 a 2 sono:</text:span><text:span text:style-name="T1"/></text:p>
      <text:p text:style-name="Text_20_body"><text:span text:style-name="Testo_20_sorgente"><text:span text:style-name="T1">aa ab ac ba bb bc ca cb cc</text:span></text:span></text:p>
      <text:p text:style-name="P248" loext:marker-style-name="T25"/>
      <text:p text:style-name="Text_20_body"><text:span text:style-name="Strong_20_Emphasis"><text:span text:style-name="T1">Calcolo delle disposizioni con ripetizione</text:span></text:span><text:span text:style-name="T1">.</text:span></text:p>
      <text:p text:style-name="Text_20_body"><text:span text:style-name="T1">D'(</text:span><text:span text:style-name="Variabile"><text:span text:style-name="T1">n</text:span></text:span><text:span text:style-name="T1">,</text:span><text:span text:style-name="Variabile"><text:span text:style-name="T1">k</text:span></text:span><text:span text:style-name="T1">) = </text:span><text:span text:style-name="Variabile"><text:span text:style-name="T1">n</text:span></text:span><text:span text:style-name="Variabile"><text:span text:style-name="T159">k</text:span></text:span></text:p>
      <text:p text:style-name="P224" loext:marker-style-name="T25"/>
      <text:p text:style-name="P34" loext:marker-style-name="T25"/>
      <text:list text:continue-list="list3109720939" text:style-name="WWNum2">
        <text:list-item>
          <text:list>
            <text:list-item>
              <text:h text:style-name="P63" text:outline-level="2" loext:marker-style-name="T25"><text:soft-page-break/></text:h>
            </text:list-item>
          </text:list>
        </text:list-item>
      </text:list>
      <text:p text:style-name="P225" loext:marker-style-name="T76"><text:span text:style-name="T33">Nel nostro caso abbiamo 3 elementi (alto, medio, basso) presi a 2 a 2, da cui:</text:span><text:span text:style-name="T40"/></text:p>
      <text:p text:style-name="P213" loext:marker-style-name="T40"/>
      <text:p text:style-name="P102" loext:marker-style-name="T81"><text:span text:style-name="T31">D’(3,2) = 3</text:span><text:span text:style-name="T48">2</text:span><text:span text:style-name="T49"> = 9</text:span></text:p>
      <text:p text:style-name="P201" loext:marker-style-name="T77"/>
      <text:p text:style-name="P225" loext:marker-style-name="T76"><text:span text:style-name="T33">Di seguito viene riportata la tabella di decisione dell’algoritmo per il calcolo del PxI, con i 9 valori possibili derivanti dalle disposizioni con ripetizione dei 3 valori possibili del P e dei 3 valori possibili di I.</text:span><text:span text:style-name="T40"/></text:p>
      <text:p text:style-name="P224" loext:marker-style-name="T2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7" loext:marker-style-name="T1"><text:span text:style-name="T160">P</text:span><text:span text:style-name="T160"/></text:p>
          </table:table-cell>
          <table:table-cell table:style-name="Table4.A1" office:value-type="string">
            <text:p text:style-name="P37" loext:marker-style-name="T1"><text:span text:style-name="T160">I</text:span><text:span text:style-name="T160"/></text:p>
          </table:table-cell>
          <table:table-cell table:style-name="Table4.A1" office:value-type="string">
            <text:p text:style-name="P37" loext:marker-style-name="T1"><text:span text:style-name="T160">P x I</text:span><text:span text:style-name="T160"/></text:p>
          </table:table-cell>
        </table:table-row>
        <table:table-row table:style-name="Table4.2">
          <table:table-cell table:style-name="Table4.A2" office:value-type="string">
            <text:p text:style-name="P42" loext:marker-style-name="T1"><text:span text:style-name="T107">ALTO</text:span><text:span text:style-name="T107"/></text:p>
          </table:table-cell>
          <table:table-cell table:style-name="Table4.A2" office:value-type="string">
            <text:p text:style-name="P42" loext:marker-style-name="T1"><text:span text:style-name="T107">ALTO</text:span><text:span text:style-name="T107"/></text:p>
          </table:table-cell>
          <table:table-cell table:style-name="Table4.C2" office:value-type="string">
            <text:p text:style-name="P42" loext:marker-style-name="T1"><text:span text:style-name="T108">ALTISSIMO</text:span><text:span text:style-name="T108"/></text:p>
          </table:table-cell>
        </table:table-row>
        <table:table-row table:style-name="Table4.2">
          <table:table-cell table:style-name="Table4.A2" office:value-type="string">
            <text:p text:style-name="P42" loext:marker-style-name="T1"><text:span text:style-name="T107">ALTO</text:span><text:span text:style-name="T107"/></text:p>
          </table:table-cell>
          <table:table-cell table:style-name="Table4.B3" office:value-type="string">
            <text:p text:style-name="P42" loext:marker-style-name="T1"><text:span text:style-name="T109">MEDIO</text:span><text:span text:style-name="T109"/></text:p>
          </table:table-cell>
          <table:table-cell table:style-name="Table4.A2" office:value-type="string">
            <text:p text:style-name="P42" loext:marker-style-name="T1"><text:span text:style-name="T109">ALTO</text:span><text:span text:style-name="T109"/></text:p>
          </table:table-cell>
        </table:table-row>
        <table:table-row table:style-name="Table4.2">
          <table:table-cell table:style-name="Table4.A2" office:value-type="string">
            <text:p text:style-name="P42" loext:marker-style-name="T1"><text:span text:style-name="T107">ALTO</text:span><text:span text:style-name="T107"/></text:p>
          </table:table-cell>
          <table:table-cell table:style-name="Table4.B4" office:value-type="string">
            <text:p text:style-name="P42" loext:marker-style-name="T1"><text:span text:style-name="T109">BASSO</text:span><text:span text:style-name="T109"/></text:p>
          </table:table-cell>
          <table:table-cell table:style-name="Table4.B3" office:value-type="string">
            <text:p text:style-name="P42" loext:marker-style-name="T1"><text:span text:style-name="T109">MEDIO</text:span><text:span text:style-name="T109"/></text:p>
          </table:table-cell>
        </table:table-row>
        <table:table-row table:style-name="Table4.2">
          <table:table-cell table:style-name="Table4.B3" office:value-type="string">
            <text:p text:style-name="P42" loext:marker-style-name="T1"><text:span text:style-name="T107">MEDIO</text:span><text:span text:style-name="T107"/></text:p>
          </table:table-cell>
          <table:table-cell table:style-name="Table4.A2" office:value-type="string">
            <text:p text:style-name="P42" loext:marker-style-name="T1"><text:span text:style-name="T109">ALTO</text:span><text:span text:style-name="T109"/></text:p>
          </table:table-cell>
          <table:table-cell table:style-name="Table4.A2" office:value-type="string">
            <text:p text:style-name="P42" loext:marker-style-name="T1"><text:span text:style-name="T109">ALTO</text:span><text:span text:style-name="T109"/></text:p>
          </table:table-cell>
        </table:table-row>
        <table:table-row table:style-name="Table4.2">
          <table:table-cell table:style-name="Table4.B3" office:value-type="string">
            <text:p text:style-name="P42" loext:marker-style-name="T1"><text:span text:style-name="T107">MEDIO</text:span><text:span text:style-name="T107"/></text:p>
          </table:table-cell>
          <table:table-cell table:style-name="Table4.B3" office:value-type="string">
            <text:p text:style-name="P42" loext:marker-style-name="T1"><text:span text:style-name="T109">MEDIO</text:span><text:span text:style-name="T109"/></text:p>
          </table:table-cell>
          <table:table-cell table:style-name="Table4.B3" office:value-type="string">
            <text:p text:style-name="P42" loext:marker-style-name="T1"><text:span text:style-name="T109">MEDIO</text:span><text:span text:style-name="T109"/></text:p>
          </table:table-cell>
        </table:table-row>
        <table:table-row table:style-name="Table4.2">
          <table:table-cell table:style-name="Table4.B3" office:value-type="string">
            <text:p text:style-name="P42" loext:marker-style-name="T1"><text:span text:style-name="T107">MEDIO</text:span><text:span text:style-name="T107"/></text:p>
          </table:table-cell>
          <table:table-cell table:style-name="Table4.B4" office:value-type="string">
            <text:p text:style-name="P42" loext:marker-style-name="T1"><text:span text:style-name="T109">BASSO</text:span><text:span text:style-name="T109"/></text:p>
          </table:table-cell>
          <table:table-cell table:style-name="Table4.B4" office:value-type="string">
            <text:p text:style-name="P42" loext:marker-style-name="T1"><text:span text:style-name="T109">BASSO</text:span><text:span text:style-name="T109"/></text:p>
          </table:table-cell>
        </table:table-row>
        <table:table-row table:style-name="Table4.2">
          <table:table-cell table:style-name="Table4.B4" office:value-type="string">
            <text:p text:style-name="P42" loext:marker-style-name="T1"><text:span text:style-name="T107">BASSO</text:span><text:span text:style-name="T107"/></text:p>
          </table:table-cell>
          <table:table-cell table:style-name="Table4.A2" office:value-type="string">
            <text:p text:style-name="P42" loext:marker-style-name="T1"><text:span text:style-name="T109">ALTO</text:span><text:span text:style-name="T109"/></text:p>
          </table:table-cell>
          <table:table-cell table:style-name="Table4.B3" office:value-type="string">
            <text:p text:style-name="P42" loext:marker-style-name="T1"><text:span text:style-name="T109">MEDIO</text:span><text:span text:style-name="T109"/></text:p>
          </table:table-cell>
        </table:table-row>
        <table:table-row table:style-name="Table4.2">
          <table:table-cell table:style-name="Table4.B4" office:value-type="string">
            <text:p text:style-name="P42" loext:marker-style-name="T1"><text:span text:style-name="T107">BASSO</text:span><text:span text:style-name="T107"/></text:p>
          </table:table-cell>
          <table:table-cell table:style-name="Table4.B3" office:value-type="string">
            <text:p text:style-name="P42" loext:marker-style-name="T1"><text:span text:style-name="T109">MEDIO</text:span><text:span text:style-name="T109"/></text:p>
          </table:table-cell>
          <table:table-cell table:style-name="Table4.B4" office:value-type="string">
            <text:p text:style-name="P42" loext:marker-style-name="T1"><text:span text:style-name="T109">BASSO</text:span><text:span text:style-name="T109"/></text:p>
          </table:table-cell>
        </table:table-row>
        <table:table-row table:style-name="Table4.2">
          <table:table-cell table:style-name="Table4.A10" office:value-type="string">
            <text:p text:style-name="P42" loext:marker-style-name="T1"><text:span text:style-name="T107">BASSO</text:span><text:span text:style-name="T107"/></text:p>
          </table:table-cell>
          <table:table-cell table:style-name="Table4.B4" office:value-type="string">
            <text:p text:style-name="P42" loext:marker-style-name="T1"><text:span text:style-name="T109">BASSO</text:span><text:span text:style-name="T109"/></text:p>
          </table:table-cell>
          <table:table-cell table:style-name="Table4.C10" office:value-type="string">
            <text:p text:style-name="P42" loext:marker-style-name="T1"><text:span text:style-name="T161">MINIMO</text:span><text:span text:style-name="T161"/></text:p>
          </table:table-cell>
        </table:table-row>
      </table:table>
      <text:p text:style-name="P224" loext:marker-style-name="T25"/>
      <text:p text:style-name="P211" loext:marker-style-name="T40"/>
      <text:p text:style-name="P10" loext:marker-style-name="T76"><text:span text:style-name="T33">Siccome abbiamo visto che su uno stesso processo possono essere effettuate più interviste, come è possibile assumere che i risultati dei vari indicatori siano univoci per il singolo processo? </text:span><text:span text:style-name="T40"/></text:p>
      <text:p text:style-name="P218" loext:marker-style-name="T33"/>
      <text:p text:style-name="P10" loext:marker-style-name="T76"><text:span text:style-name="T33">In base a quanto analizzato finora, siamo consapevoli che un processo potrebbe essere in carico a più strutture e ciò potrebbe portare a più interviste distinte che investigano lo stesso processo. </text:span><text:span text:style-name="T40"/></text:p>
      <text:p text:style-name="P10" loext:marker-style-name="T76"><text:span text:style-name="T33">Ora, potrebbe accadere che in un’intervista relativa al processo 1 effettuata con la struttura A il valore di un indicatore, p.es. P1, risulti ALTO mentre in un’altra intervista, relativa sempre al processo 1, ma effettuata stavolta con la struttura B, il valore dell’indicatore P1 risulti MEDIO (o anche BASSO)...</text:span><text:span text:style-name="T40"/></text:p>
      <text:p text:style-name="P10" loext:marker-style-name="T76"><text:span text:style-name="T33">Siccome questo può accadere – ed è perfettamente plausibile che accada – in questo caso, si adotta, come accennato in precedenza, l’algoritmo “In dubio pro peior” (nel dubbio si sceglie il caso peggiore, ovvero il valore di rischio più alto); quindi, nell’esempio, si considera che il valore complessivo di P1 per il processo 1 è ALTO (non si effettua una ponderazione ma si prende il valore di rischio più elevato).</text:span><text:span text:style-name="T40"/></text:p>
      <text:p text:style-name="P211" loext:marker-style-name="T40"/>
      <text:p text:style-name="P10" loext:marker-style-name="T76"><text:span text:style-name="T33">Più sotto viene riportato il diagramma di flusso dell’algoritmo adottato in caso di risultati contrastanti </text:span><text:span text:style-name="T31">per uno stesso processo</text:span><text:span text:style-name="T33"> attraverso varie interviste (risultati contrastanti da un’intervista all’altra). </text:span></text:p>
      <text:p text:style-name="P211" loext:marker-style-name="T40"/>
      <text:p text:style-name="P224" loext:marker-style-name="T25"><draw:frame draw:style-name="fr3" draw:name="Immagine24" text:anchor-type="char" svg:y="0.002cm" svg:width="17.59cm" svg:height="21.932cm" draw:z-index="96"><draw:image xlink:href="Pictures/1000000100000A4000000CC81F3D79E7.png" xlink:type="simple" xlink:show="embed" xlink:actuate="onLoad" draw:mime-type="image/png"/></draw:frame><text:soft-page-break/></text:p>
      <text:p text:style-name="P224" loext:marker-style-name="T25"/>
      <text:p text:style-name="P224" loext:marker-style-name="T25"><text:soft-page-break/></text:p>
      <text:list xml:id="list172212484819571" text:continue-numbering="true" text:style-name="WWNum2">
        <text:list-item>
          <text:list>
            <text:list-item>
              <text:list>
                <text:list-item>
                  <text:h text:style-name="P64" text:outline-level="2" loext:marker-style-name="T1"><text:bookmark text:name="_toc1250"/><text:bookmark-start text:name="__RefHeading___Toc1035109302111111"/><text:span text:style-name="T1">LE MISURE </text:span><text:bookmark-end text:name="__RefHeading___Toc1035109302111111"/><text:span text:style-name="T1"/></text:h>
                </text:list-item>
              </text:list>
            </text:list-item>
            <text:list-item>
              <text:h text:style-name="P62" text:outline-level="2" loext:marker-style-name="T33"/>
            </text:list-item>
          </text:list>
        </text:list-item>
      </text:list>
      <text:p text:style-name="P10" loext:marker-style-name="T1"><text:span text:style-name="T33">Una buona procedura di gestione del rischio corruttivo prevede non solo l’individuazione delle strutture e dei processi organizzativi maggiormente esposti al rischio corruttivo – che di per sé è già un buon risultato – ma è anche in grado di suggerire la messa in atto di una serie di misure </text:span><text:span text:style-name="T31">ad hoc</text:span><text:span text:style-name="T33"> specifiche per ciascun rischio individuato.</text:span></text:p>
      <text:p text:style-name="P197" loext:marker-style-name="T77"/>
      <text:p text:style-name="P10" loext:marker-style-name="T1"><text:span text:style-name="T33">Naturalmente, non si vuol qui sottovalutare l’importanza dell’individuazione e della mappatura dei rischi/processi. Tuttavia questa mappatura è soltanto una </text:span><text:span text:style-name="T34">descrizione</text:span><text:span text:style-name="T33">, sia pur precisa, replicabile e scientificamente fondata e attendibile, dei rischi corruttivi cui i processi organizzativi sono esposti in seno a un’organizzazione.</text:span></text:p>
      <text:p text:style-name="P197" loext:marker-style-name="T77"/>
      <text:p text:style-name="P10" loext:marker-style-name="T1"><text:span text:style-name="T33">Questa descrizione è già di per sé un passo fondamentale per la gestione dei rischi corruttivi, anche perché, tradotta in un sistema informativo, questa mappatura può essere articolata in vari livelli di granularità e può essere tradotta in vari output, testuali, tabellari e/o grafici; inoltre, permette la ri-aggregazione delle informazioni in molteplici modalità e su molteplici canali di output. Infine, ma non ultimo, vi è l’archiviazione dei dati e la loro consultabilità a piacimento e a distanza di tempo.</text:span><text:span text:style-name="T33"/></text:p>
      <text:p text:style-name="P197" loext:marker-style-name="T77"/>
      <text:p text:style-name="P10" loext:marker-style-name="T1"><text:span text:style-name="T33">Tuttavia, se oltre al calcolo dei rischi in tempo reale, un software per la gestione dei rischi corruttivi offrisse anche una serie di </text:span><text:span text:style-name="T34">suggerimenti</text:span><text:span text:style-name="T33"> circa le misure di riduzione del rischio corruttivo che è opportuno mettere in atto al fine di ridurre una serie di rischi in maniera mirata (ottimizzando quindi le azioni di prevenzione e riduzione del rischio), </text:span><text:span text:style-name="T36">certamente avrebbe un valore maggiore di un software che si limita a mappare e calcolare i rischi cui ogni processo è esposto.</text:span></text:p>
      <text:p text:style-name="P197" loext:marker-style-name="T77"/>
      <text:p text:style-name="P10" loext:marker-style-name="T1"><text:span text:style-name="T33">L’ambizione del software [ROL] di gestione dei rischi corruttivi è </text:span><text:span text:style-name="T31">non soltanto</text:span><text:span text:style-name="T33"> quella di agevolare i responsabili anticorruzione nella mappatura e nel calcolo dei rischi, </text:span><text:span text:style-name="T31">ma anche</text:span><text:span text:style-name="T33"> quella di proporre le misure di sicurezza atte a ridurre, in maniera mirata, questi specifici rischi.</text:span></text:p>
      <text:p text:style-name="P197" loext:marker-style-name="T77"/>
      <text:p text:style-name="P10" loext:marker-style-name="T1"><text:span text:style-name="T33">Come fare, però? Il suggerimento circa le misure da attuare richiede l’intervento di una nuova serie di protagonisti, che devono essere messi in relazione tra loro e sottoposti a una serie di algoritmi di calcolo, per ottenere un responso mirato e produrre suggerimenti circa l’opportunità delle misure da attuare al fine di massimizzare il risultato in base alla pianificazione di un intervento </text:span><text:span text:style-name="T31">mirato</text:span><text:span text:style-name="T33">.</text:span></text:p>
      <text:p text:style-name="P197" loext:marker-style-name="T77"/>
      <text:p text:style-name="P10" loext:marker-style-name="T1"><text:span text:style-name="T33">In teoria, infatti, sarebbe possibile ridurre il livello di rischio tramite un approccio di tipo “bombardamento a tappeto”: in questo scenario, il responsabile dell’AT (Anticorruzione e Trasparenza) propone di inserire tutta una serie di ridondanze (p.es. </text:span><text:span text:style-name="T31">double check</text:span><text:span text:style-name="T33"> o </text:span><text:span text:style-name="T31">triple check</text:span><text:span text:style-name="T33">) che hanno lo scopo di aumentare il livello di controllo e quindi ridurre il livello di rischio. Tuttavia questo approccio, oltre ad essere dispendioso in quanto prevede di aumentare il monte ore di lavoro legato ai controlli, </text:span><text:soft-page-break/><text:span text:style-name="T33">complica anche la filiera di gestione dei processi organizzativi e potrebbe quindi, alla lunga, rivelarsi inefficiente e, addirittura, causare l’introduzione di nuovi rischi, legati alla sovrapposizione dei controlli, laddove questa ridondanza non fosse opportuna e potesse ingenerare confusione.</text:span></text:p>
      <text:p text:style-name="P197" loext:marker-style-name="T77"/>
      <text:p text:style-name="P10" loext:marker-style-name="T1"><text:span text:style-name="T33">Una </text:span><text:span text:style-name="T34">individuazione</text:span><text:span text:style-name="T33"> </text:span><text:span text:style-name="T34">mirata</text:span><text:span text:style-name="T33"> delle misure di prevenzione del rischio, invece, consente di intervenire laddove uno specifico intervento, caratterizzato da uno specifico obiettivo e specifiche azioni, serve realmente, ed è quindi uno strumento non solo di efficacia ma anche di efficienza, perché permette di ottenere il massimo del risultato impiegando il minimo delle risorse.</text:span></text:p>
      <text:p text:style-name="P197" loext:marker-style-name="T77"/>
      <text:list xml:id="list172213415015656" text:continue-list="list172213424761919" text:style-name="WWNum94">
        <text:list-item>
          <text:list>
            <text:list-item>
              <text:list>
                <text:list-item>
                  <text:h text:style-name="P74" text:outline-level="3" loext:marker-style-name="T1"><text:bookmark-start text:name="__RefHeading___Toc10351093021111111"/><text:span text:style-name="T26">I NUOVI ATTORI</text:span><text:bookmark-end text:name="__RefHeading___Toc10351093021111111"/><text:span text:style-name="T26"/></text:h>
                </text:list-item>
              </text:list>
            </text:list-item>
          </text:list>
        </text:list-item>
      </text:list>
      <text:p text:style-name="P10" loext:marker-style-name="T1"><text:span text:style-name="T33">Le entità che caratterizzano questa fase proattiva atta a individuare le contromisure e lanciare una campagna di riduzione del rischio già individuato, oltre che di prevenzione del rischio non ancora individuato, sono, in primis:</text:span><text:span text:style-name="T33"/></text:p>
      <text:list text:style-name="WWNum24">
        <text:list-item>
          <text:list>
            <text:list-item>
              <text:list>
                <text:list-item>
                  <text:list>
                    <text:list-item>
                      <text:h text:style-name="P92" text:outline-level="4" loext:marker-style-name="T1"><text:bookmark-start text:name="__RefHeading___Toc4036_2171737923"/><text:span text:style-name="T39">la misura di riduzione del rischio</text:span><text:bookmark-end text:name="__RefHeading___Toc4036_2171737923"/><text:span text:style-name="T39"/></text:h>
                    </text:list-item>
                    <text:list-item>
                      <text:h text:style-name="P92" text:outline-level="4" loext:marker-style-name="T1"><text:bookmark-start text:name="__RefHeading___Toc4038_2171737923"/><text:span text:style-name="T39">l’indicatore di monitoraggio</text:span><text:bookmark-end text:name="__RefHeading___Toc4038_2171737923"/><text:span text:style-name="T39"/></text:h>
                    </text:list-item>
                    <text:list-item>
                      <text:h text:style-name="P92" text:outline-level="4" loext:marker-style-name="T1"><text:bookmark-start text:name="__RefHeading___Toc4040_2171737923"/><text:span text:style-name="T39">la tipologia della misura</text:span><text:bookmark-end text:name="__RefHeading___Toc4040_2171737923"/><text:span text:style-name="T39"/></text:h>
                    </text:list-item>
                  </text:list>
                </text:list-item>
              </text:list>
            </text:list-item>
          </text:list>
        </text:list-item>
      </text:list>
      <text:p text:style-name="P117" loext:marker-style-name="T1"/>
      <text:list xml:id="list172213662968117" text:continue-list="list172213415015656" text:style-name="WWNum95">
        <text:list-item>
          <text:list>
            <text:list-item>
              <text:list>
                <text:list-item>
                  <text:h text:style-name="P75" text:outline-level="3" loext:marker-style-name="T1"><text:bookmark-start text:name="__RefHeading___Toc103510930211111111"/><text:span text:style-name="T26">LA MISURA DI PREVENZIONE DEL RISCHIO CORRUTTIVO</text:span><text:bookmark-end text:name="__RefHeading___Toc103510930211111111"/><text:span text:style-name="T26"/></text:h>
                </text:list-item>
              </text:list>
            </text:list-item>
          </text:list>
        </text:list-item>
      </text:list>
      <text:p text:style-name="P11"><text:span text:style-name="T33">La misura di prevenzione del rischio corruttivo (chiamata anche “misura di riduzione del rischio”, “misura di mitigazione del rischio” o, talvolta, semplicemente, “misura”) è </text:span><text:span text:style-name="T31">un’azione che viene messa in atto allo scopo di ridurre e/o prevenire il rischio corruttivo cui specifici processi organizzativi risultano, in atto o potenzialmente, esposti.</text:span></text:p>
      <text:p text:style-name="P138" loext:marker-style-name="T1"><text:span text:style-name="T33">Le misure di prevenzione del rischio sono oggetti attinenti alla fase di </text:span><text:span text:style-name="T34">trattamento</text:span><text:span text:style-name="T33"> del rischio.</text:span></text:p>
      <text:p text:style-name="P10" loext:marker-style-name="T1"><text:span text:style-name="T33">Il software [ROL], nei primi 70 deploy, è stato focalizzato sulla </text:span><text:span text:style-name="T34">mappatura</text:span><text:span text:style-name="T33"> dei rischi, ovvero sulla raccolta di dati, poi elaborati tramite specifici algoritmi, finalizzati a divenire informazioni utili ad individuare i processi maggiormente esposti al rischio corruttivo, concentrando queste informazioni in uno specifico indice, chiamato P x I, corredato di motivazione, il tutto costituente il “giudizio sintetico” di ogni processo organizzativo, che permette di assegnare un punteggio di rischio a ciascun processo mappato. </text:span></text:p>
      <text:p text:style-name="P10" loext:marker-style-name="T1"><text:span text:style-name="T33">Questa mappatura dei rischi cui i processi organizzativi risultano esposti permette di costruire una mappa della forza – e, conseguentemente, della debolezza - di un’organizzazione rispetto al rischio corruttivo. </text:span><text:span text:style-name="T33"/></text:p>
      <text:p text:style-name="P10" loext:marker-style-name="T1"><text:span text:style-name="T33">Una volta individuato il livello di rischio cui ogni processo organizzativo risulta esposto, tuttavia un ulteriore salto di qualità si ottiene passando alla fase di </text:span><text:span text:style-name="T34">trattamento</text:span><text:span text:style-name="T33"> del rischio corruttivo, ovvero alla fase di messa in atto delle contromisure atte a ridurre il rischio stesso.</text:span></text:p>
      <text:p text:style-name="P10" loext:marker-style-name="T85"><text:span text:style-name="T34">Il software [ROL] è infatti in grado non soltanto di assegnare un valore di rischio ad ogni processo ma anche di individuare e proporre le contromisure del caso.</text:span><text:span text:style-name="T34"/></text:p>
      <text:p text:style-name="P117" loext:marker-style-name="T1"/>
      <text:p text:style-name="P10" loext:marker-style-name="T1"><text:soft-page-break/><text:span text:style-name="T33">Per poter proporre le misure del caso, bisogna però anzitutto effettuare l’analisi di </text:span><text:span text:style-name="T31">cosa</text:span><text:span text:style-name="T33"> sia esattamente una misura di prevenzione/mitigazione del rischio corruttivo, allo scopo di mapparla nel database sotto forma di entità-relazione e nel software applicativo sotto forma di oggetto con attributi i cui valori possono essere letti, scritti e manipolati tramite specifici algoritmi.</text:span></text:p>
      <text:p text:style-name="P10" loext:marker-style-name="T1"><text:span text:style-name="T33">Cerchiamo, quindi, di capire quali sono le caratteristiche e peculiarità di una misura di prevenzione del rischio, al fine di individuarne gli attributi e le relazioni con le altre entità.</text:span><text:span text:style-name="T33"/></text:p>
      <text:list xml:id="list172213735567012" text:continue-list="list172214001374441" text:style-name="WWNum1">
        <text:list-item>
          <text:list>
            <text:list-item>
              <text:list>
                <text:list-item>
                  <text:list>
                    <text:list-item>
                      <text:h text:style-name="P90" text:outline-level="4"><text:bookmark-start text:name="__RefHeading___Toc4429_2037361864"/>TIPOLOGIA<text:bookmark-end text:name="__RefHeading___Toc4429_2037361864"/></text:h>
                    </text:list-item>
                  </text:list>
                </text:list-item>
              </text:list>
            </text:list-item>
          </text:list>
        </text:list-item>
      </text:list>
      <text:p text:style-name="P10" loext:marker-style-name="T1"><text:span text:style-name="T33">Una misura di prevenzione del rischio ha certamente una </text:span><text:span text:style-name="T34">tipologia</text:span><text:span text:style-name="T33">; quest’ultima è un’entità forte, con cui la misura stessa si relaziona. </text:span></text:p>
      <text:p text:style-name="P10" loext:marker-style-name="T1"><text:span text:style-name="T33">La tipologia di una misura può essere varia; p.es.:</text:span><text:span text:style-name="T33"/></text:p>
      <text:list text:style-name="WWNum11">
        <text:list-item>
          <text:p text:style-name="P151" loext:marker-style-name="T1"><text:span text:style-name="T1">di regolamentazione</text:span><text:span text:style-name="T1"/></text:p>
        </text:list-item>
        <text:list-item>
          <text:p text:style-name="P151" loext:marker-style-name="T1"><text:span text:style-name="T1">di disciplina del conflitto d’interesse</text:span><text:span text:style-name="T1"/></text:p>
        </text:list-item>
        <text:list-item>
          <text:p text:style-name="P151" loext:marker-style-name="T1"><text:span text:style-name="T1">di trasparenza</text:span><text:span text:style-name="T1"/></text:p>
        </text:list-item>
        <text:list-item>
          <text:p text:style-name="P151" loext:marker-style-name="T1"><text:span text:style-name="T1">di prevenzione</text:span><text:span text:style-name="T1"/></text:p>
        </text:list-item>
      </text:list>
      <text:p text:style-name="P10" loext:marker-style-name="T1"><text:span text:style-name="T1">etc…</text:span><text:span text:style-name="T1"/></text:p>
      <text:list xml:id="list172213007458204" text:continue-list="list172213735567012" text:style-name="WWNum1">
        <text:list-item>
          <text:list>
            <text:list-item>
              <text:list>
                <text:list-item>
                  <text:list>
                    <text:list-item>
                      <text:h text:style-name="P90" text:outline-level="4"><text:bookmark-start text:name="__RefHeading___Toc4432_2037361864"/>CARATTERE<text:bookmark-end text:name="__RefHeading___Toc4432_2037361864"/></text:h>
                    </text:list-item>
                  </text:list>
                </text:list-item>
              </text:list>
            </text:list-item>
          </text:list>
        </text:list-item>
      </text:list>
      <text:p text:style-name="P10" loext:marker-style-name="T1"><text:span text:style-name="T1">Oltre ad avere una tipologia, una misura ha anche un </text:span><text:span text:style-name="T2">carattere</text:span><text:span text:style-name="T1">, che può essere:</text:span></text:p>
      <text:list text:style-name="WWNum12">
        <text:list-item>
          <text:p text:style-name="P152" loext:marker-style-name="T1"><text:span text:style-name="T1">generale</text:span><text:span text:style-name="T1"/></text:p>
        </text:list-item>
        <text:list-item>
          <text:p text:style-name="P152" loext:marker-style-name="T1"><text:span text:style-name="T1">specifico</text:span><text:span text:style-name="T1"/></text:p>
        </text:list-item>
      </text:list>
      <text:p text:style-name="P10" loext:marker-style-name="T1"><text:span text:style-name="T1">Si potrebbe anche considerare un carattere “misto” ma probabilmente quest’ultima sarebbe semanticamente un po’ troppo debole (è un po’ vago un valore che indica che una misura “è un po’ generale e un po’ specifica, un po’ tutte e due, un po’ nessuna”…)</text:span><text:span text:style-name="T1"/></text:p>
      <text:list xml:id="list172214173717480" text:continue-list="list172213007458204" text:style-name="WWNum1">
        <text:list-item>
          <text:list>
            <text:list-item>
              <text:list>
                <text:list-item>
                  <text:list>
                    <text:list-item>
                      <text:h text:style-name="P90" text:outline-level="4"><text:bookmark-start text:name="__RefHeading___Toc4434_2037361864"/>SOSTENIBILITÀ ORGANIZZATIVA<text:bookmark-end text:name="__RefHeading___Toc4434_2037361864"/></text:h>
                    </text:list-item>
                  </text:list>
                </text:list-item>
              </text:list>
            </text:list-item>
          </text:list>
        </text:list-item>
      </text:list>
      <text:p text:style-name="P10" loext:marker-style-name="T1"><text:span text:style-name="T33">Inoltre, una misura va valutata in funzione della sua </text:span><text:span text:style-name="T34">sostenibilità organizzativa</text:span><text:span text:style-name="T33">: ad esempio, una misura che preveda di coinvolgere, da oggi, tutte le strutture organizzative in misura del 75% delle loro quote parte di lavoro erogate (“obbligo da oggi che i ¾ del lavoro di tutte le strutture dell’organizzazione sia l’attuazione della misura di sicurezza X”) <text:s/>potrà forse (e non è neanche detto) essere potente ed efficace, ma certamente non sarà efficiente, quindi non sarà organizzativamente sostenibile. </text:span></text:p>
      <text:p text:style-name="P10" loext:marker-style-name="T1"><text:span text:style-name="T33">La sostenibilità organizzativa può essere calcolata: </text:span><text:span text:style-name="T33"/></text:p>
      <text:list text:style-name="WWNum10">
        <text:list-item>
          <text:p text:style-name="P153" loext:marker-style-name="T1"><text:span text:style-name="T33">valutando l’impatto sulle strutture organizzative (quante strutture vengono coinvolte? Che percentuale di strutture viene impiegata rispetto al totale? Quanta quota parte di lavoro le strutture coinvolte devono erogare per attuare la misura di sicurezza?) </text:span><text:span text:style-name="T33"/></text:p>
        </text:list-item>
        <text:list-item>
          <text:p text:style-name="P153" loext:marker-style-name="T1"><text:span text:style-name="T33">valutando se la misura in questione è già presente e va solo riconfermata, è già prevista, o è una misura totalmente nuova.</text:span><text:span text:style-name="T33"/></text:p>
        </text:list-item>
      </text:list>
      <text:p text:style-name="P10" loext:marker-style-name="T1"><text:span text:style-name="T33">Questi due criteri, incrociati in uno specifico algoritmo, possono generare un valore di sostenibilità organizzativa di ogni misura di sicurezza. Pertanto, la sostenibilità organizzativa di una misura è un indice che va calcolato a valle dell’inserimento e dell’applicazione della misura stessa.</text:span><text:span text:style-name="T33"/></text:p>
      <text:list text:continue-list="list172214173717480" text:style-name="WWNum1">
        <text:list-item>
          <text:list>
            <text:list-item>
              <text:list>
                <text:list-item>
                  <text:list>
                    <text:list-item>
                      <text:h text:style-name="P90" text:outline-level="4"><text:bookmark-start text:name="__RefHeading___Toc4436_2037361864"/><text:soft-page-break/>SOSTENIBILITÀ ECONOMICA<text:bookmark-end text:name="__RefHeading___Toc4436_2037361864"/></text:h>
                    </text:list-item>
                  </text:list>
                </text:list-item>
              </text:list>
            </text:list-item>
          </text:list>
        </text:list-item>
      </text:list>
      <text:p text:style-name="P10" loext:marker-style-name="T1"><text:span text:style-name="T33">L’altro criterio rispetto al quale va valutata una misura di sicurezza è la </text:span><text:span text:style-name="T34">sostenibilità economica</text:span><text:span text:style-name="T33">.</text:span></text:p>
      <text:p text:style-name="P10" loext:marker-style-name="T1"><text:span text:style-name="T33">Il discorso è analogo a quello della sostenibilità organizzativa: una misura potentissima, che metterebbe <text:s/>al riparo l’organizzazione da (quasi) ogni rischio, potrebbe essere non sostenibile economicamente. P.es., la contrattualizzazione di 100 revisori che vagliano le procedure, i bilanci, che controllano l’operato di ogni settore aziendale, potrebbe portare a una forte riduzione del rischio, ma non sarebbe sostenibile da parte di un’impresa con 10 dipendenti distribuiti tra un settore produttivo (8) e un settore di contabilità (2) - oltre ad essere sostanzialmente </text:span><text:span text:style-name="T31">sbagliato</text:span><text:span text:style-name="T33"> come approccio.</text:span></text:p>
      <text:p text:style-name="P10" loext:marker-style-name="T1"><text:span text:style-name="T33">La sostenibilità economica può essere calcolata semplicemente sommando l’esborso in termini di spese (dirette internamente o all’esterno) che l’applicazione della misura comporterebbe.</text:span><text:span text:style-name="T33"/></text:p>
      <text:list xml:id="list172212893886975" text:continue-numbering="true" text:style-name="WWNum1">
        <text:list-item>
          <text:list>
            <text:list-item>
              <text:list>
                <text:list-item>
                  <text:list>
                    <text:list-item>
                      <text:h text:style-name="P90" text:outline-level="4"><text:bookmark-start text:name="__RefHeading___Toc4438_2037361864"/>RELAZIONE VERSO LA STRUTTURA<text:bookmark-end text:name="__RefHeading___Toc4438_2037361864"/></text:h>
                    </text:list-item>
                  </text:list>
                </text:list-item>
              </text:list>
            </text:list-item>
          </text:list>
        </text:list-item>
      </text:list>
      <text:p text:style-name="P10" loext:marker-style-name="T1"><text:span text:style-name="T33">Una misura deve avere una </text:span><text:span text:style-name="T34">struttura responsabile</text:span><text:span text:style-name="T33"> della messa in atto della misura stessa, quindi la misura è in relazione con la struttura:</text:span></text:p>
      <text:p text:style-name="P197" loext:marker-style-name="T77"><draw:custom-shape text:anchor-type="char" draw:z-index="31" draw:name="Cornice22" draw:style-name="gr21" draw:text-style-name="P265" svg:width="11.669cm" svg:height="4.786cm" svg:x="2.96cm" svg:y="0.002cm"><text:p text:style-name="P28" loext:marker-style-name="T1"><text:span text:style-name="T86"><draw:frame draw:style-name="fr2" draw:name="Immagine28" text:anchor-type="as-char" svg:width="11.668cm" svg:height="3.863cm" draw:z-index="81"><draw:image xlink:href="Pictures/10000001000001B90000009271C1C633.png" xlink:type="simple" xlink:show="embed" xlink:actuate="onLoad" draw:mime-type="image/png"/></draw:frame></text:span><text:span text:style-name="T96">Figura </text:span><text:span text:style-name="T96"><text:sequence text:ref-name="refFigura15" text:name="Figura" text:formula="ooow:Figura+1" style:num-format="1">16</text:sequence></text:span><text:span text:style-name="T96">: Relazione tra la misura e</text:span><text:span text:style-name="T139"> </text:span><text:span text:style-name="T96">la</text:span><text:span text:style-name="T139"> </text:span><text:span text:style-name="T96">struttur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17" loext:marker-style-name="T1"/>
      <text:p text:style-name="P10" loext:marker-style-name="T1"><text:span text:style-name="T33">Una misura di sicurezza ha almeno una struttura organizzativa e può averne più di una; mentre una struttura ha zero o più misure di sicurezza (relazione molti-a-molti).</text:span><text:span text:style-name="T33"/></text:p>
      <text:p text:style-name="P10" loext:marker-style-name="T1"><text:span text:style-name="T33">Il ruolo della struttura rispetto alla misura è un attributo della relazione tra la misura e la struttura.</text:span><text:span text:style-name="T33"/></text:p>
      <text:p text:style-name="P197" loext:marker-style-name="T77"/>
      <text:p text:style-name="P10" loext:marker-style-name="T1"><text:span text:style-name="T33">Prima di entrare nel merito dello schema E-R atto a tradurre questa parte del modello, è opportuno fare un esempio, in modo da capire esattamente qual è la situazione che dobbiamo rappresentare.</text:span><text:span text:style-name="T33"/></text:p>
      <text:p text:style-name="P10" loext:marker-style-name="T1"><text:span text:style-name="T33">Poniamo di dover esaminare una misura di sicurezza in rapporto allo scenario.</text:span><text:span text:style-name="T33"/></text:p>
      <text:p text:style-name="P10" loext:marker-style-name="T1"><text:span text:style-name="T33">Per poter fare un’analisi del <text:s/>genere, è necessario esaminare gli attori coinvolti, che nel caso specifico sono: </text:span><text:span text:style-name="T31">processo, rischio, fattore abilitante, misura di sicurezza e tipologia di misura.</text:span></text:p>
      <text:p text:style-name="P10" loext:marker-style-name="T1"><text:span text:style-name="T31">Esempio:</text:span><text:span text:style-name="T31"/></text:p>
      <text:p text:style-name="P197" loext:marker-style-name="T77"/>
      <table:table table:name="Table5" table:style-name="Table5">
        <table:table-column table:style-name="Table5.A"/>
        <table:table-column table:style-name="Table5.B"/>
        <table:table-column table:style-name="Table5.C"/>
        <table:table-column table:style-name="Table5.B"/>
        <table:table-column table:style-name="Table5.C"/>
        <table:table-header-rows>
          <table:table-row table:style-name="Table5.1">
            <table:table-cell table:style-name="Table5.A1" office:value-type="string">
              <text:p text:style-name="P37" loext:marker-style-name="T1"><text:span text:style-name="T162">PROCESSO</text:span><text:span text:style-name="T162"/></text:p>
            </table:table-cell>
            <table:table-cell table:style-name="Table5.A1" office:value-type="string">
              <text:p text:style-name="P37" loext:marker-style-name="T1"><text:span text:style-name="T162">RISCHIO</text:span><text:span text:style-name="T162"/></text:p>
            </table:table-cell>
            <table:table-cell table:style-name="Table5.A1" office:value-type="string">
              <text:p text:style-name="P37" loext:marker-style-name="T1"><text:span text:style-name="T162">FATTORE ABILITANTE</text:span><text:span text:style-name="T162"/></text:p>
            </table:table-cell>
            <table:table-cell table:style-name="Table5.A1" office:value-type="string">
              <text:p text:style-name="P37" loext:marker-style-name="T1"><text:span text:style-name="T162">MISURA</text:span><text:span text:style-name="T162"/></text:p>
            </table:table-cell>
            <table:table-cell table:style-name="Table5.A1" office:value-type="string">
              <text:p text:style-name="P37" loext:marker-style-name="T1"><text:span text:style-name="T162">TIPOLOGIA DI MISURA</text:span><text:span text:style-name="T162"/></text:p>
            </table:table-cell>
          </table:table-row>
        </table:table-header-rows>
        <table:table-row table:style-name="Table5.1">
          <table:table-cell table:style-name="Table5.A2" office:value-type="string">
            <text:p text:style-name="P42" loext:marker-style-name="T1"><text:span text:style-name="T110">Concorsi <text:s/>per <text:s/>PTA</text:span><text:span text:style-name="T110"/></text:p>
          </table:table-cell>
          <table:table-cell table:style-name="Table5.B2" office:value-type="string">
            <text:p text:style-name="P42" loext:marker-style-name="T1"><text:span text:style-name="T110">Conflitto <text:s/>di <text:s/>interesse</text:span><text:span text:style-name="T110"/></text:p>
          </table:table-cell>
          <table:table-cell table:style-name="Table5.B2" office:value-type="string">
            <text:p text:style-name="P42" loext:marker-style-name="T1"><text:span text:style-name="T110">Inadeguata cultura della legalità</text:span><text:span text:style-name="T110"/></text:p>
          </table:table-cell>
          <table:table-cell table:style-name="Table5.B2" office:value-type="string">
            <text:p text:style-name="P42" loext:marker-style-name="T1"><text:span text:style-name="T110">Linee guida</text:span><text:span text:style-name="T110"/></text:p>
          </table:table-cell>
          <table:table-cell table:style-name="Table5.E2" office:value-type="string">
            <text:p text:style-name="P42" loext:marker-style-name="T1"><text:span text:style-name="T110">Regolamentazione</text:span><text:span text:style-name="T110"/></text:p>
          </table:table-cell>
        </table:table-row>
      </table:table>
      <text:p text:style-name="P197" loext:marker-style-name="T77"/>
      <text:p text:style-name="P197" loext:marker-style-name="T77"/>
      <text:p text:style-name="P117" loext:marker-style-name="T1"/>
      <text:p text:style-name="P145" loext:marker-style-name="T1"><text:span text:style-name="T1">Quella riportata sopra è la soluzione che bisogna ingegnerizzare: un processo (CONCORSI) è connesso a una serie di rischi (p.es. CONFLITTO DI INTERESSE), i quali sono a loro volta connessi a una serie di fattori abilitanti… prima di procedere oltre, ricordiamo infatti che i</text:span><text:span text:style-name="T33">l processo organizzativo, censito a fini anticorruttivi, è legato sia al rischio sia al fattore abilitante attraverso una relazione ternaria:</text:span></text:p>
      <text:p text:style-name="P197" loext:marker-style-name="T77"/>
      <text:p text:style-name="P197" loext:marker-style-name="T77"><draw:custom-shape text:anchor-type="char" draw:z-index="70" draw:name="Cornice 1" draw:style-name="gr5" draw:text-style-name="P265" svg:width="17.015cm" svg:height="7.492cm" svg:x="0.288cm" svg:y="0.153cm"><text:p text:style-name="P30" loext:marker-style-name="T96"><draw:frame draw:style-name="fr2" draw:name="Immagine29" text:anchor-type="as-char" svg:width="13.628cm" svg:height="6.078cm" draw:z-index="126"><draw:image xlink:href="Pictures/10000001000001A9000000C5C94B4E66.png" xlink:type="simple" xlink:show="embed" xlink:actuate="onLoad" draw:mime-type="image/png"/></draw:frame></text:p><text:p text:style-name="P28" loext:marker-style-name="T96"><text:span text:style-name="T96">Figura </text:span><text:span text:style-name="T96"><text:sequence text:ref-name="refFigura16" text:name="Figura" text:formula="ooow:Figura+1" style:num-format="1">17</text:sequence></text:span><text:span text:style-name="T96">: La relazione ternaria tra </text:span><text:span text:style-name="T155">rischio</text:span><text:span text:style-name="T96">, </text:span><text:span text:style-name="T165">processo</text:span><text:span text:style-name="T96"> e </text:span><text:span text:style-name="T97">fattore abilitante</text:span><text:span text:style-name="T96">.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7" loext:marker-style-name="T1"/>
      <text:p text:style-name="P10" loext:marker-style-name="T1"><text:span text:style-name="T1">Quindi il processo è associato a uno o più rischi, che a loro volta sono associati a uno o più fattori abilitanti; ma ogni rischio, nel contesto di un dato processo, deve poter essere associato anche a una o più misure di prevenzione, ciascuna delle quali ha una sua tipologia ed un suo carattere.</text:span><text:span text:style-name="T1"/></text:p>
      <text:p text:style-name="P10" loext:marker-style-name="T1"><text:span text:style-name="T1">Ciò delinea una ulteriore relazione ternaria tra processo_at, rischio e misura di prevenzione/riduzione:</text:span><text:span text:style-name="T1"/></text:p>
      <text:p text:style-name="P197" loext:marker-style-name="T77"/>
      <text:p text:style-name="P197" loext:marker-style-name="T77"/>
      <text:p text:style-name="P197" loext:marker-style-name="T77"><draw:custom-shape text:anchor-type="char" draw:z-index="41" draw:name="Cornice25" draw:style-name="gr17" draw:text-style-name="P265" svg:width="15.209cm" svg:height="7.384cm" svg:x="1.191cm" svg:y="0.002cm"><text:p text:style-name="P30" loext:marker-style-name="T96"><draw:frame draw:style-name="fr2" draw:name="Immagine31" text:anchor-type="as-char" svg:width="13.331cm" svg:height="6.253cm" draw:z-index="91"><draw:image xlink:href="Pictures/10000001000001A4000000C549C64B7C.png" xlink:type="simple" xlink:show="embed" xlink:actuate="onLoad" draw:mime-type="image/png"/></draw:frame></text:p><text:p text:style-name="P28" loext:marker-style-name="T96"><text:span text:style-name="T96">Figura </text:span><text:span text:style-name="T96"><text:sequence text:ref-name="refFigura17" text:name="Figura" text:formula="ooow:Figura+1" style:num-format="1">18</text:sequence></text:span><text:span text:style-name="T96">: La relazione ternaria tra </text:span><text:span text:style-name="T155">rischio</text:span><text:span text:style-name="T96">, </text:span><text:span text:style-name="T165">processo</text:span><text:span text:style-name="T96"> e </text:span><text:span text:style-name="T166">misura</text:span><text:span text:style-name="T96">.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text:soft-page-break/></text:p>
      <text:p text:style-name="P10" loext:marker-style-name="T1"><text:span text:style-name="T33">Pertanto, la relazione diretta tra rischio e misura va specializzata con una relazione ternaria tra il rischio, il processo e la misura stessa.</text:span><text:span text:style-name="T33"/></text:p>
      <text:p text:style-name="P10" loext:marker-style-name="T1"><text:span text:style-name="T37">Ciò significa che, da qualunque entità si parta accedendo alla relazione, sarà possibile risalire alle altre entità coinvolte.</text:span><text:span text:style-name="T33"/></text:p>
      <text:p text:style-name="P197" loext:marker-style-name="T77"/>
      <text:p text:style-name="P197" loext:marker-style-name="T77"/>
      <text:p text:style-name="P154" loext:marker-style-name="T1"><text:span text:style-name="T167">NOTA BENE</text:span><text:span text:style-name="T167"/></text:p>
      <text:p text:style-name="P155" loext:marker-style-name="T1"><text:span text:style-name="T1">In realtà quelle descritte nell’analisi come relazioni semplici sono già relazioni ternarie e quelle descritte come ternarie nel nostro schema sono tutte relazioni n-arie, in quanto quasi ogni entità dello schema è debole dipendendo dalla rilevazione, e così pure le relazioni stesse. </text:span><text:span text:style-name="T1"/></text:p>
      <text:p text:style-name="P155" loext:marker-style-name="T1"><text:span text:style-name="T1">Tuttavia, nell’analisi trattiamo tutte le relazioni semplici tra entità come se fossero binarie (piuttosto che ternarie come sono in realtà) in quanto l’esistenza di un ulteriore ramo verso la rilevazione è un elemento ricorrente nello schema, cioè comune a tutte le relazioni, e quindi può essere spostato in background nell’analisi descrittiva e, in definitiva, dato per scontato. </text:span><text:span text:style-name="T1"/></text:p>
      <text:p text:style-name="P155" loext:marker-style-name="T1"><text:span text:style-name="T1">Nell’analisi descrittiva, pertanto, il riferimento alla rilevazione normalmente verrà omesso, mentre i vari passaggi daranno evidenza a entità specifiche, per cui si parlerà di relazioni semplici, relazioni ternarie, relazioni 4-arie etc. piuttosto che di relazioni ternarie, relazioni 4-arie, relazioni n-arie.</text:span><text:span text:style-name="T1"/></text:p>
      <text:p text:style-name="P155" loext:marker-style-name="T1"><text:span text:style-name="T1">In questa fase dell’analisi, ci basti dire che </text:span><text:span text:style-name="T10">anche la misura presenta un ramo verso la rilevazione, in quanto </text:span><text:span text:style-name="T3">anche le misure possono essere storicizzate in una rilevazione.</text:span></text:p>
      <text:p text:style-name="P197" loext:marker-style-name="T77"/>
      <text:p text:style-name="P197" loext:marker-style-name="T77"/>
      <text:p text:style-name="P10" loext:marker-style-name="T1"><text:span text:style-name="T33">Il fattore abilitante, dal canto suo, viene associato alla misura tramite la tipologia della misura stessa, che è in relazione diretta con il fattore abilitante stesso.</text:span><text:span text:style-name="T33"/></text:p>
      <text:p text:style-name="P117" loext:marker-style-name="T1"/>
      <text:p text:style-name="P117" loext:marker-style-name="T1"/>
      <text:p text:style-name="P117" loext:marker-style-name="T1"><draw:frame draw:style-name="fr1" draw:name="Frame19" text:anchor-type="char" svg:x="2.635cm" svg:y="0.099cm" svg:width="12.321cm" draw:z-index="8"><draw:text-box fo:min-height="3.175cm"><text:p text:style-name="P24"><draw:frame draw:style-name="fr6" draw:name="Immagine27" text:anchor-type="paragraph" svg:width="12.321cm" style:rel-width="100%" svg:height="3.175cm" style:rel-height="scale" draw:z-index="13"><draw:image xlink:href="Pictures/1000000000000205000000783EAD71F2.png" xlink:type="simple" xlink:show="embed" xlink:actuate="onLoad" draw:mime-type="image/png"/></draw:frame>Figura <text:sequence text:ref-name="refFigura18" text:name="Figura" text:formula="ooow:Figura+1" style:num-format="1">19</text:sequence>: La relazione diretta tra la tipologia della misura ed il fattore abilitante</text:p></draw:text-box></draw:frame></text:p>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3"/>
      <text:p text:style-name="P10" loext:marker-style-name="T1"><text:span text:style-name="T1"/></text:p>
      <text:p text:style-name="P10" loext:marker-style-name="T1"><text:span text:style-name="T1">Riepilogando: oltre alle normali relazioni con le entità forti (tipologia, carattere) abbiamo:</text:span><text:span text:style-name="T1"/></text:p>
      <text:list text:style-name="WWNum13">
        <text:list-item>
          <text:p text:style-name="P156" loext:marker-style-name="T1"><text:span text:style-name="T1">due relazioni ternarie indipendenti ma collegate tra loro tramite il rischio corruttivo; </text:span><text:span text:style-name="T1"/></text:p>
        </text:list-item>
        <text:list-item>
          <text:p text:style-name="P156" loext:marker-style-name="T1"><text:span text:style-name="T1">una relazione indiretta tra la misura ed il fattore abilitante tramite la tipologia della misura; </text:span><text:span text:style-name="T1"/></text:p>
        </text:list-item>
        <text:list-item>
          <text:p text:style-name="P156" loext:marker-style-name="T1"><text:span text:style-name="T1">una relazione diretta tra la misura e la struttura, che ha un attributo specificante il ruolo {capofila | gregaria} che la struttura ha rispetto alla misura.</text:span><text:span text:style-name="T1"/></text:p>
        </text:list-item>
      </text:list>
      <text:p text:style-name="P198" loext:marker-style-name="T77"/>
      <text:p text:style-name="P197" loext:marker-style-name="T77"/>
      <text:p text:style-name="P197" loext:marker-style-name="T77"/>
      <text:p text:style-name="P197" loext:marker-style-name="T77"><draw:custom-shape text:anchor-type="char" draw:z-index="12" draw:name="Cornice27" draw:style-name="gr29" draw:text-style-name="P265" svg:width="15.28cm" svg:height="14.241cm" svg:x="1.155cm" svg:y="0.002cm"><text:p text:style-name="P30" loext:marker-style-name="T96"><draw:frame draw:style-name="fr5" draw:name="Immagine32" text:anchor-type="as-char" svg:width="14.099cm" svg:height="12.411cm" draw:z-index="99"><draw:image xlink:href="Pictures/1000000000000200000001EBEBED96B1.png" xlink:type="simple" xlink:show="embed" xlink:actuate="onLoad" draw:mime-type="image/png"/></draw:frame></text:p><text:p text:style-name="P28" loext:marker-style-name="T96"><text:span text:style-name="T96">Figura </text:span><text:span text:style-name="T96"><text:sequence text:ref-name="refFigura19" text:name="Figura" text:formula="ooow:Figura+1" style:num-format="1">20</text:sequence></text:span><text:span text:style-name="T96">: Diagramma E-R (Schema concettuale) della parte di modello relativa alla descrizione della misura di prevenzione del rischi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h text:style-name="P81" text:outline-level="3" loext:marker-style-name="T1"/>
      <text:p text:style-name="P9"/>
      <text:list xml:id="list172212998536265" text:continue-list="list172213662968117" text:style-name="WWNum96">
        <text:list-item>
          <text:list>
            <text:list-item>
              <text:list>
                <text:list-item>
                  <text:h text:style-name="P76" text:outline-level="3" loext:marker-style-name="T1"><text:bookmark-start text:name="__RefHeading___Toc1035109302111111111"/><text:span text:style-name="T26">VISTA DELL’IMPLEMENTAZIONE</text:span><text:bookmark-end text:name="__RefHeading___Toc1035109302111111111"/><text:span text:style-name="T26"/></text:h>
                </text:list-item>
              </text:list>
            </text:list-item>
          </text:list>
        </text:list-item>
      </text:list>
      <text:p text:style-name="P10" loext:marker-style-name="T1"><text:span text:style-name="T33">Si prevede di implementare due interfacce distinte riguardo alla parte di mappatura delle misure di prevenzione del rischio corruttivo:</text:span><text:span text:style-name="T33"/></text:p>
      <text:list xml:id="list3879974383" text:style-name="WWNum14">
        <text:list-item>
          <text:p text:style-name="P157" loext:marker-style-name="T1"><text:span text:style-name="T1">il registro delle misure</text:span><text:span text:style-name="T1"/></text:p>
        </text:list-item>
        <text:list-item>
          <text:p text:style-name="P157" loext:marker-style-name="T1"><text:span text:style-name="T1">la funzione di associazione misura-rischio-processo (inserimento tupla 3-aria)</text:span><text:span text:style-name="T1"/></text:p>
        </text:list-item>
      </text:list>
      <text:p text:style-name="P117" loext:marker-style-name="T1"/>
      <text:list text:continue-list="list172212893886975" text:style-name="WWNum1">
        <text:list-item>
          <text:list>
            <text:list-item>
              <text:list>
                <text:list-item>
                  <text:list>
                    <text:list-item>
                      <text:h text:style-name="P89" text:outline-level="4" loext:marker-style-name="T1"><text:bookmark-start text:name="__RefHeading___Toc10351093021111111112"/><text:span text:style-name="T1">1. REGISTRO DELLE MISURE</text:span><text:bookmark-end text:name="__RefHeading___Toc10351093021111111112"/><text:span text:style-name="T1"/></text:h>
                    </text:list-item>
                  </text:list>
                </text:list-item>
              </text:list>
            </text:list-item>
          </text:list>
        </text:list-item>
      </text:list>
      <text:p text:style-name="P10" loext:marker-style-name="T1"><text:span text:style-name="T1">Il registro delle misure è composto da una pagina di elenco delle misure già inserite; se non è stata ancora inserita alcuna misura, la pagina è vuota.</text:span><text:span text:style-name="T1"/></text:p>
      <text:p text:style-name="P117" loext:marker-style-name="T1"/>
      <text:p text:style-name="P10" loext:marker-style-name="T1"><text:span text:style-name="T1">Nella pagina c’è un bottone che permette di accedere alla funzionalità di inserimento di una nuova misura.</text:span><text:span text:style-name="T1"/></text:p>
      <text:p text:style-name="P10" loext:marker-style-name="T1"><text:span text:style-name="T1">Il clic su tale bottone aprirà una nuova pagina, contenente la form di inserimento di una misura.</text:span><text:span text:style-name="T1"/></text:p>
      <text:p text:style-name="P10" loext:marker-style-name="T1"><text:span text:style-name="T1">In questa form sono presenti campi obbligatori e un campo facoltativo. Nel mockup riportato in figura 21, i dati obbligatori sono indicati dal grassetto e dall’asterisco; inoltre, nelle scelte da casella a discesa, se una dropdown list è obbligatoria, specifica già Option 1, mentre se è facoltativa di default specifica “-- Nessuna --”. <text:s/></text:span><text:span text:style-name="T1"/></text:p>
      <text:p text:style-name="P117" loext:marker-style-name="T1"/>
      <text:p text:style-name="P10" loext:marker-style-name="T1"><text:span text:style-name="T1">Per inserire una nuova misura bisogna specificare anzitutto un nome, un carattere ed almeno un tipo; le tipologie della misura possono essere più d’una per una sola misura (cioè una singola misura può riguardare più aspetti e quindi più tipologie). </text:span><text:span text:style-name="T1"/></text:p>
      <text:p text:style-name="P10" loext:marker-style-name="T1"><text:span text:style-name="T1">Quantunque la struttura capofila sia obbligatoria, è possibile per l’utente specificare anche soltanto una struttura di livello 1 (Amministrazione | Dipartimenti | Centri) senza specificare sotto-strutture (direzione, area, uo…); in tal caso, la misura si intende relativa non solo alla struttura specificata, ma anche a tutte le strutture figlie della struttura specificata.</text:span><text:span text:style-name="T1"/></text:p>
      <text:p text:style-name="P10" loext:marker-style-name="T1"><text:span text:style-name="T1">Siccome però la granularità dell’associazione tra la misura e la struttura è molto fine, deve essere possibile collegare una misura anche a sottostrutture di strutture diverse, e il numero di queste <text:s/>associazioni non è vincolato in partenza. Per questo motivo, è presente il pulsante “+ Struttura” che permette di specificare una ulteriore struttura associata alla misura.</text:span><text:span text:style-name="T1"/></text:p>
      <text:p text:style-name="P10" loext:marker-style-name="T1"><text:span text:style-name="T1">Il funzionamento della struttura gregaria è identico a quello della struttura capofila, con la differenza che non è obbligatorio specificare questo campo.</text:span><text:span text:style-name="T1"/></text:p>
      <text:p text:style-name="P10" loext:marker-style-name="T1"><text:span text:style-name="T1">Al salvataggio della funzione, verrà ricaricato l’elenco delle misure, in cui sarà visibile la nuova misura appena aggiunta.</text:span><text:span text:style-name="T1"/></text:p>
      <text:p text:style-name="P10" loext:marker-style-name="T1"><text:span text:style-name="T1">La domanda “[La misura] comporta spese?” è relativa alla sostenibilità economica, e prevede una scelta obbligatoria tra 3 valori: { SI | NO | ND } dove ND sta per “Non Determinabile” (ovvero, non è possibile stabilirlo per chi sta inserendo la misura al momento dell’inserimento della stessa).</text:span><text:span text:style-name="T1"/></text:p>
      <text:p text:style-name="P117" loext:marker-style-name="T1"/>
      <text:p text:style-name="P118" loext:marker-style-name="T1"><draw:custom-shape text:anchor-type="char" draw:z-index="16" draw:name="Cornice28" draw:style-name="gr27" draw:text-style-name="P265" svg:width="13.944cm" svg:height="22.582cm" svg:x="1.824cm" svg:y="0.411cm"><text:p text:style-name="P28" loext:marker-style-name="T96"><text:span text:style-name="T86"><draw:frame draw:style-name="fr2" draw:name="Immagine33" text:anchor-type="as-char" svg:width="13.944cm" svg:height="20.948cm" draw:z-index="47"><draw:image xlink:href="Pictures/100000000000026B000003D7955835BE.png" xlink:type="simple" xlink:show="embed" xlink:actuate="onLoad" draw:mime-type="image/png"/></draw:frame></text:span><text:span text:style-name="T96">Figura </text:span><text:span text:style-name="T96"><text:sequence text:ref-name="refFigura20" text:name="Figura" text:formula="ooow:Figura+1" style:num-format="1">21</text:sequence></text:span><text:span text:style-name="T96">: Mockup del registro delle misure </text:span></text:p><text:p text:style-name="P28" loext:marker-style-name="T96"><text:span text:style-name="T96">e della funzionalità di aggiunta di una nuova misur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7" loext:marker-style-name="T1"/>
      <text:p text:style-name="P118" loext:marker-style-name="T1"/>
      <text:p text:style-name="P10" loext:marker-style-name="T1"><text:span text:style-name="T1">Cliccando sul nome di una misura in elenco, nel registro delle misure, sarà anche possibile visualizzare una pagina dei dettagli di una misura.</text:span><text:span text:style-name="T1"/></text:p>
      <text:p text:style-name="P117" loext:marker-style-name="T1"/>
      <text:p text:style-name="P117" loext:marker-style-name="T1"><draw:custom-shape text:anchor-type="char" draw:z-index="71" draw:name="Cornice31" draw:style-name="gr4" draw:text-style-name="P265" svg:width="17.59cm" svg:height="18.308cm" svg:x="0cm" svg:y="0.002cm"><text:p text:style-name="P28" loext:marker-style-name="T96"><text:span text:style-name="T86"><draw:frame draw:style-name="fr2" draw:name="Immagine63" text:anchor-type="as-char" svg:width="17.59cm" svg:height="16.674cm" draw:z-index="104"><draw:image xlink:href="Pictures/1000000100000327000002FDCD808B68.png" xlink:type="simple" xlink:show="embed" xlink:actuate="onLoad" draw:mime-type="image/png"/></draw:frame></text:span><text:span text:style-name="T96">Figura </text:span><text:span text:style-name="T96"><text:sequence text:ref-name="refFigura21" text:name="Figura" text:formula="ooow:Figura+1" style:num-format="1">22</text:sequence></text:span><text:span text:style-name="T96">: Mockup del registro delle misure </text:span></text:p><text:p text:style-name="P28" loext:marker-style-name="T96"><text:span text:style-name="T96">e della pagina dei dettagli di una misur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7" loext:marker-style-name="T1"/>
      <text:p text:style-name="P117" loext:marker-style-name="T1"/>
      <text:p text:style-name="P118" loext:marker-style-name="T1"/>
      <text:list xml:id="list172212811481074" text:continue-numbering="true" text:style-name="WWNum1">
        <text:list-item>
          <text:list>
            <text:list-item>
              <text:list>
                <text:list-item>
                  <text:list>
                    <text:list-item>
                      <text:h text:style-name="P89" text:outline-level="4" loext:marker-style-name="T1"><text:bookmark-start text:name="__RefHeading___Toc10351093021111111111"/><text:span text:style-name="T1">2. ASSOCIAZIONE TRA MISURA E RISCHIO</text:span><text:bookmark-end text:name="__RefHeading___Toc10351093021111111111"/><text:span text:style-name="T1"/></text:h>
                    </text:list-item>
                  </text:list>
                </text:list-item>
              </text:list>
            </text:list-item>
          </text:list>
        </text:list-item>
      </text:list>
      <text:p text:style-name="P10" loext:marker-style-name="T1"><text:span text:style-name="T33">La funzionalità di associazione tra una misura e un rischio avviene nel contesto di un processo, perché, come anticipato sopra, la granularità richiesta è tale che non è possibile ereditare i processi dai rischi, dal momento che, in tal caso, non sarebbe possibile escludere una parte dei processi stessi o aggiungerne altri collegati ad altri rischi; allo scopo di rappresentare questa granularità è stata prevista una relazione ternaria che collega il processo al rischio e alla misura di prevenzione.</text:span><text:span text:style-name="T33"/></text:p>
      <text:p text:style-name="P197" loext:marker-style-name="T77"/>
      <text:p text:style-name="P10" loext:marker-style-name="T1"><text:span text:style-name="T33">Lato interfaccia, si sceglie di gestire l’associazione tra le misure e i rischi nella sezione dedicata ai rischi e fattori abilitanti entro la pagina del processo censito a fini anticorruttivi.</text:span><text:span text:style-name="T33"/></text:p>
      <text:p text:style-name="P10" loext:marker-style-name="T1"><text:span text:style-name="T33">Notare che i fattori abilitanti in questo elenco sono perfettamente ortogonali alle misure, nel senso che non è detto che i fattori abilitanti associati ai rischi nell’elenco siano gli stessi che sono collegati alle misure tramite la loro tipologia! In altre parole, rispetto a una misura di prevenzione non vi è nessuna correlazione obbligata tra i fattori abilitanti ereditati tramite le sue tipologie e i fattori abilitanti collegati ai rischi a cui la misura stessa viene relazionata.</text:span><text:span text:style-name="T33"/></text:p>
      <text:p text:style-name="P10" loext:marker-style-name="T1"><text:span text:style-name="T33">Notare, inoltre, che nel successivo mockup (Figura 23) </text:span><text:span text:style-name="T94">si nota chiaramente che l’associazione di una misura è sul rischio</text:span><text:span text:style-name="T33"> (p.es. Rischio 2), </text:span><text:span text:style-name="T94">non sulla coppia Rischio-Fattore abilitante</text:span><text:span text:style-name="T33"> (p.es. Rischio 2-Fattore a o Rischio 2-Fattore b).</text:span></text:p>
      <text:p text:style-name="P117" loext:marker-style-name="T1"/>
      <text:p text:style-name="P10" loext:marker-style-name="T1"><text:span text:style-name="T33">Per associare una misura a un rischio, nel contesto di un processo, bisogna quindi cliccare sul bottone “+ misura”. </text:span><text:span text:style-name="T33"/></text:p>
      <text:p text:style-name="P10" loext:marker-style-name="T1"><text:span text:style-name="T33">Ciò provocherà l’apertura di una nuova pagina, in cui saranno consultabili gli estremi di rischio, processo e fattori abilitanti (inseriti tramite la ternaria rischio-processo-fattore abilitante); saranno anche consultabili le eventuali misure già associate al rischio entro il contesto del processo.</text:span><text:span text:style-name="T33"/></text:p>
      <text:p text:style-name="P10" loext:marker-style-name="T1"><text:span text:style-name="T33">Verranno presentate poi le misure proposte come associabili, individuate in base alla relazione tra la tipologia, o tipologie, della misura e i fattori abilitanti del rischio stesso.</text:span><text:span text:style-name="T33"/></text:p>
      <text:p text:style-name="P10" loext:marker-style-name="T1"><text:span text:style-name="T33">In altri termini, in questo punto noi stiamo prendendo in esame uno specifico rischio che ha collegati uno o più fattori abilitanti (tramite la ternaria); se uno o più di questi fattori sono anche collegati a una o più misure, tramite la loro tipologia, le misure stesse verranno mostrate nell’elenco delle misure suggerite. A questo punto l’utente può scegliere una o più di queste misure suggerite, selezionando le relative checkbox, o anche selezionarle tutte tramite una speciale checkbox fuori elenco. </text:span><text:span text:style-name="T33"/></text:p>
      <text:p text:style-name="P10" loext:marker-style-name="T1"><text:span text:style-name="T33">Dopo aver associato una o più delle <text:s/>misure suggerite, è anche possibile per l’utente scegliere una misura non presente tra quelle suggerite, ma selezionabile dalla dropdown list che contiene tutte le misure. Cliccando su “Salva” verranno generate tante associazioni tra misura-rischio-processo quante sono queste terne univoche. Se l’utente deve aggiungere ulteriori misure al rischio, dopo aver salvato le scelte dovrà ricliccare sul bottone “+ misura” e scegliere dall’elenco a discesa una misura ulteriore, ripetendo questa operazione per tutte le misure non suggerite che bisogna associare al rischio.</text:span><text:span text:style-name="T33"/></text:p>
      <text:p text:style-name="P10" loext:marker-style-name="T1"><text:span text:style-name="T33">Ogni volta che l’utente salva le scelte, verrà riportato alla pagina del processo che ora, nella sezione relativa al rischio, mostrerà le misure appena associate.</text:span><text:span text:style-name="T33"/></text:p>
      <text:p text:style-name="P197" loext:marker-style-name="T77"/>
      <text:p text:style-name="P197" loext:marker-style-name="T77"><draw:custom-shape text:anchor-type="char" draw:z-index="76" draw:name="Cornice29" draw:style-name="gr3" draw:text-style-name="P265" svg:width="14.853cm" svg:height="22.751cm" svg:x="1.369cm" svg:y="0.462cm"><text:p text:style-name="P28" loext:marker-style-name="T1"><text:span text:style-name="T86"><draw:frame draw:style-name="fr2" draw:name="Immagine34" text:anchor-type="as-char" svg:width="14.852cm" svg:height="20.83cm" draw:z-index="111"><draw:image xlink:href="Pictures/100000010000026D0000040D47ECAF34.png" xlink:type="simple" xlink:show="embed" xlink:actuate="onLoad" draw:mime-type="image/png"/></draw:frame></text:span><text:span text:style-name="T96">Figura </text:span><text:span text:style-name="T96"><text:sequence text:ref-name="refFigura22" text:name="Figura" text:formula="ooow:Figura+1" style:num-format="1">23</text:sequence></text:span><text:span text:style-name="T96">: Mockup della sezione della pagina dei dettagli di un processo da cui sarà possibile aggiungere una nuova misura <text:line-break/>e della pagina di aggiunta della misura stess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
      <text:p text:style-name="P197" loext:marker-style-name="T77"><text:soft-page-break/></text:p>
      <text:list xml:id="list172212711799218" text:continue-list="list172212484819571" text:style-name="WWNum2">
        <text:list-item>
          <text:list>
            <text:list-item>
              <text:list>
                <text:list-item>
                  <text:h text:style-name="P82" text:outline-level="3" loext:marker-style-name="T1"><text:bookmark-start text:name="__RefHeading___Toc1770_569295140"/><text:span text:style-name="T1">IL PxI DEI RISCHI</text:span><text:bookmark-end text:name="__RefHeading___Toc1770_569295140"/><text:span text:style-name="T1"/></text:h>
                </text:list-item>
              </text:list>
            </text:list-item>
          </text:list>
        </text:list-item>
      </text:list>
      <text:p text:style-name="P250" loext:marker-style-name="T1"><text:span text:style-name="T1">Nella mappatura dei livelli di rischio effettuata fino alla versione 1.70 del software, il livello di rischio è stato sempre valutato in rapporto ai </text:span><text:span text:style-name="T2">processi</text:span><text:span text:style-name="T1"> organizzativi; una rilevazione, cioè l’effettuazione di una serie di interviste rivolte a specifiche strutture che presiedono a specifici processi organizzativi, permette infatti di ottenere </text:span><text:span text:style-name="T10">un giudizio sintetico</text:span><text:span text:style-name="T1"> di rischio </text:span><text:span text:style-name="T10">per ogni processo organizzativo considerato.</text:span></text:p>
      <text:p text:style-name="P250" loext:marker-style-name="T1"><text:span text:style-name="T1">I livelli di rischio ottenuti sono quindi declinati </text:span><text:span text:style-name="T10">per processo</text:span><text:span text:style-name="T1">, indipendentemente dalla numerosità e dal tipo dei rischi cui il processo stesso risulta associato. Fino a questo livello di evoluzione del software, pertanto, il calcolo dei livelli di rischio cui i processi sono esposti non dipende quindi dal rischio, ma solo dalle risposte ai quesiti e dai processi esaminati.</text:span></text:p>
      <text:p text:style-name="P250" loext:marker-style-name="T1"><text:span text:style-name="T1">È evidente che, implicitamente, nel contesto di ciascun processo organizzativo i quesiti sono volti a investigare specifici aspetti rischiosi, che ci si aspetta di vedere esplicitati poi nell’elenco dei rischi corruttivi associati al processo stesso. Nel software, però, le relazioni tra </text:span><text:span text:style-name="T2">quesito e rischio</text:span><text:span text:style-name="T1"> e tra </text:span><text:span text:style-name="T2">quesito e processo</text:span><text:span text:style-name="T1"> sono considerate </text:span><text:span text:style-name="T2">ortogonali</text:span><text:span text:style-name="T1"> tra loro, cioè non vengono messe in relazione in modo esplicito, e non vi sono regole di business che collegano i rischi di cui un quesito è implicitamente indicativo con i rischi che vengono associati, in modo separato, al processo.</text:span></text:p>
      <text:p text:style-name="P147" loext:marker-style-name="T1"><text:span text:style-name="T1">Siccome, però, </text:span><text:span text:style-name="T2">la misura si applica al rischio</text:span><text:span text:style-name="T1">, bisogna in qualche modo ottenere i PxI dei rischi per poter stimare come questi si riducono a seguito dell’applicazione delle misure sui rischi stessi. </text:span></text:p>
      <text:p text:style-name="P10" loext:marker-style-name="T1"><text:span text:style-name="T10">Il modo più semplice per ottenere i PxI dei singoli rischi</text:span><text:span text:style-name="T1">, e anche più consistente con i ragionamenti fatti finora per ottenere i PxI dei processi, </text:span><text:span text:style-name="T10">consiste nel considerare tutti i PxI dei singoli rischi, in partenza, cioè prima dell’applicazione delle misure di mitigazione, pari esattamente al PxI del processo nel cui contesto i rischi sono stati individuati.</text:span></text:p>
      <text:p text:style-name="P10" loext:marker-style-name="T1"><text:span text:style-name="T1">Ciò certamente corrisponde all’operazione di ottenere una granularità fine a partire da una granularità più grossa, operazione opinabile in quanto fornisce l’apparenza di un grado di precisione elevato mentre in realtà si basa su un dato aggregato meno preciso in partenza.</text:span><text:span text:style-name="T1"/></text:p>
      <text:p text:style-name="P10" loext:marker-style-name="T1"><text:span text:style-name="T1">Tuttavia, si può anche assumere che, siccome il PxI di ogni processo è stato calcolato in modo molto rigoroso (una serie di quesiti hanno prodotto i valori di una serie di indicatori che, a loro volta, hanno prodotto i valori di 2 dimensioni le quali, a loro volta, hanno prodotto il valore del PxI) un’assunzione legittima è considerare che, siccome il processo risulta esposto, nel suo insieme, ad un certo livello di rischio, possiamo assumere che anche tutti i rischi che sono stati individuati in dettaglio sul processo stesso presentano, </text:span><text:span text:style-name="T6">mediamente</text:span><text:span text:style-name="T1">, lo stesso livello. </text:span></text:p>
      <text:p text:style-name="P10" loext:marker-style-name="T1"><text:span text:style-name="T1">Si potrebbero qui fare mille distinguo, però gli unici altri modi elementari e consistenti tramite cui ottenere un PxI del singolo rischio sul singolo processo paiono essere, nel contesto di questa analisi:</text:span><text:span text:style-name="T1"/></text:p>
      <text:list text:style-name="WWNum15">
        <text:list-item>
          <text:p text:style-name="P158" loext:marker-style-name="T1"><text:span text:style-name="T1">la pesatura del quesito in funzione del rischio</text:span><text:span text:style-name="T1"/></text:p>
        </text:list-item>
        <text:list-item>
          <text:p text:style-name="P158" loext:marker-style-name="T1"><text:span text:style-name="T1">l’effettuazione dell’intervista rischio per rischio.</text:span><text:span text:style-name="T1"/></text:p>
        </text:list-item>
      </text:list>
      <text:p text:style-name="P10" loext:marker-style-name="T1"><text:span text:style-name="T1">La prima soluzione, che è stata anche approfondita nella documentazione dettagliata (come “Soluzione non implementata”) è piuttosto macchinosa; la seconda, dal canto suo, è concettualmente più semplice ma avrebbe comportato un aumento enorme delle interviste (per ogni processo vi sono almeno 3-4 rischi connessi, ma a volte i rischi individuati sono molti <text:s/>di più) ed effettuare la mappatura in questo </text:span><text:soft-page-break/><text:span text:style-name="T1">modo sarebbe in ultima analisi risultato impraticabile: non è concretamente possibile rivolgere 100-150 quesiti a una singola struttura dalle 4 alle 10-12 volte per ogni processo, considerato che spesso una stessa struttura è stata intervistata in merito all’erogazione di 2-3 processi in altrettante interviste; p-.es., nel caso di una struttura che eroga 3 servizi e non viene interrogata in merito ad ambiti specifici, anziché rivolgere 50x3 quesiti = 150 quesiti avremmo dovuto rivolgere 50x3xN. Rischi di ogni processo ~ 1000 quesiti.</text:span><text:span text:style-name="T1"/></text:p>
      <text:p text:style-name="P117" loext:marker-style-name="T1"/>
      <text:p text:style-name="P10" loext:marker-style-name="T1"><text:span text:style-name="T1">L’assunzione che consiste nel considerare i PxI dei rischi associati a un processo come pari al PxI del processo stesso è una soluzione, tutto sommato, accettabile e, sostanzialmente, di buon senso: se è vero che le risposte date hanno permesso di individuare un determinato livello di rischio, è accettabile, in mancanza di dati di maggior dettaglio, assegnare a tutti i rischi del processo, </text:span><text:span text:style-name="T6">in partenza</text:span><text:span text:style-name="T1">, quello stesso livello di rischio.</text:span></text:p>
      <text:p text:style-name="P10" loext:marker-style-name="T1"><text:span text:style-name="T1">D’altro canto, si deve considerare anche che la riduzione del livello di rischio su un processo, a seguito dell’applicazione di una misura, è a sua volta pur sempre una stima: tramite uno specifico algoritmo di mitigazione (o contenimento del rischio), che esamineremo tra poco, il software stima che il livello di uno specifico rischio su uno specifico processo, in presenza di una (o più) misure calmieratrici, si riduca di una certa quantità. Ma si tratta, appunto, di una stima, di un valore presunto, e l’unico modo di verificare se effettivamente le cose sono andate come previsto consiste... nel rifare l’intervista! </text:span><text:span text:style-name="T1"/></text:p>
      <text:p text:style-name="P10" loext:marker-style-name="T1"><text:span text:style-name="T1">È quest’ultimo, in effetti, l’unico modo veramente scientifico di procedere: nei confronti di una struttura che presiede un processo rivolgo una serie di domande tramite le quali desumo il livello di rischio attuale; poi applico le misure; infine rivolgo le stesse domande alla stessa struttura, sullo stesso processo, per verificare se le risposte sono cambiate a seguito dell’applicazione delle misure. Quantunque tutti i valori di rischio ottenuti in base alle risposte, date in pasto agli algoritmi per determinare i valori dei vari indicatori, delle dimensioni di rischio e, infine, del PxI, siano a loro volta delle stime, almeno il metro di misura che applico, rifacendo l’intervista, è lo stesso, e ciò permette di effettuare dei veri confronti.</text:span><text:span text:style-name="T1"/></text:p>
      <text:p text:style-name="P197" loext:marker-style-name="T77"/>
      <text:list xml:id="list172213809543131" text:continue-list="list172212811481074" text:style-name="WWNum1">
        <text:list-item>
          <text:list>
            <text:list-item>
              <text:list>
                <text:list-item>
                  <text:list>
                    <text:list-item>
                      <text:h text:style-name="P89" text:outline-level="4" loext:marker-style-name="T1"><text:bookmark-start text:name="__RefHeading___Toc2676_1922363239"/><text:span text:style-name="T1">CONCLUSIONI</text:span><text:bookmark-end text:name="__RefHeading___Toc2676_1922363239"/><text:span text:style-name="T1"/></text:h>
                    </text:list-item>
                  </text:list>
                </text:list-item>
              </text:list>
            </text:list-item>
          </text:list>
        </text:list-item>
      </text:list>
      <text:p text:style-name="P10" loext:marker-style-name="T1"><text:span text:style-name="T1">A questo punto, quindi, possiamo concludere che il reale monitoraggio della mitigazione del rischio corruttivo verrà effettuato solo attraverso una nuova rilevazione, ovvero la risomministrazione di tutte le interviste a tutte le strutture considerate.</text:span><text:span text:style-name="T1"/></text:p>
      <text:p text:style-name="P10" loext:marker-style-name="T1"><text:span text:style-name="T1">Nel frattempo, la parte del software che gestisce le misure di mitigazione, ha lo scopo di:</text:span><text:span text:style-name="T1"/></text:p>
      <text:list text:style-name="WWNum16">
        <text:list-item>
          <text:p text:style-name="P159" loext:marker-style-name="T1"><text:span text:style-name="T1">generare una serie di suggerimenti circa le misure da attuare;</text:span><text:span text:style-name="T1"/></text:p>
        </text:list-item>
        <text:list-item>
          <text:p text:style-name="P159" loext:marker-style-name="T1"><text:span text:style-name="T1">permettere di assegnare una misura su un rischio (entro il contesto di un processo);</text:span><text:span text:style-name="T1"/></text:p>
        </text:list-item>
        <text:list-item>
          <text:p text:style-name="P159" loext:marker-style-name="T1"><text:span text:style-name="T1">permettere di stimare, tramite l’algoritmo di mitigazione, quale sarà l’effetto di tali misure (assegnate al rischio) sul rischio stesso.</text:span><text:span text:style-name="T1"/></text:p>
        </text:list-item>
      </text:list>
      <text:p text:style-name="P197" loext:marker-style-name="T77"/>
      <text:p text:style-name="P10" loext:marker-style-name="T77"><text:span text:style-name="T1">Di seguito vengono riportate alcune tabelle esemplificative delle riduzioni dei livelli di rischio, basate su scenari concreti. Nelle tabelle non vengono riportate anche le misure ma l’ultima colonna presenta valori ricalcolati proprio sulla base dell’applicazione di misure previste.</text:span><text:span text:style-name="T77"/></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5" office:value-type="string">
            <text:p text:style-name="P228" loext:marker-style-name="T1"><text:span text:style-name="T50">Esempio 1</text:span><text:span text:style-name="T50"/></text:p>
          </table:table-cell>
          <table:covered-table-cell/>
          <table:covered-table-cell/>
          <table:covered-table-cell/>
          <table:covered-table-cell/>
        </table:table-row>
        <table:table-row table:style-name="Table6.2">
          <table:table-cell table:style-name="Table6.A2" office:value-type="string">
            <text:p text:style-name="P17">PROCESSO</text:p>
          </table:table-cell>
          <table:table-cell table:style-name="Table6.B2" office:value-type="string">
            <text:p text:style-name="P18">RISCHI</text:p>
          </table:table-cell>
          <table:table-cell table:style-name="Table6.C2" office:value-type="string">
            <text:p text:style-name="P17">PxI</text:p>
            <text:p text:style-name="P17">Processo</text:p>
          </table:table-cell>
          <table:table-cell table:style-name="Table6.D2" office:value-type="string">
            <text:p text:style-name="P17">PxI</text:p>
            <text:p text:style-name="P17">Rischi</text:p>
          </table:table-cell>
          <table:table-cell table:style-name="Table6.E2" office:value-type="string">
            <text:p text:style-name="P1"><text:span text:style-name="T99">PxI Rischi </text:span><text:span text:style-name="T103">(dopo l’applicazione delle misure)</text:span></text:p>
            <text:p text:style-name="P19"><text:s/>~STIMA~</text:p>
          </table:table-cell>
        </table:table-row>
        <table:table-row table:style-name="Table6.3">
          <table:table-cell table:style-name="Table6.A3" table:number-rows-spanned="6" office:value-type="string">
            <text:p text:style-name="P230" loext:marker-style-name="T169"/>
            <text:p text:style-name="P1" loext:marker-style-name="T1"><text:span text:style-name="T111">Concorsi per PTA</text:span><text:span text:style-name="T111"/></text:p>
          </table:table-cell>
          <table:table-cell table:style-name="Table6.A3" office:value-type="string">
            <text:p text:style-name="P132" loext:marker-style-name="T1"><draw:frame draw:style-name="fr2" draw:name="Immagine35" text:anchor-type="as-char" svg:width="0.508cm" svg:height="0.508cm" draw:z-index="105"><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Assenza di adeguata pubblicità della selezione</text:span></text:p>
          </table:table-cell>
          <table:table-cell table:style-name="Table6.A3" table:number-rows-spanned="6" office:value-type="string">
            <text:p text:style-name="P227" loext:marker-style-name="T1"><text:span text:style-name="T113">ALTO</text:span><text:span text:style-name="T113"/></text:p>
            <text:p text:style-name="P227" loext:marker-style-name="T1"><text:span text:style-name="T114">Il processo è altamente esposto a rischio corruttivo in quanto trattasi di un processo che coinvolge molteplici soggetti, interni ed esterni. Un eventuale fenomeno corruttivo avrebbe un elevato impatto sull'immagine dell'Ateneo.</text:span><text:span text:style-name="T114"/></text:p>
          </table:table-cell>
          <table:table-cell table:style-name="Table6.D3" office:value-type="string">
            <text:p text:style-name="P1" loext:marker-style-name="T1"><text:span text:style-name="T116">ALTO</text:span><text:span text:style-name="T116"/></text:p>
          </table:table-cell>
          <table:table-cell table:style-name="Table6.D3" office:value-type="string">
            <text:p text:style-name="P1" loext:marker-style-name="T1"><text:span text:style-name="T111">ALTO</text:span><text:span text:style-name="T111"/></text:p>
          </table:table-cell>
        </table:table-row>
        <table:table-row table:style-name="Table6.4">
          <table:covered-table-cell table:style-name="Table6.A3"/>
          <table:table-cell table:style-name="Table6.A3" office:value-type="string">
            <text:p text:style-name="P227" loext:marker-style-name="T1"><draw:frame draw:style-name="fr2" draw:name="Immagine36" text:anchor-type="as-char" svg:width="0.508cm" svg:height="0.508cm" draw:z-index="127"><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Assenza di controlli autodichiarazioni rese dai commissari o dai candidati</text:span></text:p>
          </table:table-cell>
          <table:covered-table-cell table:style-name="Table6.A3"/>
          <table:table-cell table:style-name="Table6.D3" office:value-type="string">
            <text:p text:style-name="P1" loext:marker-style-name="T1"><text:span text:style-name="T116">ALTO</text:span><text:span text:style-name="T116"/></text:p>
          </table:table-cell>
          <table:table-cell table:style-name="Table6.E4" office:value-type="string">
            <text:p text:style-name="P1" loext:marker-style-name="T1"><text:span text:style-name="T114">MEDIO</text:span><text:span text:style-name="T114"/></text:p>
          </table:table-cell>
        </table:table-row>
        <table:table-row table:style-name="Table6.5">
          <table:covered-table-cell table:style-name="Table6.A3"/>
          <table:table-cell table:style-name="Table6.A3" office:value-type="string">
            <text:p text:style-name="P227" loext:marker-style-name="T1"><draw:frame draw:style-name="fr2" draw:name="Immagine37" text:anchor-type="as-char" svg:width="0.508cm" svg:height="0.508cm" draw:z-index="26"><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Conflitto di interesse tra candidati e commissari</text:span></text:p>
          </table:table-cell>
          <table:covered-table-cell table:style-name="Table6.A3"/>
          <table:table-cell table:style-name="Table6.D3" office:value-type="string">
            <text:p text:style-name="P1" loext:marker-style-name="T1"><text:span text:style-name="T116">ALTO</text:span><text:span text:style-name="T116"/></text:p>
          </table:table-cell>
          <table:table-cell table:style-name="Table6.E5" office:value-type="string">
            <text:p text:style-name="P1" loext:marker-style-name="T1"><text:span text:style-name="T114">BASSO</text:span><text:span text:style-name="T114"/></text:p>
          </table:table-cell>
        </table:table-row>
        <table:table-row table:style-name="Table6.6">
          <table:covered-table-cell table:style-name="Table6.A3"/>
          <table:table-cell table:style-name="Table6.A3" office:value-type="string">
            <text:p text:style-name="P227" loext:marker-style-name="T1"><draw:frame draw:style-name="fr2" draw:name="Immagine38" text:anchor-type="as-char" svg:width="0.508cm" svg:height="0.508cm" draw:z-index="27"><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Eccessiva discrezionalità nella scelta del vincitore</text:span></text:p>
          </table:table-cell>
          <table:covered-table-cell table:style-name="Table6.A3"/>
          <table:table-cell table:style-name="Table6.D3" office:value-type="string">
            <text:p text:style-name="P1" loext:marker-style-name="T1"><text:span text:style-name="T116">ALTO</text:span><text:span text:style-name="T116"/></text:p>
          </table:table-cell>
          <table:table-cell table:style-name="Table6.E6" office:value-type="string">
            <text:p text:style-name="P1" loext:marker-style-name="T1"><text:span text:style-name="T114">MINIMO</text:span><text:span text:style-name="T114"/></text:p>
          </table:table-cell>
        </table:table-row>
        <table:table-row table:style-name="Table6.7">
          <table:covered-table-cell table:style-name="Table6.A3"/>
          <table:table-cell table:style-name="Table6.A3" office:value-type="string">
            <text:p text:style-name="P227" loext:marker-style-name="T1"><draw:frame draw:style-name="fr2" draw:name="Immagine39" text:anchor-type="as-char" svg:width="0.508cm" svg:height="0.508cm" draw:z-index="23"><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Irregolare composizione della commissione e mancato rispetto dell'art. 35 bis del D.Lgs. n. 165/2001</text:span></text:p>
          </table:table-cell>
          <table:covered-table-cell table:style-name="Table6.A3"/>
          <table:table-cell table:style-name="Table6.D3" office:value-type="string">
            <text:p text:style-name="P1" loext:marker-style-name="T1"><text:span text:style-name="T116">ALTO</text:span><text:span text:style-name="T116"/></text:p>
          </table:table-cell>
          <table:table-cell table:style-name="Table6.D3" office:value-type="string">
            <text:p text:style-name="P1" loext:marker-style-name="T1"><text:span text:style-name="T114">ALTO</text:span><text:span text:style-name="T114"/></text:p>
          </table:table-cell>
        </table:table-row>
        <table:table-row table:style-name="Table6.8">
          <table:covered-table-cell table:style-name="Table6.A3"/>
          <table:table-cell table:style-name="Table6.A3" office:value-type="string">
            <text:p text:style-name="P227" loext:marker-style-name="T1"><draw:frame draw:style-name="fr2" draw:name="Immagine40" text:anchor-type="as-char" svg:width="0.508cm" svg:height="0.508cm" draw:z-index="107"><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Nomina di soggetti privi delle competenze necessarie ad operare una corretta valutazione dei candidati</text:span></text:p>
          </table:table-cell>
          <table:covered-table-cell table:style-name="Table6.A3"/>
          <table:table-cell table:style-name="Table6.D3" office:value-type="string">
            <text:p text:style-name="P1" loext:marker-style-name="T1"><text:span text:style-name="T116">ALTO</text:span><text:span text:style-name="T116"/></text:p>
          </table:table-cell>
          <table:table-cell table:style-name="Table6.D3" office:value-type="string">
            <text:p text:style-name="P1" loext:marker-style-name="T1"><text:span text:style-name="T114">ALTO</text:span><text:span text:style-name="T114"/></text:p>
          </table:table-cell>
        </table:table-row>
        <table:table-row table:style-name="Table6.1">
          <table:table-cell table:style-name="Table6.A9" table:number-columns-spanned="5" office:value-type="string">
            <text:p text:style-name="P227" loext:marker-style-name="T1"><text:span text:style-name="T50">Esempio 2</text:span><text:span text:style-name="T50"/></text:p>
          </table:table-cell>
          <table:covered-table-cell/>
          <table:covered-table-cell/>
          <table:covered-table-cell/>
          <table:covered-table-cell/>
        </table:table-row>
        <table:table-row table:style-name="Table6.10">
          <table:table-cell table:style-name="Table6.A10" office:value-type="string">
            <text:p text:style-name="P1" loext:marker-style-name="T1"><text:span text:style-name="T99">PROCESSO</text:span><text:span text:style-name="T99"/></text:p>
          </table:table-cell>
          <table:table-cell table:style-name="Table6.B10" office:value-type="string">
            <text:p text:style-name="P133" loext:marker-style-name="T1"><text:span text:style-name="T99">RISCHI</text:span><text:span text:style-name="T99"/></text:p>
          </table:table-cell>
          <table:table-cell table:style-name="Table6.C10" office:value-type="string">
            <text:p text:style-name="P1" loext:marker-style-name="T1"><text:span text:style-name="T99">PxI</text:span><text:span text:style-name="T99"/></text:p>
            <text:p text:style-name="P1" loext:marker-style-name="T1"><text:span text:style-name="T99">Processo</text:span><text:span text:style-name="T99"/></text:p>
          </table:table-cell>
          <table:table-cell table:style-name="Table6.D10" office:value-type="string">
            <text:p text:style-name="P1" loext:marker-style-name="T1"><text:span text:style-name="T99">PxI</text:span><text:span text:style-name="T99"/></text:p>
            <text:p text:style-name="P1" loext:marker-style-name="T1"><text:span text:style-name="T99">Rischi</text:span><text:span text:style-name="T99"/></text:p>
          </table:table-cell>
          <table:table-cell table:style-name="Table6.E10" office:value-type="string">
            <text:p text:style-name="P1" loext:marker-style-name="T1"><text:span text:style-name="T99">PxI Rischi </text:span><text:span text:style-name="T103">(dopo l’applicazione delle misure)</text:span></text:p>
            <text:p text:style-name="P1" loext:marker-style-name="T1"><text:span text:style-name="T104"><text:s/>~STIMA~</text:span><text:span text:style-name="T104"/></text:p>
          </table:table-cell>
        </table:table-row>
        <table:table-row table:style-name="Table6.11">
          <table:table-cell table:style-name="Table6.A11" table:number-rows-spanned="2" office:value-type="string">
            <text:p text:style-name="P1" loext:marker-style-name="T1"><text:span text:style-name="T111">Mobilità in entrata</text:span><text:span text:style-name="T111"/></text:p>
          </table:table-cell>
          <table:table-cell table:style-name="Table6.B11" office:value-type="string">
            <text:p text:style-name="P132" loext:marker-style-name="T1"><draw:frame draw:style-name="fr2" draw:name="Immagine42" text:anchor-type="as-char" svg:width="0.508cm" svg:height="0.508cm" draw:z-index="28"><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Assenza di adeguata pubblicità della selezione</text:span></text:p>
          </table:table-cell>
          <table:table-cell table:style-name="Table6.A11" table:number-rows-spanned="2" office:value-type="string">
            <text:p text:style-name="P227" loext:marker-style-name="T1"><text:span text:style-name="T117">BASSO</text:span><text:span text:style-name="T117"/></text:p>
            <text:p text:style-name="P227" loext:marker-style-name="T1"><text:span text:style-name="T111">Il processo è esposto ad un basso livello di rischio corruttivo in quanto trattasi di un processo che coinvolge pochi soggetti. Il processo è ben presidiato dagli uffici competenti.</text:span><text:span text:style-name="T111"/></text:p>
          </table:table-cell>
          <table:table-cell table:style-name="Table6.D11" office:value-type="string">
            <text:p text:style-name="P1" loext:marker-style-name="T1"><text:span text:style-name="T111">BASSO</text:span><text:span text:style-name="T111"/></text:p>
          </table:table-cell>
          <table:table-cell table:style-name="Table6.E11" office:value-type="string">
            <text:p text:style-name="P1" loext:marker-style-name="T1"><text:span text:style-name="T111">MINIMO</text:span><text:span text:style-name="T111"/></text:p>
          </table:table-cell>
        </table:table-row>
        <table:table-row table:style-name="Table6.11">
          <table:covered-table-cell table:style-name="Table6.A11"/>
          <table:table-cell table:style-name="Table6.A11" office:value-type="string">
            <text:p text:style-name="P230" loext:marker-style-name="T169"/>
            <text:p text:style-name="P227" loext:marker-style-name="T1"><draw:frame draw:style-name="fr2" draw:name="Immagine43" text:anchor-type="as-char" svg:width="0.508cm" svg:height="0.508cm" draw:z-index="94"><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Assenza di criteri predeterminati nei bandi</text:span></text:p>
          </table:table-cell>
          <table:covered-table-cell table:style-name="Table6.A11"/>
          <table:table-cell table:style-name="Table6.D12" office:value-type="string">
            <text:p text:style-name="P1" loext:marker-style-name="T1"><text:span text:style-name="T114">BASSO</text:span><text:span text:style-name="T114"/></text:p>
          </table:table-cell>
          <table:table-cell table:style-name="Table6.D12" office:value-type="string">
            <text:p text:style-name="P1" loext:marker-style-name="T1"><text:span text:style-name="T114">BASSO</text:span><text:span text:style-name="T114"/></text:p>
          </table:table-cell>
        </table:table-row>
        <text:soft-page-break/>
        <table:table-row table:style-name="Table6.1">
          <table:table-cell table:style-name="Table6.A13" table:number-columns-spanned="5" office:value-type="string">
            <text:p text:style-name="P227" loext:marker-style-name="T1"><text:span text:style-name="T50">Esempio 3</text:span><text:span text:style-name="T50"/></text:p>
          </table:table-cell>
          <table:covered-table-cell/>
          <table:covered-table-cell/>
          <table:covered-table-cell/>
          <table:covered-table-cell/>
        </table:table-row>
        <table:table-row table:style-name="Table6.14">
          <table:table-cell table:style-name="Table6.A14" table:number-rows-spanned="6" office:value-type="string">
            <text:p text:style-name="P1" loext:marker-style-name="T1"><text:span text:style-name="T111">Concessione agevolazioni e incentivi agli studenti</text:span><text:span text:style-name="T111"/></text:p>
          </table:table-cell>
          <table:table-cell table:style-name="Table6.A3" office:value-type="string">
            <text:p text:style-name="P132" loext:marker-style-name="T1"><draw:frame draw:style-name="fr2" draw:name="Immagine44" text:anchor-type="as-char" svg:width="0.508cm" svg:height="0.508cm" draw:z-index="92"><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Assenza di adeguata pubblicità della selezione</text:span></text:p>
          </table:table-cell>
          <table:table-cell table:style-name="Table6.A14" table:number-rows-spanned="6" office:value-type="string">
            <text:p text:style-name="P227" loext:marker-style-name="T1"><text:span text:style-name="T112">MEDIO</text:span><text:span text:style-name="T112"/></text:p>
            <text:p text:style-name="P227" loext:marker-style-name="T1"><text:span text:style-name="T111">Il processo è mediamente esposto a rischio corruttivo in quanto trattasi di un processo che coinvolge molteplici soggetti, sia interni che esterni all'Ateneo. La presenza di segnalazioni da parte degli utenti aumenta l'esposizione al rischio.</text:span><text:span text:style-name="T111"/></text:p>
          </table:table-cell>
          <table:table-cell table:style-name="Table6.E4" office:value-type="string">
            <text:p text:style-name="P230" loext:marker-style-name="T169"/>
            <text:p text:style-name="P1" loext:marker-style-name="T1"><text:span text:style-name="T114">MEDIO</text:span><text:span text:style-name="T114"/></text:p>
            <text:p text:style-name="P230" loext:marker-style-name="T169"/>
          </table:table-cell>
          <table:table-cell table:style-name="Table6.E5" office:value-type="string">
            <text:p text:style-name="P1" loext:marker-style-name="T1"><text:span text:style-name="T111">BASSO</text:span><text:span text:style-name="T111"/></text:p>
          </table:table-cell>
        </table:table-row>
        <table:table-row table:style-name="Table6.14">
          <table:covered-table-cell table:style-name="Table6.A3"/>
          <table:table-cell table:style-name="Table6.A3" office:value-type="string">
            <text:p text:style-name="P227" loext:marker-style-name="T1"><draw:frame draw:style-name="fr2" draw:name="Immagine45" text:anchor-type="as-char" svg:width="0.508cm" svg:height="0.508cm" draw:z-index="129"><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Assenza di controlli sulle autodichiarazioni rese dai richiedenti</text:span></text:p>
          </table:table-cell>
          <table:covered-table-cell table:style-name="Table6.A3"/>
          <table:table-cell table:style-name="Table6.E4" office:value-type="string">
            <text:p text:style-name="P1" loext:marker-style-name="T1"><text:span text:style-name="T114">MEDIO</text:span><text:span text:style-name="T114"/></text:p>
          </table:table-cell>
          <table:table-cell table:style-name="Table6.E4" office:value-type="string">
            <text:p text:style-name="P1" loext:marker-style-name="T1"><text:span text:style-name="T114">MEDIO</text:span><text:span text:style-name="T114"/></text:p>
          </table:table-cell>
        </table:table-row>
        <table:table-row table:style-name="Table6.14">
          <table:covered-table-cell table:style-name="Table6.A3"/>
          <table:table-cell table:style-name="Table6.A3" office:value-type="string">
            <text:p text:style-name="P227" loext:marker-style-name="T1"><draw:frame draw:style-name="fr2" draw:name="Immagine46" text:anchor-type="as-char" svg:width="0.508cm" svg:height="0.508cm" draw:z-index="88"><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Fruizione indebita di agevolazioni favorita dalla modifica frequente del piano di studi</text:span></text:p>
          </table:table-cell>
          <table:covered-table-cell table:style-name="Table6.A3"/>
          <table:table-cell table:style-name="Table6.E4" office:value-type="string">
            <text:p text:style-name="P1" loext:marker-style-name="T1"><text:span text:style-name="T114">MEDIO</text:span><text:span text:style-name="T114"/></text:p>
          </table:table-cell>
          <table:table-cell table:style-name="Table6.E5" office:value-type="string">
            <text:p text:style-name="P1" loext:marker-style-name="T1"><text:span text:style-name="T114">BASSO</text:span><text:span text:style-name="T114"/></text:p>
          </table:table-cell>
        </table:table-row>
        <table:table-row table:style-name="Table6.14">
          <table:covered-table-cell table:style-name="Table6.A3"/>
          <table:table-cell table:style-name="Table6.A3" office:value-type="string">
            <text:p text:style-name="P227" loext:marker-style-name="T1"><draw:frame draw:style-name="fr2" draw:name="Immagine47" text:anchor-type="as-char" svg:width="0.508cm" svg:height="0.508cm" draw:z-index="119"><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Inosservanza delle regole in materia di trasparenza</text:span></text:p>
          </table:table-cell>
          <table:covered-table-cell table:style-name="Table6.A3"/>
          <table:table-cell table:style-name="Table6.E4" office:value-type="string">
            <text:p text:style-name="P1" loext:marker-style-name="T1"><text:span text:style-name="T114">MEDIO</text:span><text:span text:style-name="T114"/></text:p>
          </table:table-cell>
          <table:table-cell table:style-name="Table6.E6" office:value-type="string">
            <text:p text:style-name="P1" loext:marker-style-name="T1"><text:span text:style-name="T114">MINIMO</text:span><text:span text:style-name="T114"/></text:p>
          </table:table-cell>
        </table:table-row>
        <table:table-row table:style-name="Table6.14">
          <table:covered-table-cell table:style-name="Table6.A3"/>
          <table:table-cell table:style-name="Table6.A3" office:value-type="string">
            <text:p text:style-name="P227" loext:marker-style-name="T1"><draw:frame draw:style-name="fr2" draw:name="Immagine48" text:anchor-type="as-char" svg:width="0.508cm" svg:height="0.508cm" draw:z-index="121"><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Mancato recupero dei crediti</text:span></text:p>
          </table:table-cell>
          <table:covered-table-cell table:style-name="Table6.A3"/>
          <table:table-cell table:style-name="Table6.E4" office:value-type="string">
            <text:p text:style-name="P1" loext:marker-style-name="T1"><text:span text:style-name="T114">MEDIO</text:span><text:span text:style-name="T114"/></text:p>
          </table:table-cell>
          <table:table-cell table:style-name="Table6.E4" office:value-type="string">
            <text:p text:style-name="P1" loext:marker-style-name="T1"><text:span text:style-name="T114">MEDIO</text:span><text:span text:style-name="T114"/></text:p>
          </table:table-cell>
        </table:table-row>
        <table:table-row table:style-name="Table6.14">
          <table:covered-table-cell table:style-name="Table6.A19"/>
          <table:table-cell table:style-name="Table6.B19" office:value-type="string">
            <text:p text:style-name="P227" loext:marker-style-name="T1"><draw:frame draw:style-name="fr2" draw:name="Immagine49" text:anchor-type="as-char" svg:width="0.508cm" svg:height="0.508cm" draw:z-index="62"><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Riconoscimento indebito del contributo a </text:span><text:span text:style-name="T114">soggetti</text:span><text:span text:style-name="T111"> non in possesso dei requisiti previsti dal bando</text:span></text:p>
          </table:table-cell>
          <table:covered-table-cell table:style-name="Table6.C19"/>
          <table:table-cell table:style-name="Table6.D19" office:value-type="string">
            <text:p text:style-name="P1" loext:marker-style-name="T1"><text:span text:style-name="T114">MEDIO</text:span><text:span text:style-name="T114"/></text:p>
          </table:table-cell>
          <table:table-cell table:style-name="Table6.E19" office:value-type="string">
            <text:p text:style-name="P1" loext:marker-style-name="T1"><text:span text:style-name="T114">BASSO</text:span><text:span text:style-name="T114"/></text:p>
          </table:table-cell>
        </table:table-row>
      </table:table>
      <text:p text:style-name="P231" loext:marker-style-name="T169"/>
      <text:p text:style-name="P10" loext:marker-style-name="T1"><text:span text:style-name="T1">Conclude questa parte di sviluppo l’implementazione del </text:span><text:span text:style-name="T2">monitoraggio delle misure</text:span><text:span text:style-name="T1">, che non bisogna confondere con il monitoraggio “multirilevazione” costituito dalla rieffettuazione delle interviste. </text:span></text:p>
      <text:p text:style-name="P117" loext:marker-style-name="T1"/>
      <text:p text:style-name="P10" loext:marker-style-name="T1"><text:span text:style-name="T1">Il monitoraggio delle misure verrà affrontato più avanti in questa analisi e permetterà di capire se le strutture responsabili hanno effettivamente applicato le misure che era stato previsto di applicare nelle raccomandazioni e quindi se la riduzione stimata del livello di rischio ha trovato una effettiva realizzazione.</text:span><text:span text:style-name="T1"/></text:p>
      <text:p text:style-name="P117" loext:marker-style-name="T1"/>
      <text:p text:style-name="P22">La tabella riportata sopra verrà quindi completata da una colonna di monitoraggio, che permette di controllare se le riduzioni desiderate sono state realizzate.</text:p>
      <text:p text:style-name="P22">Di seguito viene riportata la stessa tabella mostrata sopra come Esempio 3 che presenta l’aggiunta di un ulteriore colonna, che conferma o smentisce la riduzione prevista, desiderata, richiesta e stimata.</text:p>
      <text:p text:style-name="P22">I valori in parentesi (1 S, 1 G, 4 G etc.) sono composti da una parte numerica che rappresenta il numero di misure e una lettera che rappresenta il tipo delle misure. </text:p>
      <text:p text:style-name="P22">P.es., 1 S = “1 misura Specifica”; 1 G = “1 misura Generica”; 4 G = “4 misure Generiche”.</text:p>
      <text:p text:style-name="P22">Se questi valori tra parentesi sono nella colonna della STIMA allora si tratta di misure previste; i valori che si trovano nell’ultima colonna indicano le misure applicate. </text:p>
      <text:p text:style-name="P22">P.es., in prima riga era previsto di applicare 1 misura Specifica ma ne sono state applicate zero.</text:p>
      <text:p text:style-name="P232" loext:marker-style-name="T170"/>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table:number-columns-spanned="6" office:value-type="string">
            <text:p text:style-name="P227" loext:marker-style-name="T1"><text:span text:style-name="T50">Esempio 3</text:span><text:span text:style-name="T50"/></text:p>
          </table:table-cell>
          <table:covered-table-cell/>
          <table:covered-table-cell/>
          <table:covered-table-cell/>
          <table:covered-table-cell/>
          <table:covered-table-cell/>
        </table:table-row>
        <table:table-row table:style-name="Table7.2">
          <table:table-cell table:style-name="Table7.A2" office:value-type="string">
            <text:p text:style-name="P1" loext:marker-style-name="T1"><text:span text:style-name="T99">PROCESSO</text:span><text:span text:style-name="T99"/></text:p>
          </table:table-cell>
          <table:table-cell table:style-name="Table7.B2" office:value-type="string">
            <text:p text:style-name="P133" loext:marker-style-name="T1"><text:span text:style-name="T99">RISCHI</text:span><text:span text:style-name="T99"/></text:p>
          </table:table-cell>
          <table:table-cell table:style-name="Table7.C2" office:value-type="string">
            <text:p text:style-name="P1" loext:marker-style-name="T1"><text:span text:style-name="T99">PxI</text:span><text:span text:style-name="T99"/></text:p>
            <text:p text:style-name="P1" loext:marker-style-name="T1"><text:span text:style-name="T99">Processo</text:span><text:span text:style-name="T99"/></text:p>
          </table:table-cell>
          <table:table-cell table:style-name="Table7.D2" office:value-type="string">
            <text:p text:style-name="P1" loext:marker-style-name="T1"><text:span text:style-name="T99">PxI</text:span><text:span text:style-name="T99"/></text:p>
            <text:p text:style-name="P1" loext:marker-style-name="T1"><text:span text:style-name="T99">Rischi</text:span><text:span text:style-name="T99"/></text:p>
          </table:table-cell>
          <table:table-cell table:style-name="Table7.E2" office:value-type="string">
            <text:p text:style-name="P1" loext:marker-style-name="T1"><text:span text:style-name="T99">PxI Rischi </text:span><text:span text:style-name="T103">(dopo l’applicazione delle misure)</text:span></text:p>
            <text:p text:style-name="P1" loext:marker-style-name="T1"><text:span text:style-name="T104"><text:s/>~STIMA~</text:span><text:span text:style-name="T104"/></text:p>
          </table:table-cell>
          <table:table-cell table:style-name="Table7.F2" office:value-type="string">
            <text:p text:style-name="P1" loext:marker-style-name="T1"><text:span text:style-name="T99">PxI Rischi </text:span><text:span text:style-name="T103">(dopo l’effettuazione del monitoraggio delle misure)</text:span></text:p>
          </table:table-cell>
        </table:table-row>
        <table:table-row table:style-name="Table7.3">
          <table:table-cell table:style-name="Table7.A3" table:number-rows-spanned="6" office:value-type="string">
            <text:p text:style-name="P1" loext:marker-style-name="T1"><text:span text:style-name="T111">Concessione agevolazioni e incentivi agli studenti</text:span><text:span text:style-name="T111"/></text:p>
          </table:table-cell>
          <table:table-cell table:style-name="Table7.B3" office:value-type="string">
            <text:p text:style-name="P132" loext:marker-style-name="T1"><draw:frame draw:style-name="fr2" draw:name="Immagine50" text:anchor-type="as-char" svg:width="0.508cm" svg:height="0.508cm" draw:z-index="130"><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Assenza di adeguata pubblicità della selezione</text:span></text:p>
          </table:table-cell>
          <table:table-cell table:style-name="Table7.A3" table:number-rows-spanned="6" office:value-type="string">
            <text:p text:style-name="P227" loext:marker-style-name="T1"><text:span text:style-name="T112">MEDIO</text:span><text:span text:style-name="T112"/></text:p>
            <text:p text:style-name="P227" loext:marker-style-name="T1"><text:span text:style-name="T111">Il processo è mediamente esposto a rischio corruttivo in quanto trattasi di un processo che coinvolge molteplici soggetti, sia interni che esterni all'Ateneo. La presenza di segnalazioni da parte degli utenti aumenta l'esposizione al rischio.</text:span><text:span text:style-name="T111"/></text:p>
          </table:table-cell>
          <table:table-cell table:style-name="Table7.D3" office:value-type="string">
            <text:p text:style-name="P230" loext:marker-style-name="T169"/>
            <text:p text:style-name="P1" loext:marker-style-name="T1"><text:span text:style-name="T114">MEDIO</text:span><text:span text:style-name="T114"/></text:p>
            <text:p text:style-name="P230" loext:marker-style-name="T169"/>
          </table:table-cell>
          <table:table-cell table:style-name="Table7.E3" office:value-type="string">
            <text:p text:style-name="P1" loext:marker-style-name="T1"><text:span text:style-name="T114">BASSO (1S)</text:span><text:span text:style-name="T114"/></text:p>
          </table:table-cell>
          <table:table-cell table:style-name="Table7.D3" office:value-type="string">
            <text:p text:style-name="P1" loext:marker-style-name="T1"><text:span text:style-name="T114">MEDIO (0)</text:span><text:span text:style-name="T114"/></text:p>
          </table:table-cell>
        </table:table-row>
        <table:table-row table:style-name="Table7.3">
          <table:covered-table-cell table:style-name="Table7.A4"/>
          <table:table-cell table:style-name="Table7.A4" office:value-type="string">
            <text:p text:style-name="P227" loext:marker-style-name="T1"><draw:frame draw:style-name="fr2" draw:name="Immagine51" text:anchor-type="as-char" svg:width="0.508cm" svg:height="0.508cm" draw:z-index="48"><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Assenza di controlli sulle autodichiarazioni rese dai richiedenti</text:span></text:p>
          </table:table-cell>
          <table:covered-table-cell table:style-name="Table7.A4"/>
          <table:table-cell table:style-name="Table7.D4" office:value-type="string">
            <text:p text:style-name="P1" loext:marker-style-name="T1"><text:span text:style-name="T114">MEDIO</text:span><text:span text:style-name="T114"/></text:p>
          </table:table-cell>
          <table:table-cell table:style-name="Table7.D4" office:value-type="string">
            <text:p text:style-name="P1" loext:marker-style-name="T1"><text:span text:style-name="T114">MEDIO (1G)</text:span><text:span text:style-name="T114"/></text:p>
          </table:table-cell>
          <table:table-cell table:style-name="Table7.F4" office:value-type="string">
            <text:p text:style-name="P1" loext:marker-style-name="T1"><text:span text:style-name="T114">BASSO (1S)</text:span><text:span text:style-name="T114"/></text:p>
          </table:table-cell>
        </table:table-row>
        <table:table-row table:style-name="Table7.3">
          <table:covered-table-cell table:style-name="Table7.A4"/>
          <table:table-cell table:style-name="Table7.A4" office:value-type="string">
            <text:p text:style-name="P227" loext:marker-style-name="T1"><draw:frame draw:style-name="fr2" draw:name="Immagine52" text:anchor-type="as-char" svg:width="0.508cm" svg:height="0.508cm" draw:z-index="131"><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Fruizione indebita di agevolazioni favorita dalla modifica frequente del piano di studi</text:span></text:p>
          </table:table-cell>
          <table:covered-table-cell table:style-name="Table7.A4"/>
          <table:table-cell table:style-name="Table7.D4" office:value-type="string">
            <text:p text:style-name="P1" loext:marker-style-name="T1"><text:span text:style-name="T114">MEDIO</text:span><text:span text:style-name="T114"/></text:p>
          </table:table-cell>
          <table:table-cell table:style-name="Table7.F4" office:value-type="string">
            <text:p text:style-name="P1" loext:marker-style-name="T1"><text:span text:style-name="T114">BASSO</text:span><text:span text:style-name="T114"/></text:p>
            <text:p text:style-name="P1" loext:marker-style-name="T1"><text:span text:style-name="T114">(1G + 1S)</text:span><text:span text:style-name="T114"/></text:p>
          </table:table-cell>
          <table:table-cell table:style-name="Table7.F4" office:value-type="string">
            <text:p text:style-name="P1" loext:marker-style-name="T1"><text:span text:style-name="T114">BASSO (1S)</text:span><text:span text:style-name="T114"/></text:p>
          </table:table-cell>
        </table:table-row>
        <table:table-row table:style-name="Table7.3">
          <table:covered-table-cell table:style-name="Table7.A4"/>
          <table:table-cell table:style-name="Table7.A4" office:value-type="string">
            <text:p text:style-name="P227" loext:marker-style-name="T1"><draw:frame draw:style-name="fr2" draw:name="Immagine53" text:anchor-type="as-char" svg:width="0.508cm" svg:height="0.508cm" draw:z-index="39"><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Inosservanza delle regole in materia di trasparenza</text:span></text:p>
          </table:table-cell>
          <table:covered-table-cell table:style-name="Table7.A4"/>
          <table:table-cell table:style-name="Table7.D4" office:value-type="string">
            <text:p text:style-name="P1" loext:marker-style-name="T1"><text:span text:style-name="T114">MEDIO</text:span><text:span text:style-name="T114"/></text:p>
          </table:table-cell>
          <table:table-cell table:style-name="Table7.E6" office:value-type="string">
            <text:p text:style-name="P1" loext:marker-style-name="T1"><text:span text:style-name="T114">MINIMO (4G)</text:span><text:span text:style-name="T114"/></text:p>
          </table:table-cell>
          <table:table-cell table:style-name="Table7.F4" office:value-type="string">
            <text:p text:style-name="P1" loext:marker-style-name="T1"><text:span text:style-name="T114"><text:s/>BASSO (3G)</text:span><text:span text:style-name="T114"/></text:p>
          </table:table-cell>
        </table:table-row>
        <table:table-row table:style-name="Table7.3">
          <table:covered-table-cell table:style-name="Table7.A4"/>
          <table:table-cell table:style-name="Table7.A4" office:value-type="string">
            <text:p text:style-name="P227" loext:marker-style-name="T1"><draw:frame draw:style-name="fr2" draw:name="Immagine54" text:anchor-type="as-char" svg:width="0.508cm" svg:height="0.508cm" draw:z-index="120"><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Mancato recupero dei crediti</text:span></text:p>
          </table:table-cell>
          <table:covered-table-cell table:style-name="Table7.A4"/>
          <table:table-cell table:style-name="Table7.D4" office:value-type="string">
            <text:p text:style-name="P1" loext:marker-style-name="T1"><text:span text:style-name="T114">MEDIO</text:span><text:span text:style-name="T114"/></text:p>
          </table:table-cell>
          <table:table-cell table:style-name="Table7.D4" office:value-type="string">
            <text:p text:style-name="P1" loext:marker-style-name="T1"><text:span text:style-name="T114">MEDIO (1G)</text:span><text:span text:style-name="T114"/></text:p>
          </table:table-cell>
          <table:table-cell table:style-name="Table7.D4" office:value-type="string">
            <text:p text:style-name="P1" loext:marker-style-name="T1"><text:span text:style-name="T114">MEDIO (0)</text:span><text:span text:style-name="T114"/></text:p>
          </table:table-cell>
        </table:table-row>
        <table:table-row table:style-name="Table7.3">
          <table:covered-table-cell table:style-name="Table7.A8"/>
          <table:table-cell table:style-name="Table7.A3" office:value-type="string">
            <text:p text:style-name="P227" loext:marker-style-name="T1"><draw:frame draw:style-name="fr2" draw:name="Immagine55" text:anchor-type="as-char" svg:width="0.508cm" svg:height="0.508cm" draw:z-index="103"><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Riconoscimento indebito del contributo a </text:span><text:span text:style-name="T114">soggetti</text:span><text:span text:style-name="T111"> non in possesso dei requisiti previsti dal bando</text:span></text:p>
          </table:table-cell>
          <table:covered-table-cell table:style-name="Table7.C8"/>
          <table:table-cell table:style-name="Table7.D8" office:value-type="string">
            <text:p text:style-name="P1" loext:marker-style-name="T1"><text:span text:style-name="T114">MEDIO</text:span><text:span text:style-name="T114"/></text:p>
          </table:table-cell>
          <table:table-cell table:style-name="Table7.E8" office:value-type="string">
            <text:p text:style-name="P1" loext:marker-style-name="T1"><text:span text:style-name="T114">BASSO (1S)</text:span><text:span text:style-name="T114"/></text:p>
          </table:table-cell>
          <table:table-cell table:style-name="Table7.D8" office:value-type="string">
            <text:p text:style-name="P1" loext:marker-style-name="T1"><text:span text:style-name="T114">MEDIA (1G)</text:span><text:span text:style-name="T114"/></text:p>
          </table:table-cell>
        </table:table-row>
      </table:table>
      <text:p text:style-name="P233" loext:marker-style-name="T170"/>
      <text:p text:style-name="P22">A questo proposito, </text:p>
      <text:list text:style-name="WWNum17">
        <text:list-item>
          <text:p text:style-name="P194"><text:span text:style-name="T170">Se la struttura ha disatteso l’applicazione di tutte o di parte delle misure, il livello del PxI sarà, </text:span><text:span text:style-name="T171">rispettivamente</text:span><text:span text:style-name="T170">, simile oppure identico a quello che precedeva l’assegnazione delle misure (quindi si ritorna al livello di partenza);</text:span></text:p>
        </text:list-item>
        <text:list-item>
          <text:p text:style-name="P234">se invece la struttura ha effettivamente applicato tutte le misure previste, i valori coincideranno con quelli stimati.</text:p>
        </text:list-item>
      </text:list>
      <text:p text:style-name="P4" loext:marker-style-name="T1"/>
      <text:p text:style-name="P4">Nella tabella sopra in parentesi viene riportato il numero di misure previste e, nell’ultima colonna, il numero di misure che, a seguito del monitoraggio, risultano essere state effettivamente applicate.</text:p>
      <text:p text:style-name="P4" loext:marker-style-name="T1"/>
      <text:p text:style-name="P14"><text:span text:style-name="T1">A questo punto la domanda diventa: come si fa, concretamente, a stimare la riduzione del rischio in funzione dell’applicazione della misura? Cioè, come faccio a quantificare di <text:s/></text:span><text:span text:style-name="T7">quanto</text:span><text:span text:style-name="T1"> <text:s/>si è ridotto il rischio in base alle misure applicate? Per fare questo, serve </text:span><text:span text:style-name="T2">un algoritmo di mitigazione</text:span><text:span text:style-name="T1">.</text:span></text:p>
      <text:list xml:id="list172213222055605" text:continue-list="list172212711799218" text:style-name="WWNum2">
        <text:list-item>
          <text:list>
            <text:list-item>
              <text:list>
                <text:list-item>
                  <text:h text:style-name="P83" text:outline-level="3" loext:marker-style-name="T1"><text:bookmark-start text:name="__RefHeading___Toc2118_785337907"/><text:span text:style-name="T173">ALGORITMI DI MITIGAZIONE E RICALCOLO</text:span><text:bookmark-end text:name="__RefHeading___Toc2118_785337907"/><text:span text:style-name="T173"/></text:h>
                </text:list-item>
              </text:list>
            </text:list-item>
          </text:list>
        </text:list-item>
      </text:list>
      <text:p text:style-name="P250" loext:marker-style-name="T1"><text:span text:style-name="T1">Abbiamo visto che, avendo a disposizione il PxI di un dato processo, calcolato in base alle risposte e ai valori degli indicatori connessi, è possibile assumere che tutti i rischi di quel dato processo abbiano, mediamente, quel medesimo PxI. <text:s/>Assegnando una o più misure calmieranti a un rischio, possiamo stimare che il PxI di quel rischio diminuirà. Il problema, a questo punto, è stabilire </text:span><text:span text:style-name="T6">quanto</text:span><text:span text:style-name="T1"> il PxI del rischio diminuirà a seguito dell’applicazione delle misure stesse, e </text:span><text:span text:style-name="T6">se</text:span><text:span text:style-name="T1"> questa diminuzione dipende da alcune caratteristiche intrinseche (cioè alcuni specifici attributi) della misura stessa.</text:span></text:p>
      <text:list xml:id="list172214209163556" text:continue-list="list172213809543131" text:style-name="WWNum1">
        <text:list-item>
          <text:list>
            <text:list-item>
              <text:list>
                <text:list-item>
                  <text:list>
                    <text:list-item>
                      <text:h text:style-name="P89" text:outline-level="4" loext:marker-style-name="T1"><text:bookmark-start text:name="__RefHeading___Toc2678_1922363239"/><text:span text:style-name="T1">OBIETTIVO</text:span><text:bookmark-end text:name="__RefHeading___Toc2678_1922363239"/><text:span text:style-name="T1"/></text:h>
                    </text:list-item>
                  </text:list>
                </text:list-item>
              </text:list>
            </text:list-item>
          </text:list>
        </text:list-item>
      </text:list>
      <text:p text:style-name="P250" loext:marker-style-name="T1"><text:span text:style-name="T1">Deve quindi essere elaborato un algoritmo che sottrae ad ogni PxI del rischio una certa quantità a seguito dell’applicazione della misura. Definiamo questo un </text:span><text:span text:style-name="T2">algoritmo di mitigazione</text:span><text:span text:style-name="T1">.</text:span></text:p>
      <text:p text:style-name="P250" loext:marker-style-name="T1"><text:span text:style-name="T1">Tale algoritmo può avere un grado di complessità variabile:</text:span><text:span text:style-name="T1"/></text:p>
      <text:list text:style-name="WWNum18">
        <text:list-item>
          <text:p text:style-name="P251" loext:marker-style-name="T1"><text:span text:style-name="T1">a un estremo vi è uno scenario di implementazione estremamente semplificato; <text:line-break/>p.es.: </text:span><text:span text:style-name="T6">Abbassamento di “un livello” di rischio se c’è la misura;</text:span><text:span text:style-name="T1"> quindi: assunto che il PxI iniziale era ALTO; se c’è una misura passo da ALTO → MEDIO; se ce ne sono due passo da MEDIO → BASSO etc. </text:span></text:p>
        </text:list-item>
        <text:list-item>
          <text:p text:style-name="P251" loext:marker-style-name="T1"><text:span text:style-name="T1">all’altro estremo vi è uno scenario di implementazione estremamente complesso; <text:line-break/>p.es.: </text:span><text:span text:style-name="T6">Riduzione di un valore variabile tra 0 e 1 e dipendente dalla tipologia della misura, dal carattere della misura stessa, dalla presenza della struttura capofila della misura tra le strutture che contribuiscono alle fasi del processo, </text:span><text:span text:style-name="T11">etc. </text:span></text:p>
        </text:list-item>
      </text:list>
      <text:p text:style-name="P250" loext:marker-style-name="T1"><text:span text:style-name="T1">Su questo continuum bisogna scegliere una soluzione che permetta di rappresentare la complessità insita negli scenari reali pur senza complicare in modo eccessivo i calcoli. </text:span><text:span text:style-name="T1"/></text:p>
      <text:p text:style-name="P250" loext:marker-style-name="T1"><text:span text:style-name="T1">La granularità di azione dell’algoritmo è piuttosto fine. L’effetto di mitigazione deve infatti essere determinato sul singolo rischio, ovvero bisogna stabilire che, dato un PxI di un rischio, e considerato un insieme di misure assegnate sul rischio stesso, il PxI del rischio venga ritoccato, tramite l’algoritmo di mitigazione, quindi ricalcolato per ogni PxI di ogni rischio piuttosto che direttamente sul PxI complessivo del processo (ricordiamo che il PxI di un processo viene “spalmato” su tutti i rischi assegnati al processo stesso). </text:span><text:span text:style-name="T1"/></text:p>
      <text:p text:style-name="P250" loext:marker-style-name="T1"><text:span text:style-name="T1">Nulla vieta, successivamente, di applicare un algoritmo a tutti i PxI di tutti i rischi cui un processo è esposto, ottenendo un unico PxI dei rischi del processo. Definiamo questo un </text:span><text:span text:style-name="T2">algoritmo di ricalcolo</text:span><text:span text:style-name="T1">. </text:span></text:p>
      <text:p text:style-name="P250" loext:marker-style-name="T1"><text:span text:style-name="T1">Solo una volta calcolati – tramite l’algoritmo di </text:span><text:span text:style-name="T2">mitigazione</text:span><text:span text:style-name="T1"> – tutti i PxI dei singoli rischi mitigati, potrà quindi essere applicato questo ulteriore algoritmo, “verticale” – l’algoritmo di </text:span><text:span text:style-name="T2">ricalcolo</text:span><text:span text:style-name="T1"> – che permette di ricalcolare il PxI dell’intero processo a seguito dell’applicazione delle misure.</text:span></text:p>
      <text:p text:style-name="P250" loext:marker-style-name="T1"><text:span text:style-name="T1">È su questo valore ricalcolato che si dovrebbe vedere l’effetto apportato dalle misure di mitigazione, nel senso che il PxI di un dato processo con rischi privi di misure (cioè il PxI ottenuto originariamente a seguito dell’intervista) dovrebbe essere maggiore, o al più uguale, al PxI dello stesso processo calmierato tramite le misure di mitigazione applicate ai suoi rischi.</text:span><text:span text:style-name="T1"/></text:p>
      <text:p text:style-name="P250" loext:marker-style-name="T1"><text:soft-page-break/><text:span text:style-name="T1">Oltre ad un algoritmo di contenimento, o mitigazione, o riduzione del rischio, deve quindi essere elaborato un algoritmo di ricalcolo del PxI complessivo del processo, a partire dai PxI dei singoli rischi, calmierati tramite le misure.</text:span><text:span text:style-name="T1"/></text:p>
      <text:list xml:id="list172212502294560" text:continue-list="list172214209163556" text:style-name="WWNum1">
        <text:list-item>
          <text:list>
            <text:list-item>
              <text:list>
                <text:list-item>
                  <text:list>
                    <text:list-item>
                      <text:h text:style-name="P89" text:outline-level="4" loext:marker-style-name="T1"><text:bookmark-start text:name="__RefHeading___Toc2680_1922363239"/><text:span text:style-name="T1">L’ALGORITMO DI CONTENIMENTO (O MITIGAZIONE) DEL RISCHIO</text:span><text:bookmark-end text:name="__RefHeading___Toc2680_1922363239"/><text:span text:style-name="T1"/></text:h>
                    </text:list-item>
                  </text:list>
                </text:list-item>
              </text:list>
            </text:list-item>
          </text:list>
        </text:list-item>
      </text:list>
      <text:p text:style-name="P250" loext:marker-style-name="T1"><text:span text:style-name="T1">L’algoritmo di contenimento (o mitigazione, o riduzione...) del rischio corruttivo permette di ottenere un valore del PxI di uno specifico rischio ridotto in funzione dell’applicazione di una o più misure di mitigazione.</text:span><text:span text:style-name="T1"/></text:p>
      <text:p text:style-name="P250" loext:marker-style-name="T1"><text:span text:style-name="T1">Per determinare questo algoritmo, si procede nel seguente modo:</text:span><text:span text:style-name="T1"/></text:p>
      <text:list text:style-name="WWNum19">
        <text:list-item>
          <text:p text:style-name="P252" loext:marker-style-name="T1"><text:span text:style-name="T1">si quantificano, tramite una funzione di codifica, i valori del PxI del rischio facendo corrispondere ad ogni valore un numero intero, variabile da 0 per il rischio MINIMO a 4 per il rischio MOLTO ALTO;</text:span><text:span text:style-name="T1"/></text:p>
        </text:list-item>
        <text:list-item>
          <text:p text:style-name="P253" loext:marker-style-name="T1"><text:span text:style-name="T1">- per ogni misura di carattere generale si sottrae 0.5 dal valore del PxI del rischio; <text:line-break/>- per ogni misura di carattere specifico si sottrae 1.0 dal valore del PxI del rischio</text:span><text:span text:style-name="T1"/></text:p>
        </text:list-item>
        <text:list-item>
          <text:p text:style-name="P254" loext:marker-style-name="T1"><text:span text:style-name="T1">nei calcoli vengono effettuati solo arrotondamenti per eccesso; quindi per considerare un PxI ridotto di un livello bisogna che le misure abbiano determinato almeno una riduzione di 1 (da 1.0 a 1.9).<text:line-break/></text:span><text:span text:style-name="T1"/></text:p>
        </text:list-item>
      </text:list>
      <text:p text:style-name="P255" loext:marker-style-name="T77"><draw:custom-shape text:anchor-type="char" draw:z-index="68" draw:name="Cornice30" draw:style-name="gr6" draw:text-style-name="P265" svg:width="14.398cm" svg:height="7.43cm" svg:x="1.062cm" svg:y="0.002cm"><text:p text:style-name="P30" loext:marker-style-name="T96"><draw:frame draw:style-name="fr2" draw:name="Immagine41" text:anchor-type="as-char" svg:width="12.488cm" svg:height="5.609cm" draw:z-index="132"><draw:image xlink:href="Pictures/10000001000001D8000000D43F189BE2.png" xlink:type="simple" xlink:show="embed" xlink:actuate="onLoad" draw:mime-type="image/png"/></draw:frame></text:p><text:p text:style-name="P28" loext:marker-style-name="T96"><text:span text:style-name="T96">Figura </text:span><text:span text:style-name="T96"><text:sequence text:ref-name="refFigura23" text:name="Figura" text:formula="ooow:Figura+1" style:num-format="1">24</text:sequence></text:span><text:span text:style-name="T96">: La funzione iniettiva </text:span><text:span text:style-name="T98">f : A → </text:span><text:span text:style-name="T142">ℕ</text:span><text:span text:style-name="T96"> che permette di trasformare i valori nominali in valori numerici ϵ </text:span><text:span text:style-name="T143">ℕ</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5" loext:marker-style-name="T77"/>
      <text:p text:style-name="P255" loext:marker-style-name="T77"/>
      <text:p text:style-name="P255" loext:marker-style-name="T77"/>
      <text:p text:style-name="P255" loext:marker-style-name="T77"/>
      <text:p text:style-name="P255" loext:marker-style-name="T77"/>
      <text:p text:style-name="P255" loext:marker-style-name="T77"/>
      <text:p text:style-name="P255" loext:marker-style-name="T77"/>
      <text:p text:style-name="P255" loext:marker-style-name="T77"/>
      <text:p text:style-name="P255" loext:marker-style-name="T77"/>
      <text:p text:style-name="P250" loext:marker-style-name="T1"><text:span text:style-name="T1">I valori assegnati ai livelli dei PxI possono essere ricavati dalla seguente tabella:</text:span><text:span text:style-name="T1"/></text:p>
      <table:table table:name="Table8" table:style-name="Table8">
        <table:table-column table:style-name="Table8.A" table:number-columns-repeated="2"/>
        <table:table-row table:style-name="Table8.1">
          <table:table-cell table:style-name="Table8.A1" office:value-type="string">
            <text:p text:style-name="P42" loext:marker-style-name="T1"><text:span text:style-name="T99">PxI su scala ordinale</text:span><text:span text:style-name="T99"/></text:p>
          </table:table-cell>
          <table:table-cell table:style-name="Table8.A1" office:value-type="string">
            <text:p text:style-name="P42" loext:marker-style-name="T1"><text:span text:style-name="T99">PxI su scala a intervalli</text:span><text:span text:style-name="T99"/></text:p>
          </table:table-cell>
        </table:table-row>
        <table:table-row table:style-name="Table8.1">
          <table:table-cell table:style-name="Table8.A2" office:value-type="string">
            <text:p text:style-name="P42" loext:marker-style-name="T1"><text:span text:style-name="T101">MINIMO</text:span><text:span text:style-name="T101"/></text:p>
          </table:table-cell>
          <table:table-cell table:style-name="Table8.A2" office:value-type="string">
            <text:p text:style-name="P42" loext:marker-style-name="T1"><text:span text:style-name="T101">0</text:span><text:span text:style-name="T101"/></text:p>
          </table:table-cell>
        </table:table-row>
        <table:table-row table:style-name="Table8.1">
          <table:table-cell table:style-name="Table8.A2" office:value-type="string">
            <text:p text:style-name="P42" loext:marker-style-name="T1"><text:span text:style-name="T101">BASSO</text:span><text:span text:style-name="T101"/></text:p>
          </table:table-cell>
          <table:table-cell table:style-name="Table8.A2" office:value-type="string">
            <text:p text:style-name="P42" loext:marker-style-name="T1"><text:span text:style-name="T101">1</text:span><text:span text:style-name="T101"/></text:p>
          </table:table-cell>
        </table:table-row>
        <table:table-row table:style-name="Table8.1">
          <table:table-cell table:style-name="Table8.A2" office:value-type="string">
            <text:p text:style-name="P42" loext:marker-style-name="T1"><text:span text:style-name="T101">MEDIO</text:span><text:span text:style-name="T101"/></text:p>
          </table:table-cell>
          <table:table-cell table:style-name="Table8.A2" office:value-type="string">
            <text:p text:style-name="P42" loext:marker-style-name="T1"><text:span text:style-name="T101">2</text:span><text:span text:style-name="T101"/></text:p>
          </table:table-cell>
        </table:table-row>
        <table:table-row table:style-name="Table8.1">
          <table:table-cell table:style-name="Table8.A2" office:value-type="string">
            <text:p text:style-name="P42" loext:marker-style-name="T1"><text:span text:style-name="T101">ALTO</text:span><text:span text:style-name="T101"/></text:p>
          </table:table-cell>
          <table:table-cell table:style-name="Table8.A2" office:value-type="string">
            <text:p text:style-name="P42" loext:marker-style-name="T1"><text:span text:style-name="T101">3</text:span><text:span text:style-name="T101"/></text:p>
          </table:table-cell>
        </table:table-row>
        <table:table-row table:style-name="Table8.1">
          <table:table-cell table:style-name="Table8.A6" office:value-type="string">
            <text:p text:style-name="P42" loext:marker-style-name="T1"><text:span text:style-name="T101">MASSIMO</text:span><text:span text:style-name="T101"/></text:p>
          </table:table-cell>
          <table:table-cell table:style-name="Table8.B6" office:value-type="string">
            <text:p text:style-name="P42" loext:marker-style-name="T1"><text:span text:style-name="T101">4</text:span><text:span text:style-name="T101"/></text:p>
          </table:table-cell>
        </table:table-row>
      </table:table>
      <text:p text:style-name="P154" loext:marker-style-name="T1"><text:soft-page-break/><text:span text:style-name="T167">NOTA BENE</text:span><text:span text:style-name="T167"/></text:p>
      <text:p text:style-name="P155" loext:marker-style-name="T1"><text:span text:style-name="T15">Da un punto di vista statistico, l’operazione di trasformare valori chiaramente su scala ordinale in valori su scala a intervalli uguali (anzi, su scala di rapporti, perché è stato determinato uno zero in modo univoco) è sicuramente un abuso di notazione, perché fornisce un’impressione di precisione che nei dati non esiste; ad esempio, sicuramente un PxI MOLTO ALTO (o Massimo) sarà maggiore di un PxI medio, ma non si può dire che MOLTO ALTO sia esattamente il doppio di MEDIO, cosa che invece la trasformazione numerica dà l’impressione di poter concludere (perché 4 è il doppio di 2). Analogamente, neppure si può dire che un PxI ALTO valga esattamente come 3 PxI BASSI. </text:span><text:span text:style-name="T15"/></text:p>
      <text:p text:style-name="P155" loext:marker-style-name="T1"><text:span text:style-name="T15">Pertanto, a prescindere da qualunque conversione arbitraria, bisogna considerare che i dati relativi ai PxI (livelli di rischio) sono e resteranno sempre misurati su scala ordinale, non su scala a intervalli o di rapporti.</text:span><text:span text:style-name="T15"/></text:p>
      <text:p text:style-name="P155" loext:marker-style-name="T1"><text:span text:style-name="T15">D’altro canto, la conversione numerica permette di determinare i livelli di mitigazione in maniera molto più pratica rispetto a una “mitigazione ordinale”. L’importante è ricordarsi che </text:span><text:span text:style-name="T17">l’apparente precisione non corrisponde ad una precisione effettiva nei dati.</text:span></text:p>
      <text:p text:style-name="P10" loext:marker-style-name="T1"><text:span text:style-name="T1">Per fare un esempio, riprendiamo la tabella precedente:</text:span><text:span text:style-name="T1"/></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table:number-columns-spanned="6" office:value-type="string">
            <text:p text:style-name="P227" loext:marker-style-name="T1"><text:span text:style-name="T54"><text:s/>Concessione agevolazioni e incentivi agli studenti</text:span><text:span text:style-name="T54"/></text:p>
          </table:table-cell>
          <table:covered-table-cell/>
          <table:covered-table-cell/>
          <table:covered-table-cell/>
          <table:covered-table-cell/>
          <table:covered-table-cell/>
        </table:table-row>
        <table:table-row table:style-name="Table9.2">
          <table:table-cell table:style-name="Table9.A2" office:value-type="string">
            <text:p text:style-name="P133" loext:marker-style-name="T1"><text:span text:style-name="T99">RISCHI</text:span><text:span text:style-name="T99"/></text:p>
            <text:p text:style-name="P133" loext:marker-style-name="T1"><text:span text:style-name="T99">(a)</text:span><text:span text:style-name="T99"/></text:p>
          </table:table-cell>
          <table:table-cell table:style-name="Table9.B2" office:value-type="string">
            <text:p text:style-name="P1" loext:marker-style-name="T1"><text:span text:style-name="T99">PxI</text:span><text:span text:style-name="T99"/></text:p>
            <text:p text:style-name="P1" loext:marker-style-name="T1"><text:span text:style-name="T99">Processo</text:span><text:span text:style-name="T99"/></text:p>
            <text:p text:style-name="P1" loext:marker-style-name="T1"><text:span text:style-name="T99">(b)</text:span><text:span text:style-name="T99"/></text:p>
          </table:table-cell>
          <table:table-cell table:style-name="Table9.C2" office:value-type="string">
            <text:p text:style-name="P1" loext:marker-style-name="T1"><text:span text:style-name="T99">PxI</text:span><text:span text:style-name="T99"/></text:p>
            <text:p text:style-name="P1" loext:marker-style-name="T1"><text:span text:style-name="T99">Rischi</text:span><text:span text:style-name="T99"/></text:p>
            <text:p text:style-name="P1" loext:marker-style-name="T1"><text:span text:style-name="T99">(c)</text:span><text:span text:style-name="T99"/></text:p>
          </table:table-cell>
          <table:table-cell table:style-name="Table9.D2" office:value-type="string">
            <text:p text:style-name="P1" loext:marker-style-name="T1"><text:span text:style-name="T99">PxI Rischi (d) </text:span><text:span text:style-name="T103">(dopo l’applicazione delle misure)</text:span></text:p>
            <text:p text:style-name="P1" loext:marker-style-name="T1"><text:span text:style-name="T104"><text:s/>~STIMA~</text:span><text:span text:style-name="T104"/></text:p>
          </table:table-cell>
          <table:table-cell table:style-name="Table9.E2" office:value-type="string">
            <text:p text:style-name="P1" loext:marker-style-name="T1"><text:span text:style-name="T99">PxI Rischi <text:s/>(e) </text:span><text:span text:style-name="T103">(dopo aver effettuato il </text:span><text:span text:style-name="T104">monitoraggio</text:span><text:span text:style-name="T103"> delle misure)</text:span></text:p>
          </table:table-cell>
          <table:table-cell table:style-name="Table9.F2" office:value-type="string">
            <text:p text:style-name="P1" loext:marker-style-name="T1"><text:span text:style-name="T100">PxI Processo (f) </text:span><text:span text:style-name="T103"><text:s/>(dopo applicazione misure </text:span><text:span text:style-name="T104">E</text:span><text:span text:style-name="T103"> monitoraggio)</text:span></text:p>
          </table:table-cell>
        </table:table-row>
        <table:table-row table:style-name="Table9.3">
          <table:table-cell table:style-name="Table9.A3" office:value-type="string">
            <text:p text:style-name="P132" loext:marker-style-name="T1"><draw:frame draw:style-name="fr2" draw:name="Immagine56" text:anchor-type="as-char" svg:width="0.508cm" svg:height="0.508cm" draw:z-index="133"><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Assenza di adeguata pubblicità della selezione</text:span></text:p>
          </table:table-cell>
          <table:table-cell table:style-name="Table9.B3" table:number-rows-spanned="6" office:value-type="string">
            <text:p text:style-name="P227" loext:marker-style-name="T1"><text:span text:style-name="T112">MEDIO</text:span><text:span text:style-name="T112"/></text:p>
            <text:p text:style-name="P227" loext:marker-style-name="T1"><text:span text:style-name="T111">Il processo è mediamente esposto a rischio corruttivo in quanto trattasi di un processo che coinvolge molteplici soggetti, sia interni che esterni all'Ateneo. La presenza di segnalazioni da parte degli utenti aumenta l'esposizione al rischio.</text:span><text:span text:style-name="T111"/></text:p>
          </table:table-cell>
          <table:table-cell table:style-name="Table9.C3" office:value-type="string">
            <text:p text:style-name="P230" loext:marker-style-name="T169"/>
            <text:p text:style-name="P1" loext:marker-style-name="T1"><text:span text:style-name="T114">MEDIO</text:span><text:span text:style-name="T114"/></text:p>
            <text:p text:style-name="P230" loext:marker-style-name="T169"/>
          </table:table-cell>
          <table:table-cell table:style-name="Table9.D3" office:value-type="string">
            <text:p text:style-name="P1" loext:marker-style-name="T1"><text:span text:style-name="T114">BASSO {1S}</text:span><text:span text:style-name="T114"/></text:p>
          </table:table-cell>
          <table:table-cell table:style-name="Table9.C3" office:value-type="string">
            <text:p text:style-name="P1" loext:marker-style-name="T1"><text:span text:style-name="T114">MEDIO (0)</text:span><text:span text:style-name="T114"/></text:p>
          </table:table-cell>
          <table:table-cell table:style-name="Table9.F3" table:number-rows-spanned="6" office:value-type="string">
            <text:p text:style-name="P1" loext:marker-style-name="T1"><text:span text:style-name="T115">MEDIO</text:span><text:span text:style-name="T115"/></text:p>
          </table:table-cell>
        </table:table-row>
        <table:table-row table:style-name="Table9.3">
          <table:table-cell table:style-name="Table9.A4" office:value-type="string">
            <text:p text:style-name="P227" loext:marker-style-name="T1"><draw:frame draw:style-name="fr2" draw:name="Immagine57" text:anchor-type="as-char" svg:width="0.508cm" svg:height="0.508cm" draw:z-index="0"><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Assenza di controlli sulle autodichiarazioni rese dai richiedenti</text:span></text:p>
          </table:table-cell>
          <table:covered-table-cell table:style-name="Table9.A4"/>
          <table:table-cell table:style-name="Table9.C4" office:value-type="string">
            <text:p text:style-name="P1" loext:marker-style-name="T1"><text:span text:style-name="T114">MEDIO</text:span><text:span text:style-name="T114"/></text:p>
          </table:table-cell>
          <table:table-cell table:style-name="Table9.C4" office:value-type="string">
            <text:p text:style-name="P1" loext:marker-style-name="T1"><text:span text:style-name="T114">MEDIO {1G}</text:span><text:span text:style-name="T114"/></text:p>
          </table:table-cell>
          <table:table-cell table:style-name="Table9.E4" office:value-type="string">
            <text:p text:style-name="P1" loext:marker-style-name="T1"><text:span text:style-name="T114">BASSO (1S)</text:span><text:span text:style-name="T114"/></text:p>
          </table:table-cell>
          <table:covered-table-cell table:style-name="Table9.C3"/>
        </table:table-row>
        <table:table-row table:style-name="Table9.3">
          <table:table-cell table:style-name="Table9.A4" office:value-type="string">
            <text:p text:style-name="P227" loext:marker-style-name="T1"><draw:frame draw:style-name="fr2" draw:name="Immagine58" text:anchor-type="as-char" svg:width="0.508cm" svg:height="0.508cm" draw:z-index="76"><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Agevolazioni indebite favorite dalla modifica frequente del piano di studi</text:span></text:p>
          </table:table-cell>
          <table:covered-table-cell table:style-name="Table9.A4"/>
          <table:table-cell table:style-name="Table9.C4" office:value-type="string">
            <text:p text:style-name="P1" loext:marker-style-name="T1"><text:span text:style-name="T114">MEDIO</text:span><text:span text:style-name="T114"/></text:p>
          </table:table-cell>
          <table:table-cell table:style-name="Table9.E4" office:value-type="string">
            <text:p text:style-name="P1" loext:marker-style-name="T1"><text:span text:style-name="T114">BASSO</text:span><text:span text:style-name="T114"/></text:p>
            <text:p text:style-name="P1" loext:marker-style-name="T1"><text:span text:style-name="T114">{1G + 1S}</text:span><text:span text:style-name="T114"/></text:p>
          </table:table-cell>
          <table:table-cell table:style-name="Table9.E4" office:value-type="string">
            <text:p text:style-name="P1" loext:marker-style-name="T1"><text:span text:style-name="T114">BASSO (1S)</text:span><text:span text:style-name="T114"/></text:p>
          </table:table-cell>
          <table:covered-table-cell table:style-name="Table9.C3"/>
        </table:table-row>
        <table:table-row table:style-name="Table9.3">
          <table:table-cell table:style-name="Table9.A4" office:value-type="string">
            <text:p text:style-name="P227" loext:marker-style-name="T1"><draw:frame draw:style-name="fr2" draw:name="Immagine59" text:anchor-type="as-char" svg:width="0.508cm" svg:height="0.508cm" draw:z-index="61"><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Inosservanza delle regole in materia di trasparenza</text:span></text:p>
          </table:table-cell>
          <table:covered-table-cell table:style-name="Table9.A4"/>
          <table:table-cell table:style-name="Table9.C4" office:value-type="string">
            <text:p text:style-name="P1" loext:marker-style-name="T1"><text:span text:style-name="T114">MEDIO</text:span><text:span text:style-name="T114"/></text:p>
          </table:table-cell>
          <table:table-cell table:style-name="Table9.D6" office:value-type="string">
            <text:p text:style-name="P1" loext:marker-style-name="T1"><text:span text:style-name="T114">MINIMO {4G}</text:span><text:span text:style-name="T114"/></text:p>
          </table:table-cell>
          <table:table-cell table:style-name="Table9.E4" office:value-type="string">
            <text:p text:style-name="P1" loext:marker-style-name="T1"><text:span text:style-name="T114"><text:s/>BASSO (3G)</text:span><text:span text:style-name="T114"/></text:p>
          </table:table-cell>
          <table:covered-table-cell table:style-name="Table9.C3"/>
        </table:table-row>
        <table:table-row table:style-name="Table9.3">
          <table:table-cell table:style-name="Table9.A4" office:value-type="string">
            <text:p text:style-name="P227" loext:marker-style-name="T1"><draw:frame draw:style-name="fr2" draw:name="Immagine60" text:anchor-type="as-char" svg:width="0.508cm" svg:height="0.508cm" draw:z-index="134"><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Mancato recupero dei crediti</text:span></text:p>
          </table:table-cell>
          <table:covered-table-cell table:style-name="Table9.A4"/>
          <table:table-cell table:style-name="Table9.C4" office:value-type="string">
            <text:p text:style-name="P1" loext:marker-style-name="T1"><text:span text:style-name="T114">MEDIO</text:span><text:span text:style-name="T114"/></text:p>
          </table:table-cell>
          <table:table-cell table:style-name="Table9.C4" office:value-type="string">
            <text:p text:style-name="P1" loext:marker-style-name="T1"><text:span text:style-name="T114">MEDIO {1G}</text:span><text:span text:style-name="T114"/></text:p>
          </table:table-cell>
          <table:table-cell table:style-name="Table9.C4" office:value-type="string">
            <text:p text:style-name="P1" loext:marker-style-name="T1"><text:span text:style-name="T114">MEDIO (0)</text:span><text:span text:style-name="T114"/></text:p>
          </table:table-cell>
          <table:covered-table-cell table:style-name="Table9.C3"/>
        </table:table-row>
        <table:table-row table:style-name="Table9.3">
          <table:table-cell table:style-name="Table9.B3" office:value-type="string">
            <text:p text:style-name="P227" loext:marker-style-name="T1"><draw:frame draw:style-name="fr2" draw:name="Immagine61" text:anchor-type="as-char" svg:width="0.508cm" svg:height="0.508cm" draw:z-index="44"><draw:image xlink:href="Pictures/100008940000034F0000034FED8C1714.wmf" xlink:type="simple" xlink:show="embed" xlink:actuate="onLoad" draw:mime-type="image/x-wmf"/><draw:image xlink:href="Pictures/100000000000002000000020D32C8FCF.png" xlink:type="simple" xlink:show="embed" xlink:actuate="onLoad" draw:mime-type="image/png"/></draw:frame><text:span text:style-name="T111"><text:s/>Riconoscimento indebito del contributo a </text:span><text:span text:style-name="T114">soggetti</text:span><text:span text:style-name="T111"> non in possesso dei requisiti previsti dal bando</text:span></text:p>
          </table:table-cell>
          <table:covered-table-cell table:style-name="Table9.B8"/>
          <table:table-cell table:style-name="Table9.C8" office:value-type="string">
            <text:p text:style-name="P1" loext:marker-style-name="T1"><text:span text:style-name="T114">MEDIO</text:span><text:span text:style-name="T114"/></text:p>
          </table:table-cell>
          <table:table-cell table:style-name="Table9.D8" office:value-type="string">
            <text:p text:style-name="P1" loext:marker-style-name="T1"><text:span text:style-name="T114">BASSO {1S}</text:span><text:span text:style-name="T114"/></text:p>
          </table:table-cell>
          <table:table-cell table:style-name="Table9.C8" office:value-type="string">
            <text:p text:style-name="P1" loext:marker-style-name="T1"><text:span text:style-name="T114">MEDIA (1G)</text:span><text:span text:style-name="T114"/></text:p>
          </table:table-cell>
          <table:covered-table-cell table:style-name="Table9.C3"/>
        </table:table-row>
      </table:table>
      <text:p text:style-name="P127" loext:marker-style-name="T1"><text:soft-page-break/></text:p>
      <text:p text:style-name="P235" loext:marker-style-name="T1"><text:span text:style-name="T1">Come leggiamo questa tabella?</text:span><text:span text:style-name="T1"/></text:p>
      <text:p text:style-name="P236" loext:marker-style-name="T1"><text:span text:style-name="T1">Colonna </text:span><text:span text:style-name="T2">b</text:span><text:span text:style-name="T1"> : Anzitutto, le interviste hanno permesso di determinare un rischio MEDIO per questo processo </text:span></text:p>
      <text:p text:style-name="P236" loext:marker-style-name="T1"><text:span text:style-name="T1">Colonna </text:span><text:span text:style-name="T2">c </text:span><text:span text:style-name="T18">:</text:span><text:span text:style-name="T2"> </text:span><text:span text:style-name="T1">Prima dell’applicazione delle misure, quindi, il valore di rischio di ogni rischio del processo è stato assegnato a MEDIO </text:span></text:p>
      <text:p text:style-name="P236" loext:marker-style-name="T1"><text:span text:style-name="T1">Colonna </text:span><text:span text:style-name="T2">d</text:span><text:span text:style-name="T18"> : Sulla base delle informazioni a sua disposizione, e dei dati raccolti contestualmente alle interviste, l’esperto di valutazione del rischio corruttivo ha stimato che:</text:span></text:p>
      <text:list text:style-name="WWNum20">
        <text:list-item>
          <text:p text:style-name="P237" loext:marker-style-name="T1"><text:span text:style-name="T18">al RISCHIO 1 dovessero essere applicate: 1 misura specifica (</text:span><text:span text:style-name="T114">{1 S} vale -1</text:span><text:span text:style-name="T18">)</text:span></text:p>
        </text:list-item>
        <text:list-item>
          <text:p text:style-name="P237" loext:marker-style-name="T1"><text:span text:style-name="T18">al RISCHIO 2 dovessero essere applicate: 1 misura generica (</text:span><text:span text:style-name="T114">{1 G} vale -0.5</text:span><text:span text:style-name="T18">)</text:span></text:p>
        </text:list-item>
        <text:list-item>
          <text:p text:style-name="P237" loext:marker-style-name="T1"><text:span text:style-name="T18">al RISCHIO 3 dovessero essere applicate: 2 misure: 1 specifica e 1 generica (</text:span><text:span text:style-name="T114">{1G + 1S} valgono -1.5</text:span><text:span text:style-name="T18">)</text:span></text:p>
        </text:list-item>
        <text:list-item>
          <text:p text:style-name="P237" loext:marker-style-name="T1"><text:span text:style-name="T18">al RISCHIO 4 dovessero essere applicate 4 misure generiche (</text:span><text:span text:style-name="T114">{4G} valgono 4x-0.5 = -2</text:span><text:span text:style-name="T18">)</text:span></text:p>
        </text:list-item>
        <text:list-item>
          <text:p text:style-name="P237" loext:marker-style-name="T1"><text:span text:style-name="T18">al RISCHIO 5 dovessero essere applicate 1 misura generica (</text:span><text:span text:style-name="T114">{1G} vale -0.5</text:span><text:span text:style-name="T18">)</text:span></text:p>
        </text:list-item>
        <text:list-item>
          <text:p text:style-name="P237" loext:marker-style-name="T1"><text:span text:style-name="T18">al RISCHIO 6 dovessero essere applicate 1 misura specifica (</text:span><text:span text:style-name="T114"> {1S} vale -1</text:span><text:span text:style-name="T18">)</text:span></text:p>
        </text:list-item>
      </text:list>
      <text:p text:style-name="P235" loext:marker-style-name="T1"><text:span text:style-name="T18">Conseguentemente, i livelli di PxI dei rischi si sarebbero dovuti ridurre come segue:</text:span><text:span text:style-name="T18"/></text:p>
      <text:list text:style-name="WWNum21">
        <text:list-item>
          <text:p text:style-name="P238" loext:marker-style-name="T1"><text:span text:style-name="T18">RISCHIO 1: 2 (cioè MEDIO) – 1.0 = 1 = </text:span><text:span text:style-name="T140">BASSO</text:span></text:p>
        </text:list-item>
        <text:list-item>
          <text:p text:style-name="P238" loext:marker-style-name="T1"><text:span text:style-name="T18">RISCHIO 2: 2 – 0.5 = 1.5 → pari a 2 = </text:span><text:span text:style-name="T17">MEDIO</text:span></text:p>
        </text:list-item>
        <text:list-item>
          <text:p text:style-name="P238" loext:marker-style-name="T1"><text:span text:style-name="T18">RISCHIO 3: 2 – 1.5 = 0.5 → pari a 1 = </text:span><text:span text:style-name="T140">BASSO</text:span></text:p>
        </text:list-item>
        <text:list-item>
          <text:p text:style-name="P238" loext:marker-style-name="T1"><text:span text:style-name="T18">RISCHIO 4: 2 – 2 = 0 → pari a 0 = </text:span><text:span text:style-name="T19">MINIMO</text:span></text:p>
        </text:list-item>
        <text:list-item>
          <text:p text:style-name="P238" loext:marker-style-name="T1"><text:span text:style-name="T18">RISCHIO 5: 2 – 0.5 = 1.5 → pari a 2 = </text:span><text:span text:style-name="T17">MEDIO</text:span></text:p>
        </text:list-item>
        <text:list-item>
          <text:p text:style-name="P238" loext:marker-style-name="T1"><text:span text:style-name="T18">RISCHIO 6: 2 – 1 = 1 → pari a 1 = </text:span><text:span text:style-name="T140">BASSO</text:span></text:p>
        </text:list-item>
      </text:list>
      <text:p text:style-name="P236" loext:marker-style-name="T1"><text:span text:style-name="T18">Colonna </text:span><text:span text:style-name="T2">e</text:span><text:span text:style-name="T18"> : A seguito dell’effettuazione del monitoraggio, l’esperto ha trovato la seguente situazione:</text:span></text:p>
      <text:list text:continue-numbering="true" text:style-name="WWNum21">
        <text:list-item>
          <text:p text:style-name="P238" loext:marker-style-name="T1"><text:span text:style-name="T18">RISCHIO 1: nessuna misura applicata → 2 – 0 = 2 = </text:span><text:span text:style-name="T17">MEDIO</text:span><text:span text:style-name="T18"> </text:span></text:p>
        </text:list-item>
        <text:list-item>
          <text:p text:style-name="P238" loext:marker-style-name="T1"><text:span text:style-name="T18">RISCHIO 2: una misura specifica applicata → 2 – 1 = 1 = </text:span><text:span text:style-name="T140">BASSO</text:span><text:span text:style-name="T18"> </text:span></text:p>
        </text:list-item>
        <text:list-item>
          <text:p text:style-name="P238" loext:marker-style-name="T1"><text:span text:style-name="T18">RISCHIO 3: una misura specifica applicata → <text:s/>2 – 1 = 1 = </text:span><text:span text:style-name="T140">BASSO</text:span><text:span text:style-name="T18"> </text:span></text:p>
        </text:list-item>
        <text:list-item>
          <text:p text:style-name="P238" loext:marker-style-name="T1"><text:span text:style-name="T18">RISCHIO 4: 3 misure generiche applicate → 2 – 1.5 = 0.5 → pari a 1 = </text:span><text:span text:style-name="T140">BASSO</text:span></text:p>
        </text:list-item>
        <text:list-item>
          <text:p text:style-name="P238" loext:marker-style-name="T1"><text:span text:style-name="T18">RISCHIO 5: nessuna misura applicata → 2 – 0 = 2 = </text:span><text:span text:style-name="T17">MEDIO</text:span></text:p>
        </text:list-item>
        <text:list-item>
          <text:p text:style-name="P238" loext:marker-style-name="T1"><text:span text:style-name="T18">RISCHIO 6: una misura generica applicata → 2 – 0.5 = 1.5 → pari a 2 = </text:span><text:span text:style-name="T17">MEDIO</text:span></text:p>
        </text:list-item>
      </text:list>
      <text:p text:style-name="P126" loext:marker-style-name="T1"/>
      <text:p text:style-name="P13"><text:span text:style-name="T1">Si può concludere che, nella maggior parte dei casi, la situazione monitorata è risultata peggiore di quella prevista. Solo rispetto al RISCHIO 2, siccome la struttura è riuscita ad introdurre una misura specifica piuttosto che quella generica raccomandata, la situazione è risultata migliore dopo il monitoraggio (anche se sarà da valutare se l’arbitrio della struttura nel cambiare la misura è stato giustificato). Nel caso del rischio 3, la situazione è risultata essere uguale a quella prevista negli effetti però peggiore nella </text:span><text:span text:style-name="T74">modalità</text:span><text:span text:style-name="T75"> perché l’applicazione di una misura specifica, avendo tolto 1, è stata sufficiente per ridurre il PxI da MEDIO <text:s/>a BASSO, come era stato richiesto e stimato prima del monitoraggio; ciò nonostante, era previsto che venissero applicate 2 misure: una generica + una specifica, per cui la struttura, pur avendo ottenuto una riduzione effettiva del PxI sul rischio, è risultata comunque parzialmente inadempiente rispetto alle aspettative. </text:span></text:p>
      <text:p text:style-name="P23">Insomma, esiste anche una valutazione qualitativa da considerare, oltre a quella della dimensione puramente quantitativa dovuta alle misure applicate.</text:p>
      <text:p text:style-name="P154" loext:marker-style-name="T1"><text:span text:style-name="T167">NOTA BENE</text:span><text:span text:style-name="T167"/></text:p>
      <text:p text:style-name="P155" loext:marker-style-name="T1"><text:span text:style-name="T15">Una delle ipotesi che erano state considerate, nel valutare come dovesse essere calcolato l’apporto di mitigazione delle misure, era di applicare un algoritmo che seguisse una scala logaritmica</text:span><text:span text:style-name="T15"/></text:p>
      <text:p text:style-name="P128" loext:marker-style-name="T15"><draw:frame draw:style-name="fr4" draw:name="Immagine62" text:anchor-type="char" svg:y="0.002cm" svg:width="8.225cm" svg:height="6.622cm" draw:z-index="110"><draw:image xlink:href="Pictures/100000010000018000000158F17B23BD.png" xlink:type="simple" xlink:show="embed" xlink:actuate="onLoad" draw:mime-type="image/png"/></draw:frame></text:p>
      <text:p text:style-name="P128" loext:marker-style-name="T15"/>
      <text:p text:style-name="P128" loext:marker-style-name="T15"/>
      <text:p text:style-name="P128" loext:marker-style-name="T15"/>
      <text:p text:style-name="P128" loext:marker-style-name="T15"/>
      <text:p text:style-name="P128" loext:marker-style-name="T15"/>
      <text:p text:style-name="P128" loext:marker-style-name="T15"/>
      <text:p text:style-name="P128" loext:marker-style-name="T15"/>
      <text:p text:style-name="P128" loext:marker-style-name="T15"/>
      <text:p text:style-name="P128" loext:marker-style-name="T15"/>
      <text:p text:style-name="P128" loext:marker-style-name="T15"/>
      <text:p text:style-name="P128" loext:marker-style-name="T15"/>
      <text:p text:style-name="P155" loext:marker-style-name="T1"><text:span text:style-name="T15">dove funzione logaritmica </text:span><text:span text:style-name="T8">f(x) = log</text:span><text:span text:style-name="T174">a</text:span><text:span text:style-name="T8">(x)</text:span><text:span text:style-name="T15"> è una funzione definita in </text:span><text:span text:style-name="T144">ℝ</text:span><text:span text:style-name="T15"> e con a&gt;0, a</text:span><text:span text:style-name="T16">≠</text:span><text:span text:style-name="T15">1 (qui a&gt;1).</text:span></text:p>
      <text:p text:style-name="P155" loext:marker-style-name="T1"><text:span text:style-name="T15">Ciò avrebbe significato che l’apporto mitigante di ogni misura sarebbe stato via via minore quanto più venivano aggiunte misure. Per esempio, la prima misura specifica vale -1, la seconda vale -0.95, la terza vale -0.92 e così via; analogamente la prima misura generica vale -0.5, la seconda vale -0.48, la terza -0.45 etc. In questo modo, dopo una certa soglia, aggiungere ulteriori misure non avrebbe avuto senso perché quelle aggiunte non avrebbero sortito un effetto significativo. Il criterio generale sarebbe stato valido anche per serie alternate di misure generiche e specifiche. </text:span><text:span text:style-name="T15"/></text:p>
      <text:p text:style-name="P155" loext:marker-style-name="T1"><text:span text:style-name="T15">Tuttavia, la decisione di smussare l’effetto delle misure man mano che vengono applicate dopo altre misure è risultata troppo arbitraria, oltre che macchinosa; inoltre, non è detto che misure applicate dopo altre misure debbano avere un effetto ridotto, perché potrebbe anche essere vero il contrario: magari applicare una misura dopo che un’altra ha già “lavorato” su alcuni aspetti è più efficace, non meno. </text:span><text:span text:style-name="T15"/></text:p>
      <text:p text:style-name="P155" loext:marker-style-name="T1"><text:span text:style-name="T15">Per questi motivi, </text:span><text:span text:style-name="T17">l’effetto mitigante delle misure è stato alla fine considerato come lineare, non logaritmico.</text:span></text:p>
      <text:p text:style-name="P197" loext:marker-style-name="T77"><text:soft-page-break/></text:p>
      <text:p text:style-name="P195" loext:marker-style-name="T1"><text:span text:style-name="T1">Colonna </text:span><text:span text:style-name="T2">f</text:span><text:span text:style-name="T1"> : <text:s/>Nonostante le riduzioni dei PxI dei rischi ottenute, i valori ottenuti non sono sufficienti, dopo il monitoraggio, per sancire che ci sia stata una riduzione del PxI complessivo del processo, da MEDIO <text:s/>a BASSO. </text:span></text:p>
      <text:p text:style-name="P195" loext:marker-style-name="T1"><text:span text:style-name="T1">Quest’ultima conclusione dipende dall’applicazione di uno specifico algoritmo di ricalcolo.</text:span><text:span text:style-name="T1"/></text:p>
      <text:list xml:id="list172214433650119" text:continue-list="list172212502294560" text:style-name="WWNum1">
        <text:list-item>
          <text:list>
            <text:list-item>
              <text:list>
                <text:list-item>
                  <text:list>
                    <text:list-item>
                      <text:h text:style-name="P89" text:outline-level="4" loext:marker-style-name="T1"><text:bookmark-start text:name="__RefHeading___Toc2682_1922363239"/><text:span text:style-name="T1">L’ALGORITMO DI RICALCOLO</text:span><text:bookmark-end text:name="__RefHeading___Toc2682_1922363239"/><text:span text:style-name="T1"/></text:h>
                    </text:list-item>
                  </text:list>
                </text:list-item>
              </text:list>
            </text:list-item>
          </text:list>
        </text:list-item>
      </text:list>
      <text:p text:style-name="Text_20_body" loext:marker-style-name="T1"><text:span text:style-name="T1">Il valore complessivo del PxI del processo a seguito dell’applicazione e del monitoraggio delle misure può essere determinato calcolando </text:span><text:span text:style-name="T6">la media</text:span><text:span text:style-name="T11"> dei valori finali, certificati dal monitoraggio stesso.</text:span></text:p>
      <text:p text:style-name="Text_20_body" loext:marker-style-name="T1"><text:span text:style-name="T11">Certo, torna qui il problema della scala di misura. Essendo i valori originari su scala ordinale e non su scala a intervalli, la media non potrebbe essere a rigore calcolata, ma dovrebbe essere utilizzata, al più, la mediana. Tuttavia, persistendo nella forzatura, si può provare ad ottenere un algoritmo basato sulla media aritmetica dei valori convertiti.</text:span><text:span text:style-name="T11"/></text:p>
      <text:p text:style-name="Text_20_body" loext:marker-style-name="T1"><text:span text:style-name="T11">Nel caso preso in esame, la situazione </text:span><text:span text:style-name="T12">stimata</text:span><text:span text:style-name="T11"> era la seguente:</text:span></text:p>
      <text:p text:style-name="P256" loext:marker-style-name="T77"/>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style-name="Table10.1">
          <table:table-cell table:style-name="Table10.A1" office:value-type="string">
            <text:p text:style-name="P1" loext:marker-style-name="T1"><text:span text:style-name="T55">PxI del Processo</text:span><text:span text:style-name="T55"/></text:p>
          </table:table-cell>
          <table:table-cell table:style-name="Table10.A1" office:value-type="string">
            <text:p text:style-name="P1" loext:marker-style-name="T1"><text:span text:style-name="T55">Valori ricavati dal</text:span><text:span text:style-name="T55"/></text:p>
            <text:p text:style-name="P1" loext:marker-style-name="T1"><text:span text:style-name="T55">PxI del Processo (c)</text:span><text:span text:style-name="T55"/></text:p>
          </table:table-cell>
          <table:table-cell table:style-name="Table10.A1" office:value-type="string">
            <text:p text:style-name="P1" loext:marker-style-name="T1"><text:span text:style-name="T51">Misure richieste</text:span><text:span text:style-name="T51"/></text:p>
            <text:p text:style-name="P1" loext:marker-style-name="T1"><text:span text:style-name="T52">(d)</text:span><text:span text:style-name="T52"/></text:p>
            <text:p text:style-name="P1" loext:marker-style-name="T1"><text:span text:style-name="T44"><text:s/>~STIMA~</text:span><text:span text:style-name="T44"/></text:p>
          </table:table-cell>
          <table:table-cell table:style-name="Table10.A1" office:value-type="string">
            <text:p text:style-name="P1" loext:marker-style-name="T1"><text:span text:style-name="T50">Quantifica-zione (d1)</text:span><text:span text:style-name="T50"/></text:p>
            <text:p text:style-name="P1" loext:marker-style-name="T1"><text:span text:style-name="T44"><text:s/>~STIMA~</text:span><text:span text:style-name="T44"/></text:p>
          </table:table-cell>
          <table:table-cell table:style-name="Table10.A1" office:value-type="string">
            <text:p text:style-name="P1" loext:marker-style-name="T1"><text:span text:style-name="T50">Valori calmierati <text:s/>(d2) </text:span><text:span text:style-name="T51">(non arrotondati)</text:span></text:p>
            <text:p text:style-name="P1" loext:marker-style-name="T1"><text:span text:style-name="T44"><text:s/>~STIMA~</text:span><text:span text:style-name="T44"/></text:p>
          </table:table-cell>
          <table:table-cell table:style-name="Table10.A1" office:value-type="string">
            <text:p text:style-name="P1" loext:marker-style-name="T1"><text:span text:style-name="T50">Valori calmierati <text:s/>(d3) </text:span><text:span text:style-name="T51">(arrotondati per eccesso)</text:span></text:p>
            <text:p text:style-name="P1" loext:marker-style-name="T1"><text:span text:style-name="T44"><text:s/>~STIMA~</text:span><text:span text:style-name="T44"/></text:p>
          </table:table-cell>
          <table:table-cell table:style-name="Table10.A1" office:value-type="string">
            <text:p text:style-name="P1" loext:marker-style-name="T1"><text:span text:style-name="T55">PxI ricalcolato (d4)</text:span><text:span text:style-name="T56"> <text:s/>a seguito dell’ applicazione delle misure <text:s/></text:span><text:span text:style-name="T53"><text:s/>~STIMA~</text:span></text:p>
          </table:table-cell>
        </table:table-row>
        <table:table-row table:style-name="Table10.1">
          <table:table-cell table:style-name="Table10.A2" table:number-rows-spanned="6" office:value-type="string">
            <text:p text:style-name="P1" loext:marker-style-name="T1"><text:span text:style-name="T114">MEDIO</text:span><text:span text:style-name="T114"/></text:p>
          </table:table-cell>
          <table:table-cell table:style-name="Table10.A2" office:value-type="string">
            <text:p text:style-name="P1" loext:marker-style-name="T1"><text:span text:style-name="T114">MEDIO (2)</text:span><text:span text:style-name="T114"/></text:p>
          </table:table-cell>
          <table:table-cell table:style-name="Table10.C2" office:value-type="string">
            <text:p text:style-name="P1" loext:marker-style-name="T1"><text:span text:style-name="T114">{1S}</text:span><text:span text:style-name="T114"/></text:p>
          </table:table-cell>
          <table:table-cell table:style-name="Table10.C2" office:value-type="string">
            <text:p text:style-name="P1" loext:marker-style-name="T1"><text:span text:style-name="T114">-1</text:span><text:span text:style-name="T114"/></text:p>
          </table:table-cell>
          <table:table-cell table:style-name="Table10.C2" office:value-type="string">
            <text:p text:style-name="P1" loext:marker-style-name="T1"><text:span text:style-name="T114">1</text:span><text:span text:style-name="T114"/></text:p>
          </table:table-cell>
          <table:table-cell table:style-name="Table10.C2" office:value-type="string">
            <text:p text:style-name="P1" loext:marker-style-name="T1"><text:span text:style-name="T114">BASSO</text:span><text:span text:style-name="T114"/></text:p>
          </table:table-cell>
          <table:table-cell table:style-name="Table10.C2" table:number-rows-spanned="6" office:value-type="string">
            <text:p text:style-name="P1" loext:marker-style-name="T1"><text:span text:style-name="T114">BASSO</text:span><text:span text:style-name="T114"/></text:p>
          </table:table-cell>
        </table:table-row>
        <table:table-row table:style-name="Table10.1">
          <table:covered-table-cell table:style-name="Table10.A2"/>
          <table:table-cell table:style-name="Table10.A2" office:value-type="string">
            <text:p text:style-name="P1" loext:marker-style-name="T1"><text:span text:style-name="T114">MEDIO (2)</text:span><text:span text:style-name="T114"/></text:p>
          </table:table-cell>
          <table:table-cell table:style-name="Table10.A2" office:value-type="string">
            <text:p text:style-name="P1" loext:marker-style-name="T1"><text:span text:style-name="T114">{1G}</text:span><text:span text:style-name="T114"/></text:p>
          </table:table-cell>
          <table:table-cell table:style-name="Table10.A2" office:value-type="string">
            <text:p text:style-name="P1" loext:marker-style-name="T1"><text:span text:style-name="T114">-0.5</text:span><text:span text:style-name="T114"/></text:p>
          </table:table-cell>
          <table:table-cell table:style-name="Table10.A2" office:value-type="string">
            <text:p text:style-name="P1" loext:marker-style-name="T1"><text:span text:style-name="T114">1.5</text:span><text:span text:style-name="T114"/></text:p>
          </table:table-cell>
          <table:table-cell table:style-name="Table10.A2" office:value-type="string">
            <text:p text:style-name="P1" loext:marker-style-name="T1"><text:span text:style-name="T114">MEDIO</text:span><text:span text:style-name="T114"/></text:p>
          </table:table-cell>
          <table:covered-table-cell table:style-name="Table10.C2"/>
        </table:table-row>
        <table:table-row table:style-name="Table10.1">
          <table:covered-table-cell table:style-name="Table10.A2"/>
          <table:table-cell table:style-name="Table10.A2" office:value-type="string">
            <text:p text:style-name="P1" loext:marker-style-name="T1"><text:span text:style-name="T114">MEDIO (2)</text:span><text:span text:style-name="T114"/></text:p>
          </table:table-cell>
          <table:table-cell table:style-name="Table10.C2" office:value-type="string">
            <text:p text:style-name="P1" loext:marker-style-name="T1"><text:span text:style-name="T114">{1G + 1S}</text:span><text:span text:style-name="T114"/></text:p>
          </table:table-cell>
          <table:table-cell table:style-name="Table10.C2" office:value-type="string">
            <text:p text:style-name="P1" loext:marker-style-name="T1"><text:span text:style-name="T114">-1.5</text:span><text:span text:style-name="T114"/></text:p>
          </table:table-cell>
          <table:table-cell table:style-name="Table10.C2" office:value-type="string">
            <text:p text:style-name="P1" loext:marker-style-name="T1"><text:span text:style-name="T114">0.5</text:span><text:span text:style-name="T114"/></text:p>
          </table:table-cell>
          <table:table-cell table:style-name="Table10.C2" office:value-type="string">
            <text:p text:style-name="P1" loext:marker-style-name="T1"><text:span text:style-name="T114">BASSO</text:span><text:span text:style-name="T114"/></text:p>
          </table:table-cell>
          <table:covered-table-cell table:style-name="Table10.C2"/>
        </table:table-row>
        <table:table-row table:style-name="Table10.1">
          <table:covered-table-cell table:style-name="Table10.A2"/>
          <table:table-cell table:style-name="Table10.A2" office:value-type="string">
            <text:p text:style-name="P1" loext:marker-style-name="T1"><text:span text:style-name="T114">MEDIO (2)</text:span><text:span text:style-name="T114"/></text:p>
          </table:table-cell>
          <table:table-cell table:style-name="Table10.C5" office:value-type="string">
            <text:p text:style-name="P1" loext:marker-style-name="T1"><text:span text:style-name="T114">{4G}</text:span><text:span text:style-name="T114"/></text:p>
          </table:table-cell>
          <table:table-cell table:style-name="Table10.C5" office:value-type="string">
            <text:p text:style-name="P1" loext:marker-style-name="T1"><text:span text:style-name="T114">-2</text:span><text:span text:style-name="T114"/></text:p>
          </table:table-cell>
          <table:table-cell table:style-name="Table10.C5" office:value-type="string">
            <text:p text:style-name="P1" loext:marker-style-name="T1"><text:span text:style-name="T114">0</text:span><text:span text:style-name="T114"/></text:p>
          </table:table-cell>
          <table:table-cell table:style-name="Table10.C5" office:value-type="string">
            <text:p text:style-name="P1" loext:marker-style-name="T1"><text:span text:style-name="T114">MINIMO</text:span><text:span text:style-name="T114"/></text:p>
          </table:table-cell>
          <table:covered-table-cell table:style-name="Table10.C2"/>
        </table:table-row>
        <table:table-row table:style-name="Table10.1">
          <table:covered-table-cell table:style-name="Table10.A2"/>
          <table:table-cell table:style-name="Table10.A2" office:value-type="string">
            <text:p text:style-name="P1" loext:marker-style-name="T1"><text:span text:style-name="T114">MEDIO (2)</text:span><text:span text:style-name="T114"/></text:p>
          </table:table-cell>
          <table:table-cell table:style-name="Table10.A2" office:value-type="string">
            <text:p text:style-name="P1" loext:marker-style-name="T1"><text:span text:style-name="T114">{1G}</text:span><text:span text:style-name="T114"/></text:p>
          </table:table-cell>
          <table:table-cell table:style-name="Table10.A2" office:value-type="string">
            <text:p text:style-name="P1" loext:marker-style-name="T1"><text:span text:style-name="T114">-0.5</text:span><text:span text:style-name="T114"/></text:p>
          </table:table-cell>
          <table:table-cell table:style-name="Table10.A2" office:value-type="string">
            <text:p text:style-name="P1" loext:marker-style-name="T1"><text:span text:style-name="T114">1.5</text:span><text:span text:style-name="T114"/></text:p>
          </table:table-cell>
          <table:table-cell table:style-name="Table10.A2" office:value-type="string">
            <text:p text:style-name="P1" loext:marker-style-name="T1"><text:span text:style-name="T114">MEDIO</text:span><text:span text:style-name="T114"/></text:p>
          </table:table-cell>
          <table:covered-table-cell table:style-name="Table10.C2"/>
        </table:table-row>
        <table:table-row table:style-name="Table10.1">
          <table:covered-table-cell table:style-name="Table10.A2"/>
          <table:table-cell table:style-name="Table10.B7" office:value-type="string">
            <text:p text:style-name="P1" loext:marker-style-name="T1"><text:span text:style-name="T114">MEDIO (2)</text:span><text:span text:style-name="T114"/></text:p>
          </table:table-cell>
          <table:table-cell table:style-name="Table10.C7" office:value-type="string">
            <text:p text:style-name="P1" loext:marker-style-name="T1"><text:span text:style-name="T114">{1S}</text:span><text:span text:style-name="T114"/></text:p>
          </table:table-cell>
          <table:table-cell table:style-name="Table10.C7" office:value-type="string">
            <text:p text:style-name="P1" loext:marker-style-name="T1"><text:span text:style-name="T114">-1</text:span><text:span text:style-name="T114"/></text:p>
          </table:table-cell>
          <table:table-cell table:style-name="Table10.C7" office:value-type="string">
            <text:p text:style-name="P1" loext:marker-style-name="T1"><text:span text:style-name="T114">1</text:span><text:span text:style-name="T114"/></text:p>
          </table:table-cell>
          <table:table-cell table:style-name="Table10.C7" office:value-type="string">
            <text:p text:style-name="P1" loext:marker-style-name="T1"><text:span text:style-name="T114">BASSO</text:span><text:span text:style-name="T114"/></text:p>
          </table:table-cell>
          <table:covered-table-cell table:style-name="Table10.C2"/>
        </table:table-row>
      </table:table>
      <text:p text:style-name="P202" loext:marker-style-name="T77"/>
      <text:p text:style-name="P255" loext:marker-style-name="T77"><text:soft-page-break/></text:p>
      <text:p text:style-name="P250" loext:marker-style-name="T1"><text:span text:style-name="T1">Se per effettuare la media ci basassimo sui valori già arrotondati per eccesso (colonna d3) perderemmo l’apporto delle misure che sono state applicate ma che non sono riuscite ad ottenere una variazione di almeno 1 (nell’analisi di dettaglio sono riportate varie SOLUZIONI prese in esame ma poi scartate, a questo proposito).</text:span><text:span text:style-name="T1"/></text:p>
      <text:p text:style-name="Text_20_body" loext:marker-style-name="T1"><text:span text:style-name="T57">Siccome, però, vogliamo considerare solo l’effetto delle misure che effettivamente hanno prodotto una riduzione del livello di rischio, nel ricalcolo di un PxI generale del processo, effettuiamo tale ricalcolo sui valori calmierati </text:span><text:span text:style-name="T58">arrotondati</text:span><text:span text:style-name="T57"> (colonna d3).</text:span></text:p>
      <text:p text:style-name="P249" loext:marker-style-name="T41"/>
      <text:p text:style-name="Text_20_body" loext:marker-style-name="T1"><text:span text:style-name="T57"><text:s/>Pertanto,</text:span><text:span text:style-name="T59"> si ha:</text:span><text:span text:style-name="T57"> <text:s text:c="6"/></text:span><text:span text:style-name="T59"><text:s/></text:span></text:p>
      <text:p text:style-name="P249" loext:marker-style-name="T41"/>
      <text:p text:style-name="Text_20_body" loext:marker-style-name="T1"><text:span text:style-name="T59">Il valore ottenuto x è &lt; 2 e &gt; 1 (cioè è compreso tra uno e due: 1 &lt; x &lt; 2) ma, seguendo le normali regole di arrotondamento </text:span><text:span text:style-name="T31">(arrotondamento per eccesso se la cifra decimale è superiore a 5, per difetto se è inferiore a 5, per eccesso se la cifra decimale è 5 e la cifra che la precede è dispari etc.),</text:span><text:span text:style-name="T61"> </text:span><text:span text:style-name="T59">va arrotondato, per difetto, al primo valore intero successivo, in questo caso 1, quindi il PxI ricalcolato è pari a BASSO, in questo esempio.</text:span></text:p>
      <text:p text:style-name="P257" loext:marker-style-name="T79"/>
      <text:p text:style-name="P259" loext:marker-style-name="T1"><text:span text:style-name="T11">Tutta questa situazione viene riassunta dalla tabella presentata di seguito, che corrisponde alla tabella precedente a cui sono state aggiunte altre 4 colonne, che presentano in dettaglio la situazione che si è riscontrata a seguito del monitoraggio. Il significato delle colonne aggiunte è lo stesso delle colonne corrispondenti nelle stime, con la differenza che i dati sono differenti, in questo caso specifico (ma potrebbe anche verificarsi il caso in cui il monitoraggio riscontra che l’applicazione delle misure abbia effettivamente ricalcato quanto stimato in precedenza).</text:span><text:span text:style-name="T11"/></text:p>
      <text:p text:style-name="P258" loext:marker-style-name="T77"/>
      <text:p text:style-name="P245" loext:marker-style-name="T1"/>
      <text:p text:style-name="P258" loext:marker-style-name="T77"/>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row table:style-name="Table11.1">
          <table:table-cell table:style-name="Table11.A1" office:value-type="string">
            <text:p text:style-name="P1" loext:marker-style-name="T1"><text:span text:style-name="T55">PxI del Processo</text:span><text:span text:style-name="T55"/></text:p>
          </table:table-cell>
          <table:table-cell table:style-name="Table11.A1" office:value-type="string">
            <text:p text:style-name="P1" loext:marker-style-name="T1"><text:span text:style-name="T55">Valori ricavati dal</text:span><text:span text:style-name="T55"/></text:p>
            <text:p text:style-name="P1" loext:marker-style-name="T1"><text:span text:style-name="T55">PxI del Processo (c)</text:span><text:span text:style-name="T55"/></text:p>
          </table:table-cell>
          <table:table-cell table:style-name="Table11.A1" office:value-type="string">
            <text:p text:style-name="P1" loext:marker-style-name="T1"><text:span text:style-name="T51">Misure richieste</text:span><text:span text:style-name="T51"/></text:p>
            <text:p text:style-name="P1" loext:marker-style-name="T1"><text:span text:style-name="T52">(d)</text:span><text:span text:style-name="T52"/></text:p>
            <text:p text:style-name="P1" loext:marker-style-name="T1"><text:span text:style-name="T44"><text:s/>~STIMA~</text:span><text:span text:style-name="T44"/></text:p>
          </table:table-cell>
          <table:table-cell table:style-name="Table11.A1" office:value-type="string">
            <text:p text:style-name="P1" loext:marker-style-name="T1"><text:span text:style-name="T50">Quantificazione misure (d1)</text:span><text:span text:style-name="T50"/></text:p>
            <text:p text:style-name="P1" loext:marker-style-name="T1"><text:span text:style-name="T44"><text:s/>~STIMA~</text:span><text:span text:style-name="T44"/></text:p>
          </table:table-cell>
          <table:table-cell table:style-name="Table11.A1" office:value-type="string">
            <text:p text:style-name="P1" loext:marker-style-name="T1"><text:span text:style-name="T50">Valori calmierati <text:s/>(d2) </text:span><text:span text:style-name="T51">(non arrotondati)</text:span></text:p>
            <text:p text:style-name="P1" loext:marker-style-name="T1"><text:span text:style-name="T44"><text:s/>~STIMA~</text:span><text:span text:style-name="T44"/></text:p>
          </table:table-cell>
          <table:table-cell table:style-name="Table11.A1" office:value-type="string">
            <text:p text:style-name="P1" loext:marker-style-name="T1"><text:span text:style-name="T50">Valori calmierati <text:s/>(d3) </text:span><text:span text:style-name="T51">(arrotondati per eccesso)</text:span></text:p>
            <text:p text:style-name="P1" loext:marker-style-name="T1"><text:span text:style-name="T44"><text:s/>~STIMA~</text:span><text:span text:style-name="T44"/></text:p>
          </table:table-cell>
          <table:table-cell table:style-name="Table11.A1" office:value-type="string">
            <text:p text:style-name="P1" loext:marker-style-name="T1"><text:span text:style-name="T55">PxI ricalcolato (d4)</text:span><text:span text:style-name="T56"> <text:s/>a seguito dell’ applicazione delle misure <text:s/></text:span><text:span text:style-name="T53"><text:s/>~STIMA~</text:span></text:p>
          </table:table-cell>
          <table:table-cell table:style-name="Table11.A1" office:value-type="string">
            <text:p text:style-name="P1" loext:marker-style-name="T1"><text:span text:style-name="T55">Misure effettivamente applicate <text:s/></text:span><text:span text:style-name="T56">~MONITO-RAGGIO~</text:span></text:p>
          </table:table-cell>
          <table:table-cell table:style-name="Table11.A1" office:value-type="string">
            <text:p text:style-name="P1" loext:marker-style-name="T1"><text:span text:style-name="T50">Quantificazione misure (d5)</text:span><text:span text:style-name="T50"/></text:p>
            <text:p text:style-name="P1" loext:marker-style-name="T1"><text:span text:style-name="T44"><text:s/>~MONITORAGGIO~</text:span><text:span text:style-name="T44"/></text:p>
          </table:table-cell>
          <table:table-cell table:style-name="Table11.A1" office:value-type="string">
            <text:p text:style-name="P1" loext:marker-style-name="T1"><text:span text:style-name="T50">Valori calmierati <text:s/>(d6) </text:span><text:span text:style-name="T51">(non arrotondati)</text:span></text:p>
            <text:p text:style-name="P1" loext:marker-style-name="T1"><text:span text:style-name="T149"><text:s/>~MONITORAGGIO~</text:span><text:span text:style-name="T149"/></text:p>
          </table:table-cell>
          <table:table-cell table:style-name="Table11.A1" office:value-type="string">
            <text:p text:style-name="P1" loext:marker-style-name="T1"><text:span text:style-name="T55">PxI ricalcolato </text:span><text:span text:style-name="T56">~MONITORAGGIO~</text:span></text:p>
          </table:table-cell>
        </table:table-row>
        <table:table-row table:style-name="Table11.1">
          <table:table-cell table:style-name="Table11.A2" table:number-rows-spanned="6" office:value-type="string">
            <text:p text:style-name="P1" loext:marker-style-name="T1"><text:span text:style-name="T114">MEDIO</text:span><text:span text:style-name="T114"/></text:p>
          </table:table-cell>
          <table:table-cell table:style-name="Table11.A2" office:value-type="string">
            <text:p text:style-name="P1" loext:marker-style-name="T1"><text:span text:style-name="T114">MEDIO (2)</text:span><text:span text:style-name="T114"/></text:p>
          </table:table-cell>
          <table:table-cell table:style-name="Table11.C2" office:value-type="string">
            <text:p text:style-name="P1" loext:marker-style-name="T1"><text:span text:style-name="T114">{1S}</text:span><text:span text:style-name="T114"/></text:p>
          </table:table-cell>
          <table:table-cell table:style-name="Table11.C2" office:value-type="string">
            <text:p text:style-name="P1" loext:marker-style-name="T1"><text:span text:style-name="T114">-1</text:span><text:span text:style-name="T114"/></text:p>
          </table:table-cell>
          <table:table-cell table:style-name="Table11.C2" office:value-type="string">
            <text:p text:style-name="P1" loext:marker-style-name="T1"><text:span text:style-name="T114">1</text:span><text:span text:style-name="T114"/></text:p>
          </table:table-cell>
          <table:table-cell table:style-name="Table11.C2" office:value-type="string">
            <text:p text:style-name="P1" loext:marker-style-name="T1"><text:span text:style-name="T114">BASSO</text:span><text:span text:style-name="T114"/></text:p>
          </table:table-cell>
          <table:table-cell table:style-name="Table11.C2" table:number-rows-spanned="6" office:value-type="string">
            <text:p text:style-name="P1" loext:marker-style-name="T1"><text:span text:style-name="T114">BASSO</text:span><text:span text:style-name="T114"/></text:p>
          </table:table-cell>
          <table:table-cell table:style-name="Table11.C2" office:value-type="string">
            <text:p text:style-name="P1" loext:marker-style-name="T1"><text:span text:style-name="T114">(-)</text:span><text:span text:style-name="T114"/></text:p>
          </table:table-cell>
          <table:table-cell table:style-name="Table11.C2" office:value-type="string">
            <text:p text:style-name="P1" loext:marker-style-name="T1"><text:span text:style-name="T114">0</text:span><text:span text:style-name="T114"/></text:p>
          </table:table-cell>
          <table:table-cell table:style-name="Table11.C2" office:value-type="string">
            <text:p text:style-name="P1" loext:marker-style-name="T1"><text:span text:style-name="T114">2</text:span><text:span text:style-name="T114"/></text:p>
          </table:table-cell>
          <table:table-cell table:style-name="Table11.A2" table:number-rows-spanned="6" office:value-type="string">
            <text:p text:style-name="P1" loext:marker-style-name="T1"><text:span text:style-name="T114">MEDIO</text:span><text:span text:style-name="T114"/></text:p>
          </table:table-cell>
        </table:table-row>
        <table:table-row table:style-name="Table11.1">
          <table:covered-table-cell table:style-name="Table11.A2"/>
          <table:table-cell table:style-name="Table11.A2" office:value-type="string">
            <text:p text:style-name="P1" loext:marker-style-name="T1"><text:span text:style-name="T114">MEDIO (2)</text:span><text:span text:style-name="T114"/></text:p>
          </table:table-cell>
          <table:table-cell table:style-name="Table11.A2" office:value-type="string">
            <text:p text:style-name="P1" loext:marker-style-name="T1"><text:span text:style-name="T114">{1G}</text:span><text:span text:style-name="T114"/></text:p>
          </table:table-cell>
          <table:table-cell table:style-name="Table11.A2" office:value-type="string">
            <text:p text:style-name="P1" loext:marker-style-name="T1"><text:span text:style-name="T114">-0.5</text:span><text:span text:style-name="T114"/></text:p>
          </table:table-cell>
          <table:table-cell table:style-name="Table11.A2" office:value-type="string">
            <text:p text:style-name="P1" loext:marker-style-name="T1"><text:span text:style-name="T114">1.5</text:span><text:span text:style-name="T114"/></text:p>
          </table:table-cell>
          <table:table-cell table:style-name="Table11.A2" office:value-type="string">
            <text:p text:style-name="P1" loext:marker-style-name="T1"><text:span text:style-name="T114">MEDIO</text:span><text:span text:style-name="T114"/></text:p>
          </table:table-cell>
          <table:covered-table-cell table:style-name="Table11.C2"/>
          <table:table-cell table:style-name="Table11.C2" office:value-type="string">
            <text:p text:style-name="P1" loext:marker-style-name="T1"><text:span text:style-name="T114">(1S)</text:span><text:span text:style-name="T114"/></text:p>
          </table:table-cell>
          <table:table-cell table:style-name="Table11.C2" office:value-type="string">
            <text:p text:style-name="P1" loext:marker-style-name="T1"><text:span text:style-name="T114">-1</text:span><text:span text:style-name="T114"/></text:p>
          </table:table-cell>
          <table:table-cell table:style-name="Table11.C2" office:value-type="string">
            <text:p text:style-name="P1" loext:marker-style-name="T1"><text:span text:style-name="T114">1</text:span><text:span text:style-name="T114"/></text:p>
          </table:table-cell>
          <table:covered-table-cell table:style-name="Table11.C2"/>
        </table:table-row>
        <table:table-row table:style-name="Table11.1">
          <table:covered-table-cell table:style-name="Table11.A2"/>
          <table:table-cell table:style-name="Table11.A2" office:value-type="string">
            <text:p text:style-name="P1" loext:marker-style-name="T1"><text:span text:style-name="T114">MEDIO (2)</text:span><text:span text:style-name="T114"/></text:p>
          </table:table-cell>
          <table:table-cell table:style-name="Table11.C2" office:value-type="string">
            <text:p text:style-name="P1" loext:marker-style-name="T1"><text:span text:style-name="T114">{1G + 1S}</text:span><text:span text:style-name="T114"/></text:p>
          </table:table-cell>
          <table:table-cell table:style-name="Table11.C2" office:value-type="string">
            <text:p text:style-name="P1" loext:marker-style-name="T1"><text:span text:style-name="T114">-1.5</text:span><text:span text:style-name="T114"/></text:p>
          </table:table-cell>
          <table:table-cell table:style-name="Table11.C2" office:value-type="string">
            <text:p text:style-name="P1" loext:marker-style-name="T1"><text:span text:style-name="T114">0.5</text:span><text:span text:style-name="T114"/></text:p>
          </table:table-cell>
          <table:table-cell table:style-name="Table11.C2" office:value-type="string">
            <text:p text:style-name="P1" loext:marker-style-name="T1"><text:span text:style-name="T114">BASSO</text:span><text:span text:style-name="T114"/></text:p>
          </table:table-cell>
          <table:covered-table-cell table:style-name="Table11.C2"/>
          <table:table-cell table:style-name="Table11.C2" office:value-type="string">
            <text:p text:style-name="P1" loext:marker-style-name="T1"><text:span text:style-name="T114">(1S)</text:span><text:span text:style-name="T114"/></text:p>
          </table:table-cell>
          <table:table-cell table:style-name="Table11.C2" office:value-type="string">
            <text:p text:style-name="P1" loext:marker-style-name="T1"><text:span text:style-name="T114">-1</text:span><text:span text:style-name="T114"/></text:p>
          </table:table-cell>
          <table:table-cell table:style-name="Table11.C2" office:value-type="string">
            <text:p text:style-name="P1" loext:marker-style-name="T1"><text:span text:style-name="T114">1</text:span><text:span text:style-name="T114"/></text:p>
          </table:table-cell>
          <table:covered-table-cell table:style-name="Table11.C2"/>
        </table:table-row>
        <table:table-row table:style-name="Table11.1">
          <table:covered-table-cell table:style-name="Table11.A2"/>
          <table:table-cell table:style-name="Table11.A2" office:value-type="string">
            <text:p text:style-name="P1" loext:marker-style-name="T1"><text:span text:style-name="T114">MEDIO (2)</text:span><text:span text:style-name="T114"/></text:p>
          </table:table-cell>
          <table:table-cell table:style-name="Table11.C5" office:value-type="string">
            <text:p text:style-name="P1" loext:marker-style-name="T1"><text:span text:style-name="T114">{4G}</text:span><text:span text:style-name="T114"/></text:p>
          </table:table-cell>
          <table:table-cell table:style-name="Table11.C5" office:value-type="string">
            <text:p text:style-name="P1" loext:marker-style-name="T1"><text:span text:style-name="T114">-2</text:span><text:span text:style-name="T114"/></text:p>
          </table:table-cell>
          <table:table-cell table:style-name="Table11.C5" office:value-type="string">
            <text:p text:style-name="P1" loext:marker-style-name="T1"><text:span text:style-name="T114">0</text:span><text:span text:style-name="T114"/></text:p>
          </table:table-cell>
          <table:table-cell table:style-name="Table11.C5" office:value-type="string">
            <text:p text:style-name="P1" loext:marker-style-name="T1"><text:span text:style-name="T114">MINIMO</text:span><text:span text:style-name="T114"/></text:p>
          </table:table-cell>
          <table:covered-table-cell table:style-name="Table11.C2"/>
          <table:table-cell table:style-name="Table11.C2" office:value-type="string">
            <text:p text:style-name="P1" loext:marker-style-name="T1"><text:span text:style-name="T114"><text:s/>(3G)</text:span><text:span text:style-name="T114"/></text:p>
          </table:table-cell>
          <table:table-cell table:style-name="Table11.C2" office:value-type="string">
            <text:p text:style-name="P1" loext:marker-style-name="T1"><text:span text:style-name="T114">-1.5</text:span><text:span text:style-name="T114"/></text:p>
          </table:table-cell>
          <table:table-cell table:style-name="Table11.C2" office:value-type="string">
            <text:p text:style-name="P1" loext:marker-style-name="T1"><text:span text:style-name="T114">0.5</text:span><text:span text:style-name="T114"/></text:p>
          </table:table-cell>
          <table:covered-table-cell table:style-name="Table11.C2"/>
        </table:table-row>
        <table:table-row table:style-name="Table11.1">
          <table:covered-table-cell table:style-name="Table11.A2"/>
          <table:table-cell table:style-name="Table11.A2" office:value-type="string">
            <text:p text:style-name="P1" loext:marker-style-name="T1"><text:span text:style-name="T114">MEDIO (2)</text:span><text:span text:style-name="T114"/></text:p>
          </table:table-cell>
          <table:table-cell table:style-name="Table11.A2" office:value-type="string">
            <text:p text:style-name="P1" loext:marker-style-name="T1"><text:span text:style-name="T114">{1G}</text:span><text:span text:style-name="T114"/></text:p>
          </table:table-cell>
          <table:table-cell table:style-name="Table11.A2" office:value-type="string">
            <text:p text:style-name="P1" loext:marker-style-name="T1"><text:span text:style-name="T114">-0.5</text:span><text:span text:style-name="T114"/></text:p>
          </table:table-cell>
          <table:table-cell table:style-name="Table11.A2" office:value-type="string">
            <text:p text:style-name="P1" loext:marker-style-name="T1"><text:span text:style-name="T114">1.5</text:span><text:span text:style-name="T114"/></text:p>
          </table:table-cell>
          <table:table-cell table:style-name="Table11.A2" office:value-type="string">
            <text:p text:style-name="P1" loext:marker-style-name="T1"><text:span text:style-name="T114">MEDIO</text:span><text:span text:style-name="T114"/></text:p>
          </table:table-cell>
          <table:covered-table-cell table:style-name="Table11.C2"/>
          <table:table-cell table:style-name="Table11.C2" office:value-type="string">
            <text:p text:style-name="P1" loext:marker-style-name="T1"><text:span text:style-name="T114">(-)</text:span><text:span text:style-name="T114"/></text:p>
          </table:table-cell>
          <table:table-cell table:style-name="Table11.C2" office:value-type="string">
            <text:p text:style-name="P1" loext:marker-style-name="T1"><text:span text:style-name="T114">0</text:span><text:span text:style-name="T114"/></text:p>
          </table:table-cell>
          <table:table-cell table:style-name="Table11.C2" office:value-type="string">
            <text:p text:style-name="P1" loext:marker-style-name="T1"><text:span text:style-name="T114">2</text:span><text:span text:style-name="T114"/></text:p>
          </table:table-cell>
          <table:covered-table-cell table:style-name="Table11.C2"/>
        </table:table-row>
        <table:table-row table:style-name="Table11.1">
          <table:covered-table-cell table:style-name="Table11.A2"/>
          <table:table-cell table:style-name="Table11.B7" office:value-type="string">
            <text:p text:style-name="P1" loext:marker-style-name="T1"><text:span text:style-name="T114">MEDIO (2)</text:span><text:span text:style-name="T114"/></text:p>
          </table:table-cell>
          <table:table-cell table:style-name="Table11.C7" office:value-type="string">
            <text:p text:style-name="P1" loext:marker-style-name="T1"><text:span text:style-name="T114">{1S}</text:span><text:span text:style-name="T114"/></text:p>
          </table:table-cell>
          <table:table-cell table:style-name="Table11.C7" office:value-type="string">
            <text:p text:style-name="P1" loext:marker-style-name="T1"><text:span text:style-name="T114">-1</text:span><text:span text:style-name="T114"/></text:p>
          </table:table-cell>
          <table:table-cell table:style-name="Table11.C7" office:value-type="string">
            <text:p text:style-name="P1" loext:marker-style-name="T1"><text:span text:style-name="T114">1</text:span><text:span text:style-name="T114"/></text:p>
          </table:table-cell>
          <table:table-cell table:style-name="Table11.C7" office:value-type="string">
            <text:p text:style-name="P1" loext:marker-style-name="T1"><text:span text:style-name="T114">BASSO</text:span><text:span text:style-name="T114"/></text:p>
          </table:table-cell>
          <table:covered-table-cell table:style-name="Table11.C2"/>
          <table:table-cell table:style-name="Table11.C2" office:value-type="string">
            <text:p text:style-name="P1" loext:marker-style-name="T1"><text:span text:style-name="T114">(1G)</text:span><text:span text:style-name="T114"/></text:p>
          </table:table-cell>
          <table:table-cell table:style-name="Table11.C2" office:value-type="string">
            <text:p text:style-name="P1" loext:marker-style-name="T1"><text:span text:style-name="T114">-0.5</text:span><text:span text:style-name="T114"/></text:p>
          </table:table-cell>
          <table:table-cell table:style-name="Table11.C2" office:value-type="string">
            <text:p text:style-name="P1" loext:marker-style-name="T1"><text:span text:style-name="T114">1.5</text:span><text:span text:style-name="T114"/></text:p>
          </table:table-cell>
          <table:covered-table-cell table:style-name="Table11.C2"/>
        </table:table-row>
      </table:table>
      <text:p text:style-name="P129" loext:marker-style-name="T1"/>
      <text:p text:style-name="P129" loext:marker-style-name="T1"/>
      <text:p text:style-name="P129" loext:marker-style-name="T1"/>
      <text:p text:style-name="P129" loext:marker-style-name="T1"/>
      <text:p text:style-name="P129" loext:marker-style-name="T1"/>
      <text:list xml:id="list172214307059976" text:continue-list="list172212998536265" text:style-name="WWNum97">
        <text:list-item>
          <text:list>
            <text:list-item>
              <text:list>
                <text:list-item>
                  <text:h text:style-name="P77" text:outline-level="3" loext:marker-style-name="T1"><text:bookmark-start text:name="__RefHeading___Toc10351093021111111113"/><text:span text:style-name="T26">VISTA DELL’IMPLEMENTAZIONE</text:span><text:bookmark-end text:name="__RefHeading___Toc10351093021111111113"/><text:span text:style-name="T26"/></text:h>
                </text:list-item>
              </text:list>
            </text:list-item>
          </text:list>
        </text:list-item>
      </text:list>
      <text:p text:style-name="P10" loext:marker-style-name="T1"><text:span text:style-name="T33">Oltre all’implementazione delle viste: 1. registro delle misure e 2. funzione di associazione tra misura, rischio e processo, si prevede di implementare due nuove interfacce, 3. e 4., per visualizzare la mitigazione del rischio corruttivo in base alle previste misure di prevenzione:</text:span><text:span text:style-name="T33"/></text:p>
      <text:list text:continue-list="list3879974383" text:style-name="WWNum14">
        <text:list-item>
          <text:p text:style-name="P157" loext:marker-style-name="T1"><text:span text:style-name="T1">il PxI dei rischi e delle misure</text:span><text:span text:style-name="T1"/></text:p>
        </text:list-item>
        <text:list-item>
          <text:p text:style-name="P157" loext:marker-style-name="T1"><text:span text:style-name="T1">la tabella delle misure</text:span><text:span text:style-name="T1"/></text:p>
        </text:list-item>
      </text:list>
      <text:p text:style-name="P10" loext:marker-style-name="T1"><text:span text:style-name="T1">Inoltre, si prevede di modificare un’interfaccia esistente (tabella dei rischi) aggiungendo una nuova colonna:</text:span><text:span text:style-name="T1"/></text:p>
      <text:list text:continue-numbering="true" text:style-name="WWNum14">
        <text:list-item>
          <text:p text:style-name="P157" loext:marker-style-name="T1"><text:span text:style-name="T1">la mitigazione del rischio stimata in funzione delle misure di prevenzione previste</text:span><text:span text:style-name="T1"/></text:p>
        </text:list-item>
      </text:list>
      <text:p text:style-name="P117" loext:marker-style-name="T1"/>
      <text:list text:continue-list="list172214433650119" text:style-name="WWNum1">
        <text:list-item>
          <text:list>
            <text:list-item>
              <text:list>
                <text:list-item>
                  <text:list>
                    <text:list-item>
                      <text:h text:style-name="P89" text:outline-level="4" loext:marker-style-name="T1"><text:bookmark-start text:name="__RefHeading___Toc103510930211111111121"/><text:span text:style-name="T1">3. REPORT PxI DEI RISCHI (E DELLE MISURE)</text:span><text:bookmark-end text:name="__RefHeading___Toc103510930211111111121"/><text:span text:style-name="T1"/></text:h>
                    </text:list-item>
                  </text:list>
                </text:list-item>
              </text:list>
            </text:list-item>
          </text:list>
        </text:list-item>
      </text:list>
      <text:p text:style-name="P10" loext:marker-style-name="T1"><text:span text:style-name="T1">Il report PxI basato sui processi, rilasciato nel software dalla versione 1.50, prevede la generazione di una tabella a doppia entrata, avente in riga i processi ed in colonna gli indicatori di rischio. La confluenza tra il processo (riga) e l’indicatore (colonna) identifica la cella con il valore di rischio cercato. Questo report è chiamato semplicemente “Report PxI” (o “Report probabilità x impatto”):</text:span><text:span text:style-name="T1"/></text:p>
      <text:p text:style-name="P117" loext:marker-style-name="T1"/>
      <text:p text:style-name="P129" loext:marker-style-name="T1"><draw:custom-shape text:anchor-type="char" draw:z-index="47" draw:name="Cornice32" draw:style-name="gr14" draw:text-style-name="P265" svg:width="17.59cm" svg:height="11.522cm" svg:x="0cm" svg:y="0.127cm"><text:p text:style-name="P28" loext:marker-style-name="T148"><text:span text:style-name="T86"><draw:frame draw:style-name="fr2" draw:name="Immagine64" text:anchor-type="as-char" svg:width="17.59cm" svg:height="10.612cm" draw:z-index="71"><draw:image xlink:href="Pictures/1000000100000790000004900A58D62C.png" xlink:type="simple" xlink:show="embed" xlink:actuate="onLoad" draw:mime-type="image/png"/></draw:frame></text:span><text:span text:style-name="T87">Figura </text:span><text:span text:style-name="T87"><text:sequence text:ref-name="refFigura24" text:name="Figura" text:formula="ooow:Figura+1" style:num-format="1">25</text:sequence></text:span><text:span text:style-name="T87">: Esempio di Report "Probabilità x Impatt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9" loext:marker-style-name="T1"/>
      <text:p text:style-name="P130" loext:marker-style-name="T1"/>
      <text:p text:style-name="P14" loext:marker-style-name="T1"><text:span text:style-name="T1">Si prevede di implementare una nuova tabella <text:s/>a doppia entrata, recante in riga i rischi contestuali ai processi ed in colonna i valori del PxI stimati in funzione della mitigazione prevista. Lo schema del report è riportato nella tabella seguente:</text:span><text:span text:style-name="T1"/></text:p>
      <text:p text:style-name="P4" loext:marker-style-name="T1"/>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B"/>
        <table:table-column table:style-name="Table12.G"/>
        <table:table-column table:style-name="Table12.H"/>
        <table:table-column table:style-name="Table12.I"/>
        <table:table-row table:style-name="Table12.1">
          <table:table-cell table:style-name="Table12.A1" office:value-type="string">
            <text:p text:style-name="P46" loext:marker-style-name="T99"><draw:line text:anchor-type="char" draw:z-index="79" draw:name="Linea 1" draw:style-name="gr2" draw:text-style-name="P266" svg:x1="0.072cm" svg:y1="1.408cm" svg:x2="2.152cm" svg:y2="0.067cm"><text:p/></draw:line></text:p>
          </table:table-cell>
          <table:table-cell table:style-name="Table12.B1" office:value-type="string">
            <text:p text:style-name="P42" loext:marker-style-name="T175"><text:span text:style-name="T105">PxI</text:span><text:span text:style-name="T105"/></text:p>
            <text:p text:style-name="P42" loext:marker-style-name="T175"><text:span text:style-name="T118">processo</text:span><text:span text:style-name="T118"/></text:p>
          </table:table-cell>
          <table:table-cell table:style-name="Table12.B1" office:value-type="string">
            <text:p text:style-name="P42" loext:marker-style-name="T175"><text:span text:style-name="T105">PxI</text:span><text:span text:style-name="T105"/></text:p>
            <text:p text:style-name="P42" loext:marker-style-name="T175"><text:span text:style-name="T118">“spalmato” </text:span><text:span text:style-name="T120">(distribuito)</text:span></text:p>
          </table:table-cell>
          <table:table-cell table:style-name="Table12.B1" office:value-type="string">
            <text:p text:style-name="P42" loext:marker-style-name="T175"><text:span text:style-name="T127">Misure previste</text:span><text:span text:style-name="T127"/></text:p>
          </table:table-cell>
          <table:table-cell table:style-name="Table12.B1" office:value-type="string">
            <text:p text:style-name="P42" loext:marker-style-name="T175"><text:span text:style-name="T119">Mitigazione stimata</text:span><text:span text:style-name="T119"/></text:p>
          </table:table-cell>
          <table:table-cell table:style-name="Table12.B1" office:value-type="string">
            <text:p text:style-name="P42" loext:marker-style-name="T175"><text:span text:style-name="T106">PxI</text:span><text:span text:style-name="T128"> </text:span><text:span text:style-name="T119">mitigato (~stima~)</text:span></text:p>
          </table:table-cell>
          <table:table-cell table:style-name="Table12.G1" office:value-type="string">
            <text:p text:style-name="P42" loext:marker-style-name="T175"><text:span text:style-name="T127">Misure applicate</text:span><text:span text:style-name="T129"> </text:span><text:span text:style-name="T123">(monitoraggio)</text:span></text:p>
          </table:table-cell>
          <table:table-cell table:style-name="Table12.G1" office:value-type="string">
            <text:p text:style-name="P42" loext:marker-style-name="T176"><text:span text:style-name="T121">Mitigazione effettiva</text:span><text:span text:style-name="T121"/></text:p>
          </table:table-cell>
          <table:table-cell table:style-name="Table12.G1" office:value-type="string">
            <text:p text:style-name="P42" loext:marker-style-name="T175"><text:span text:style-name="T106">PxI <text:s text:c="2"/></text:span><text:span text:style-name="T122">(monito-raggio)</text:span></text:p>
          </table:table-cell>
        </table:table-row>
        <table:table-row table:style-name="Table12.1">
          <table:table-cell table:style-name="Table12.A2" office:value-type="string">
            <text:p text:style-name="P43" loext:marker-style-name="T1"><text:span text:style-name="T156">PROCESSO 1</text:span><text:span text:style-name="T156"/></text:p>
          </table:table-cell>
          <table:table-cell table:style-name="Table12.B2" table:number-rows-spanned="4" office:value-type="string">
            <text:p text:style-name="P42" loext:marker-style-name="T1"><text:span text:style-name="T124">ALTO</text:span><text:span text:style-name="T124"/></text:p>
          </table:table-cell>
          <table:table-cell table:style-name="Table12.A2" office:value-type="string">
            <text:p text:style-name="P47" loext:marker-style-name="T101"/>
          </table:table-cell>
          <table:table-cell table:style-name="Table12.A2" office:value-type="string">
            <text:p text:style-name="P47" loext:marker-style-name="T101"/>
          </table:table-cell>
          <table:table-cell table:style-name="Table12.A2" office:value-type="string">
            <text:p text:style-name="P47" loext:marker-style-name="T101"/>
          </table:table-cell>
          <table:table-cell table:style-name="Table12.F2" table:number-rows-spanned="4" office:value-type="string">
            <text:p text:style-name="P42" loext:marker-style-name="T1"><text:span text:style-name="T124">MEDIO</text:span><text:span text:style-name="T124"/></text:p>
          </table:table-cell>
          <table:table-cell table:style-name="Table12.A2" office:value-type="string">
            <text:p text:style-name="P47" loext:marker-style-name="T101"/>
          </table:table-cell>
          <table:table-cell table:style-name="Table12.A2" office:value-type="string">
            <text:p text:style-name="P48" loext:marker-style-name="T101"/>
          </table:table-cell>
          <table:table-cell table:style-name="Table12.B2" table:number-rows-spanned="4" office:value-type="string">
            <text:p text:style-name="P42" loext:marker-style-name="T1"><text:span text:style-name="T124">ALTO</text:span><text:span text:style-name="T124"/></text:p>
          </table:table-cell>
        </table:table-row>
        <table:table-row table:style-name="Table12.1">
          <table:table-cell table:style-name="Table12.A2" office:value-type="string">
            <text:p text:style-name="P43" loext:marker-style-name="T1"><text:span text:style-name="T177">Rischio 1</text:span><text:span text:style-name="T177"/></text:p>
          </table:table-cell>
          <table:covered-table-cell table:style-name="Table12.A2"/>
          <table:table-cell table:style-name="Table12.C3" office:value-type="string">
            <text:p text:style-name="P42" loext:marker-style-name="T1"><text:span text:style-name="T124">ALTO</text:span><text:span text:style-name="T124"/></text:p>
          </table:table-cell>
          <table:table-cell table:style-name="Table12.A2" office:value-type="string">
            <text:p text:style-name="P43" loext:marker-style-name="T1"><text:span text:style-name="T101">2G</text:span><text:span text:style-name="T101"/></text:p>
          </table:table-cell>
          <table:table-cell table:style-name="Table12.E3" office:value-type="string">
            <text:p text:style-name="P42" loext:marker-style-name="T1"><text:span text:style-name="T124">MEDIO</text:span><text:span text:style-name="T124"/></text:p>
          </table:table-cell>
          <table:covered-table-cell table:style-name="Table12.A2"/>
          <table:table-cell table:style-name="Table12.A2" office:value-type="string">
            <text:p text:style-name="P43" loext:marker-style-name="T1"><text:span text:style-name="T130">SI + SI</text:span><text:span text:style-name="T130"/></text:p>
          </table:table-cell>
          <table:table-cell table:style-name="Table12.H3" office:value-type="string">
            <text:p text:style-name="P20">MEDIO</text:p>
          </table:table-cell>
          <table:covered-table-cell table:style-name="Table12.A2"/>
        </table:table-row>
        <table:table-row table:style-name="Table12.1">
          <table:table-cell table:style-name="Table12.A2" office:value-type="string">
            <text:p text:style-name="P43" loext:marker-style-name="T1"><text:span text:style-name="T177">Rischio 2</text:span><text:span text:style-name="T177"/></text:p>
          </table:table-cell>
          <table:covered-table-cell table:style-name="Table12.A2"/>
          <table:table-cell table:style-name="Table12.C4" office:value-type="string">
            <text:p text:style-name="P42" loext:marker-style-name="T1"><text:span text:style-name="T124">ALTO</text:span><text:span text:style-name="T124"/></text:p>
          </table:table-cell>
          <table:table-cell table:style-name="Table12.A2" office:value-type="string">
            <text:p text:style-name="P43" loext:marker-style-name="T1"><text:span text:style-name="T101">1S</text:span><text:span text:style-name="T101"/></text:p>
          </table:table-cell>
          <table:table-cell table:style-name="Table12.E4" office:value-type="string">
            <text:p text:style-name="P42" loext:marker-style-name="T1"><text:span text:style-name="T124">MEDIO</text:span><text:span text:style-name="T124"/></text:p>
          </table:table-cell>
          <table:covered-table-cell table:style-name="Table12.A2"/>
          <table:table-cell table:style-name="Table12.A2" office:value-type="string">
            <text:p text:style-name="P43" loext:marker-style-name="T1"><text:span text:style-name="T130">NO</text:span><text:span text:style-name="T130"/></text:p>
          </table:table-cell>
          <table:table-cell table:style-name="Table12.H4" office:value-type="string">
            <text:p text:style-name="P42" loext:marker-style-name="T1"><text:span text:style-name="T124">ALTO</text:span><text:span text:style-name="T124"/></text:p>
          </table:table-cell>
          <table:covered-table-cell table:style-name="Table12.A2"/>
        </table:table-row>
        <table:table-row table:style-name="Table12.1">
          <table:table-cell table:style-name="Table12.A2" office:value-type="string">
            <text:p text:style-name="P43" loext:marker-style-name="T1"><text:span text:style-name="T177">Rischio 3</text:span><text:span text:style-name="T177"/></text:p>
          </table:table-cell>
          <table:covered-table-cell table:style-name="Table12.A2"/>
          <table:table-cell table:style-name="Table12.C5" office:value-type="string">
            <text:p text:style-name="P42" loext:marker-style-name="T1"><text:span text:style-name="T124">ALTO</text:span><text:span text:style-name="T124"/></text:p>
          </table:table-cell>
          <table:table-cell table:style-name="Table12.A2" office:value-type="string">
            <text:p text:style-name="P43" loext:marker-style-name="T1"><text:span text:style-name="T101">1G + 1S</text:span><text:span text:style-name="T101"/></text:p>
          </table:table-cell>
          <table:table-cell table:style-name="Table12.E5" office:value-type="string">
            <text:p text:style-name="P42" loext:marker-style-name="T1"><text:span text:style-name="T124">MEDIO</text:span><text:span text:style-name="T124"/></text:p>
          </table:table-cell>
          <table:covered-table-cell table:style-name="Table12.A2"/>
          <table:table-cell table:style-name="Table12.A2" office:value-type="string">
            <text:p text:style-name="P43" loext:marker-style-name="T1"><text:span text:style-name="T130">SI + NO</text:span><text:span text:style-name="T130"/></text:p>
          </table:table-cell>
          <table:table-cell table:style-name="Table12.H5" office:value-type="string">
            <text:p text:style-name="P42" loext:marker-style-name="T1"><text:span text:style-name="T124">ALTO</text:span><text:span text:style-name="T124"/></text:p>
          </table:table-cell>
          <table:covered-table-cell table:style-name="Table12.A2"/>
        </table:table-row>
        <table:table-row table:style-name="Table12.1">
          <table:table-cell table:style-name="Table12.A2" office:value-type="string">
            <text:p text:style-name="P43" loext:marker-style-name="T1"><text:span text:style-name="T156">PROCESSO 2</text:span><text:span text:style-name="T156"/></text:p>
          </table:table-cell>
          <table:table-cell table:style-name="Table12.F2" table:number-rows-spanned="3" office:value-type="string">
            <text:p text:style-name="P42" loext:marker-style-name="T1"><text:span text:style-name="T125">MEDIO</text:span><text:span text:style-name="T125"/></text:p>
          </table:table-cell>
          <table:table-cell table:style-name="Table12.A2" office:value-type="string">
            <text:p text:style-name="P47" loext:marker-style-name="T101"/>
          </table:table-cell>
          <table:table-cell table:style-name="Table12.A2" office:value-type="string">
            <text:p text:style-name="P47" loext:marker-style-name="T101"/>
          </table:table-cell>
          <table:table-cell table:style-name="Table12.A2" office:value-type="string">
            <text:p text:style-name="P47" loext:marker-style-name="T101"/>
          </table:table-cell>
          <table:table-cell table:style-name="Table12.F6" table:number-rows-spanned="3" office:value-type="string">
            <text:p text:style-name="P42" loext:marker-style-name="T1"><text:span text:style-name="T125">BASSO</text:span><text:span text:style-name="T125"/></text:p>
          </table:table-cell>
          <table:table-cell table:style-name="Table12.A2" office:value-type="string">
            <text:p text:style-name="P47" loext:marker-style-name="T101"/>
          </table:table-cell>
          <table:table-cell table:style-name="Table12.A2" office:value-type="string">
            <text:p text:style-name="P20" loext:marker-style-name="T124"/>
          </table:table-cell>
          <table:table-cell table:style-name="Table12.F6" table:number-rows-spanned="3" office:value-type="string">
            <text:p text:style-name="P42" loext:marker-style-name="T1"><text:span text:style-name="T124">BASSO</text:span><text:span text:style-name="T124"/></text:p>
          </table:table-cell>
        </table:table-row>
        <table:table-row table:style-name="Table12.1">
          <table:table-cell table:style-name="Table12.A2" office:value-type="string">
            <text:p text:style-name="P43" loext:marker-style-name="T1"><text:span text:style-name="T177">Rischio 4</text:span><text:span text:style-name="T177"/></text:p>
          </table:table-cell>
          <table:covered-table-cell table:style-name="Table12.A2"/>
          <table:table-cell table:style-name="Table12.C7" office:value-type="string">
            <text:p text:style-name="P42" loext:marker-style-name="T1"><text:span text:style-name="T124">MEDIO</text:span><text:span text:style-name="T124"/></text:p>
          </table:table-cell>
          <table:table-cell table:style-name="Table12.A2" office:value-type="string">
            <text:p text:style-name="P43" loext:marker-style-name="T1"><text:span text:style-name="T101">3G</text:span><text:span text:style-name="T101"/></text:p>
          </table:table-cell>
          <table:table-cell table:style-name="Table12.E7" office:value-type="string">
            <text:p text:style-name="P42" loext:marker-style-name="T1"><text:span text:style-name="T124">BASSO</text:span><text:span text:style-name="T124"/></text:p>
          </table:table-cell>
          <table:covered-table-cell table:style-name="Table12.A2"/>
          <table:table-cell table:style-name="Table12.A2" office:value-type="string">
            <text:p text:style-name="P43" loext:marker-style-name="T1"><text:span text:style-name="T131">NO+SI+SI</text:span><text:span text:style-name="T131"/></text:p>
          </table:table-cell>
          <table:table-cell table:style-name="Table12.H7" office:value-type="string">
            <text:p text:style-name="P42" loext:marker-style-name="T1"><text:span text:style-name="T124">BASSO</text:span><text:span text:style-name="T124"/></text:p>
          </table:table-cell>
          <table:covered-table-cell table:style-name="Table12.A2"/>
        </table:table-row>
        <table:table-row table:style-name="Table12.1">
          <table:table-cell table:style-name="Table12.A2" office:value-type="string">
            <text:p text:style-name="P43" loext:marker-style-name="T1"><text:span text:style-name="T177">Rischio 5</text:span><text:span text:style-name="T177"/></text:p>
          </table:table-cell>
          <table:covered-table-cell table:style-name="Table12.A2"/>
          <table:table-cell table:style-name="Table12.C8" office:value-type="string">
            <text:p text:style-name="P42" loext:marker-style-name="T1"><text:span text:style-name="T124">MEDIO</text:span><text:span text:style-name="T124"/></text:p>
          </table:table-cell>
          <table:table-cell table:style-name="Table12.A2" office:value-type="string">
            <text:p text:style-name="P43" loext:marker-style-name="T1"><text:span text:style-name="T101">1G + 1S</text:span><text:span text:style-name="T101"/></text:p>
          </table:table-cell>
          <table:table-cell table:style-name="Table12.E8" office:value-type="string">
            <text:p text:style-name="P42" loext:marker-style-name="T1"><text:span text:style-name="T124">BASSO</text:span><text:span text:style-name="T124"/></text:p>
          </table:table-cell>
          <table:covered-table-cell table:style-name="Table12.A2"/>
          <table:table-cell table:style-name="Table12.A2" office:value-type="string">
            <text:p text:style-name="P43" loext:marker-style-name="T1"><text:span text:style-name="T130">NO + SI</text:span><text:span text:style-name="T130"/></text:p>
          </table:table-cell>
          <table:table-cell table:style-name="Table12.H8" office:value-type="string">
            <text:p text:style-name="P42" loext:marker-style-name="T1"><text:span text:style-name="T124">BASSO</text:span><text:span text:style-name="T124"/></text:p>
          </table:table-cell>
          <table:covered-table-cell table:style-name="Table12.A2"/>
        </table:table-row>
        <table:table-row table:style-name="Table12.1">
          <table:table-cell table:style-name="Table12.A2" office:value-type="string">
            <text:p text:style-name="P43" loext:marker-style-name="T1"><text:span text:style-name="T101">...</text:span><text:span text:style-name="T101"/></text:p>
          </table:table-cell>
          <table:table-cell table:style-name="Table12.A2" office:value-type="string">
            <text:p text:style-name="P42" loext:marker-style-name="T1"><text:span text:style-name="T101">(a)</text:span><text:span text:style-name="T101"/></text:p>
          </table:table-cell>
          <table:table-cell table:style-name="Table12.A2" office:value-type="string">
            <text:p text:style-name="P42" loext:marker-style-name="T1"><text:span text:style-name="T101">(b)</text:span><text:span text:style-name="T101"/></text:p>
          </table:table-cell>
          <table:table-cell table:style-name="Table12.A2" office:value-type="string">
            <text:p text:style-name="P42" loext:marker-style-name="T1"><text:span text:style-name="T101">(c)</text:span><text:span text:style-name="T101"/></text:p>
          </table:table-cell>
          <table:table-cell table:style-name="Table12.A2" office:value-type="string">
            <text:p text:style-name="P42" loext:marker-style-name="T1"><text:span text:style-name="T101">(d)</text:span><text:span text:style-name="T101"/></text:p>
          </table:table-cell>
          <table:table-cell table:style-name="Table12.A2" office:value-type="string">
            <text:p text:style-name="P42" loext:marker-style-name="T1"><text:span text:style-name="T101">(e)</text:span><text:span text:style-name="T101"/></text:p>
          </table:table-cell>
          <table:table-cell table:style-name="Table12.A2" office:value-type="string">
            <text:p text:style-name="P42" loext:marker-style-name="T1"><text:span text:style-name="T101">(f)</text:span><text:span text:style-name="T101"/></text:p>
          </table:table-cell>
          <table:table-cell table:style-name="Table12.A2" office:value-type="string">
            <text:p text:style-name="P42" loext:marker-style-name="T1"><text:span text:style-name="T124">(g)</text:span><text:span text:style-name="T124"/></text:p>
          </table:table-cell>
          <table:table-cell table:style-name="Table12.A2" office:value-type="string">
            <text:p text:style-name="P42" loext:marker-style-name="T1"><text:span text:style-name="T101">(h)</text:span><text:span text:style-name="T101"/></text:p>
          </table:table-cell>
        </table:table-row>
        <table:table-row table:style-name="Table12.1">
          <table:table-cell table:style-name="Table12.A10" table:number-columns-spanned="6" office:value-type="string">
            <text:p text:style-name="P53" loext:marker-style-name="T1"><text:span text:style-name="T168">← <text:s/>REGISTRO ← <text:s text:c="4"/>|</text:span><text:span text:style-name="T168"/></text:p>
          </table:table-cell>
          <table:covered-table-cell/>
          <table:covered-table-cell/>
          <table:covered-table-cell/>
          <table:covered-table-cell/>
          <table:covered-table-cell/>
          <table:table-cell table:style-name="Table12.G10" table:number-columns-spanned="3" office:value-type="string">
            <text:p text:style-name="P42" loext:marker-style-name="T1"><text:span text:style-name="T168">→ MONITORAGGIO →</text:span><text:span text:style-name="T168"/></text:p>
          </table:table-cell>
          <table:covered-table-cell/>
          <table:covered-table-cell/>
        </table:table-row>
      </table:table>
      <text:p text:style-name="P239" loext:marker-style-name="T130"/>
      <text:p text:style-name="P240" loext:marker-style-name="T132"/>
      <text:p text:style-name="P12" loext:marker-style-name="T1"><text:span text:style-name="T134">La prima colonna (non etichettata), al posto dei macroprocessi e processi del Report PxI, elenca rispettivamente i processi e i loro rischi. </text:span><text:span text:style-name="T134"/></text:p>
      <text:p text:style-name="P12" loext:marker-style-name="T1"><text:span text:style-name="T134">Ogni processo ha già un valore calcolato del PxI (colonna </text:span><text:span text:style-name="T135">a</text:span><text:span text:style-name="T134">). </text:span></text:p>
      <text:p text:style-name="P12" loext:marker-style-name="T1"><text:span text:style-name="T134">Questo, effettuando un’assunzione legittima, viene assegnato ad ogni rischio; in altre parole, dal momento che il PxI complessivo del processo è TOT, si assume che ogni rischio del processo stesso sia pari a TOT; non si determina cioè un PxI specifico di ogni rischio, ma inizialmente si parte dal PxI generale, assumendo, in modo leggermente forzato ma comunque logicamente sensato, che il valore PxI di ogni rischio specifico sia pari al PxI generale. Questo valore viene chiamato, nella tabella, </text:span><text:span text:style-name="T135">“PxI spalmato” (o distribuito)</text:span><text:span text:style-name="T134">. La regola è quindi che ogni valore del PxI distribuito dev’essere uguale al PxI generale del processo.</text:span></text:p>
      <text:p text:style-name="P12" loext:marker-style-name="T1"><text:span text:style-name="T134">Successivamente, si ricavano le misure assegnate sul rischio nel contesto del processo. Nell’esempio, è stato previsto di assegnare 2 misure generiche sul Rischio 1, 1 misura specifica sul Rischio 2 e 1 misura generica e 1 specifica sul Rischio 3 (colonna </text:span><text:span text:style-name="T135">“Misure previste”</text:span><text:span text:style-name="T134">, o colonna </text:span><text:span text:style-name="T135">c</text:span><text:span text:style-name="T134">). </text:span></text:p>
      <text:p text:style-name="P12" loext:marker-style-name="T1"><text:span text:style-name="T134">Sulla base degli algoritmi già definiti nei paragrafi precedenti, queste misure comportano una riduzione del rischio, pari a 0,5 per ogni misura generica e pari a 1 per ogni misura specifica. Ciò si concretizza in una riduzione prevista del rischio (chiamata </text:span><text:span text:style-name="T135">“Mitigazione stimata”</text:span><text:span text:style-name="T134">) dipendente dalla quantità e dal tipo delle misure stesse (colonna </text:span><text:span text:style-name="T135">d</text:span><text:span text:style-name="T134">). </text:span></text:p>
      <text:p text:style-name="P12" loext:marker-style-name="T1"><text:span text:style-name="T134">A partire dai valori di mitigazione stimata di ogni rischio, si ricalcola un </text:span><text:span text:style-name="T135">PxI mitigato (stimato)</text:span><text:span text:style-name="T134"> tramite un algoritmo di ricalcolo (v. relativo paragrafo).</text:span></text:p>
      <text:p text:style-name="P12" loext:marker-style-name="T1"><text:span text:style-name="T134">Tutte queste colonne (</text:span><text:span text:style-name="T135">a – e</text:span><text:span text:style-name="T134">) sono relative alla parte di registrazione delle misure e assegnazione ai relativi rischi e processi.</text:span></text:p>
      <text:p text:style-name="P13" loext:marker-style-name="T1"><text:span text:style-name="T134">A seguire, nel report, possono essere previste colonne di monitoraggio <text:s/>(colonne </text:span><text:span text:style-name="T135">f – h</text:span><text:span text:style-name="T134">).</text:span></text:p>
      <text:p text:style-name="P12" loext:marker-style-name="T1"><text:span text:style-name="T134">In particolare, per ogni misura prevista, il monitoraggio risponde alla domanda: la misura prevista è stata applicata? Per ognuna di queste domande possono esservi 3 valori: vero, falso, indecidibile. Il terzo valore (indecidibile, o non determinabile) significa che non è stato possibile determinare se la misura sia stata applicata o meno, in quanto mancano alcune informazioni essenziali per la determinazione della risposta. Laddove le informazioni siano sufficienti, però, la risposta dev’essere: VERO, cioè la misura è stata applicata; oppure FALSO, cioè la misura non è stata applicata. Si valuterà in seguito come trattare eventuali applicazioni parziali della misura (Misura parzialmente applicata).</text:span><text:span text:style-name="T134"/></text:p>
      <text:p text:style-name="P12" loext:marker-style-name="T1"><text:span text:style-name="T134">La parte di monitoraggio, comunque, richiederà una sezione di analisi specifica, per cui al momento si rimanda a questo sviluppo ulteriore l’analisi dettagliata dei singoli casi.</text:span><text:span text:style-name="T134"/></text:p>
      <text:p text:style-name="P12" loext:marker-style-name="T1"><text:span text:style-name="T134"><text:s/></text:span><text:span text:style-name="T134"/></text:p>
      <text:list text:continue-numbering="true" text:style-name="WWNum1">
        <text:list-item>
          <text:list>
            <text:list-item>
              <text:list>
                <text:list-item>
                  <text:list>
                    <text:list-item>
                      <text:h text:style-name="P89" text:outline-level="4" loext:marker-style-name="T1"><text:bookmark-start text:name="__RefHeading___Toc3784_3254581194"/><text:span text:style-name="T1">4. TABELLA DELLE MISURE</text:span><text:bookmark-end text:name="__RefHeading___Toc3784_3254581194"/><text:span text:style-name="T1"/></text:h>
                    </text:list-item>
                    <text:list-item>
                      <text:p text:style-name="P242"><text:bookmark-start text:name="__RefHeading___Toc3786_3254581194"/>Per poter agevolmente consultare, attraverso una visualizzazione generale e al contempo sufficientemente analitica (ovvero avente una granularità non abbastanza fine da poter risalire alla singola misura e al singolo rischio al quale la misura stessa è stata applicata) <text:s/>si può partire da una visualizzazione che ricalca quella del “report strutture e rischi” (anche detto “tabella delle strutture”):<text:bookmark-end text:name="__RefHeading___Toc3786_3254581194"/></text:p>
                    </text:list-item>
                  </text:list>
                </text:list-item>
              </text:list>
            </text:list-item>
          </text:list>
        </text:list-item>
      </text:list>
      <text:p text:style-name="P260" loext:marker-style-name="T132"><draw:custom-shape text:anchor-type="char" draw:z-index="36" draw:name="Cornice33" draw:style-name="gr19" draw:text-style-name="P265" svg:width="17.59cm" svg:height="12.83cm" svg:x="0cm" svg:y="0.002cm"><text:p text:style-name="P28" loext:marker-style-name="T148"><text:span text:style-name="T86"><draw:frame draw:style-name="fr2" draw:name="Immagine65" text:anchor-type="as-char" svg:width="17.59cm" svg:height="11.919cm" draw:z-index="85"><draw:image xlink:href="Pictures/100000000000060600000415B6EB400F.png" xlink:type="simple" xlink:show="embed" xlink:actuate="onLoad" draw:mime-type="image/png"/></draw:frame></text:span><text:span text:style-name="T87">Figura </text:span><text:span text:style-name="T87"><text:sequence text:ref-name="refFigura25" text:name="Figura" text:formula="ooow:Figura+1" style:num-format="1">26</text:sequence></text:span><text:span text:style-name="T87">: Tabella delle struttu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61" loext:marker-style-name="T1"><text:soft-page-break/><text:span text:style-name="T134">Il contenuto delle colonne sarebbe modificato come segue:</text:span><text:span text:style-name="T134"/></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42" loext:marker-style-name="T1"><text:span text:style-name="T164">Macroprocesso</text:span><text:span text:style-name="T164"/></text:p>
          </table:table-cell>
          <table:table-cell table:style-name="Table13.A1" office:value-type="string">
            <text:p text:style-name="P42" loext:marker-style-name="T1"><text:span text:style-name="T164">Processo</text:span><text:span text:style-name="T164"/></text:p>
          </table:table-cell>
          <table:table-cell table:style-name="Table13.A1" office:value-type="string">
            <text:p text:style-name="P42" loext:marker-style-name="T1"><text:span text:style-name="T164">Rischi</text:span><text:span text:style-name="T164"/></text:p>
          </table:table-cell>
          <table:table-cell table:style-name="Table13.A1" office:value-type="string">
            <text:p text:style-name="P42" loext:marker-style-name="T1"><text:span text:style-name="T164">Misure</text:span><text:span text:style-name="T164"/></text:p>
          </table:table-cell>
          <table:table-cell table:style-name="Table13.A1" office:value-type="string">
            <text:p text:style-name="P42" loext:marker-style-name="T1"><text:span text:style-name="T164">PxI Stima</text:span><text:span text:style-name="T164"/></text:p>
          </table:table-cell>
          <table:table-cell table:style-name="Table13.A1" office:value-type="string">
            <text:p text:style-name="P42" loext:marker-style-name="T1"><text:span text:style-name="T164">PxI Monitoraggio</text:span><text:span text:style-name="T164"/></text:p>
          </table:table-cell>
        </table:table-row>
        <table:table-row table:style-name="Table13.1">
          <table:table-cell table:style-name="Table13.A2" office:value-type="string">
            <text:p text:style-name="P43" loext:marker-style-name="T1"><text:span text:style-name="T125">SUPPORTO PER LE ATTIVITA’ DI RICERCA</text:span><text:span text:style-name="T125"/></text:p>
          </table:table-cell>
          <table:table-cell table:style-name="Table13.B2" office:value-type="string">
            <text:p text:style-name="P42" loext:marker-style-name="T1"><text:span text:style-name="T125">Accesso al Dottorato (BASSO)</text:span><text:span text:style-name="T125"/></text:p>
          </table:table-cell>
          <table:table-cell table:style-name="Table13.C2" office:value-type="string">
            <text:list text:style-name="WWNum22">
              <text:list-item>
                <text:p text:style-name="P44" loext:marker-style-name="T1"><text:span text:style-name="T126">Assenza di adeguata pubblicità della selezione</text:span><text:span text:style-name="T126"/></text:p>
              </text:list-item>
              <text:list-item>
                <text:p text:style-name="P44" loext:marker-style-name="T1"><text:span text:style-name="T126">Conflitto di interesse tra candidati e commissari</text:span><text:span text:style-name="T126"/></text:p>
              </text:list-item>
              <text:list-item>
                <text:p text:style-name="P44" loext:marker-style-name="T1"><text:span text:style-name="T126">Eccessiva discrezionalità nella scelta del vincitore</text:span><text:span text:style-name="T126"/></text:p>
              </text:list-item>
              <text:list-item>
                <text:p text:style-name="P44" loext:marker-style-name="T1"><text:span text:style-name="T126">Inosservanza delle regole procedurali a garanzia della trasparenza e dell’imparzialità della selezione</text:span><text:span text:style-name="T126"/></text:p>
              </text:list-item>
              <text:list-item>
                <text:p text:style-name="P44" loext:marker-style-name="T1"><text:span text:style-name="T126"><text:s text:c="2"/>Irregolare composizione della commissione e mancato rispetto dell’art. 35 bis del D.Lgs. n. 165/2001</text:span><text:span text:style-name="T126"/></text:p>
              </text:list-item>
              <text:list-item>
                <text:p text:style-name="P44" loext:marker-style-name="T1"><text:span text:style-name="T126"><text:s text:c="2"/>Previsioni di requisiti di accesso “personalizzati” (cd Bandi fotografia)</text:span><text:span text:style-name="T126"/></text:p>
              </text:list-item>
            </text:list>
          </table:table-cell>
          <table:table-cell table:style-name="Table13.D2" office:value-type="string">
            <text:p text:style-name="P50" loext:marker-style-name="T125"/>
            <text:list text:continue-numbering="true" text:style-name="WWNum22">
              <text:list-item>
                <text:p text:style-name="P44" loext:marker-style-name="T1"><text:span text:style-name="T125">Misura 1</text:span><text:span text:style-name="T125"/></text:p>
              </text:list-item>
              <text:list-item>
                <text:p text:style-name="P44" loext:marker-style-name="T1"><text:span text:style-name="T125">Misura 2</text:span><text:span text:style-name="T125"/></text:p>
              </text:list-item>
              <text:list-item>
                <text:p text:style-name="P44" loext:marker-style-name="T1"><text:span text:style-name="T125">Misura 4</text:span><text:span text:style-name="T125"/></text:p>
              </text:list-item>
              <text:list-item>
                <text:p text:style-name="P44" loext:marker-style-name="T1"><text:span text:style-name="T125">Misura 23</text:span><text:span text:style-name="T125"/></text:p>
              </text:list-item>
            </text:list>
          </table:table-cell>
          <table:table-cell table:style-name="Table13.B2" office:value-type="string">
            <text:p text:style-name="P42" loext:marker-style-name="T1"><text:span text:style-name="T125">BASSO</text:span><text:span text:style-name="T125"/></text:p>
          </table:table-cell>
          <table:table-cell table:style-name="Table13.F2" office:value-type="string">
            <text:p text:style-name="P42" loext:marker-style-name="T1"><text:span text:style-name="T125">BASSO</text:span><text:span text:style-name="T125"/></text:p>
          </table:table-cell>
        </table:table-row>
        <table:table-row table:style-name="Table13.1">
          <table:table-cell table:style-name="Table13.A3" office:value-type="string">
            <text:p text:style-name="P43" loext:marker-style-name="T1"><text:span text:style-name="T125">AFFIDAMENTO DI LAVORI, SERVIZI E FORNITURE SOTTOSOGLIA</text:span><text:span text:style-name="T125"/></text:p>
          </table:table-cell>
          <table:table-cell table:style-name="Table13.B3" office:value-type="string">
            <text:p text:style-name="P42" loext:marker-style-name="T1"><text:span text:style-name="T125">Affidamento e stipula del contratto</text:span><text:span text:style-name="T125"/></text:p>
            <text:p text:style-name="P42" loext:marker-style-name="T1"><text:span text:style-name="T125">(MEDIO)</text:span><text:span text:style-name="T125"/></text:p>
          </table:table-cell>
          <table:table-cell table:style-name="Table13.C3" office:value-type="string">
            <text:list text:style-name="WWNum23">
              <text:list-item>
                <text:p text:style-name="P45" loext:marker-style-name="T1"><text:span text:style-name="T126"><text:s text:c="2"/>Assenza di rotazione degli operatori economici consultati o chiamati</text:span><text:span text:style-name="T126"/></text:p>
              </text:list-item>
              <text:list-item>
                <text:p text:style-name="P45" loext:marker-style-name="T1"><text:span text:style-name="T126">Verifica incompleta o non sufficientemente approfondita al fine di favorire un aggiudicatario privo dei requisiti richiesti dalla legge e dal bando</text:span><text:span text:style-name="T126"/></text:p>
              </text:list-item>
            </text:list>
          </table:table-cell>
          <table:table-cell table:style-name="Table13.D3" office:value-type="string">
            <text:p text:style-name="P50" loext:marker-style-name="T125"/>
            <text:list text:continue-numbering="true" text:style-name="WWNum23">
              <text:list-item>
                <text:p text:style-name="P45" loext:marker-style-name="T1"><text:span text:style-name="T125">Misura 6</text:span><text:span text:style-name="T125"/></text:p>
              </text:list-item>
              <text:list-item>
                <text:p text:style-name="P45" loext:marker-style-name="T1"><text:span text:style-name="T125">Misura 12</text:span><text:span text:style-name="T125"/></text:p>
              </text:list-item>
              <text:list-item>
                <text:p text:style-name="P45" loext:marker-style-name="T1"><text:span text:style-name="T125">Misura 14</text:span><text:span text:style-name="T125"/></text:p>
              </text:list-item>
            </text:list>
            <text:p text:style-name="P51" loext:marker-style-name="T125"/>
          </table:table-cell>
          <table:table-cell table:style-name="Table13.E3" office:value-type="string">
            <text:p text:style-name="P42" loext:marker-style-name="T1"><text:span text:style-name="T125">BASSO</text:span><text:span text:style-name="T125"/></text:p>
          </table:table-cell>
          <table:table-cell table:style-name="Table13.F3" office:value-type="string">
            <text:p text:style-name="P42" loext:marker-style-name="T1"><text:span text:style-name="T125">MEDIO</text:span><text:span text:style-name="T125"/></text:p>
          </table:table-cell>
        </table:table-row>
        <table:table-row table:style-name="Table13.4">
          <table:table-cell table:style-name="Table13.A4" office:value-type="string">
            <text:p text:style-name="P43" loext:marker-style-name="T1"><text:span text:style-name="T125">AFFIDAMENTO DI LAVORI, SERVIZI E FORNITURE SOPRASOGLIA</text:span><text:span text:style-name="T125"/></text:p>
          </table:table-cell>
          <table:table-cell table:style-name="Table13.B4" office:value-type="string">
            <text:p text:style-name="P42" loext:marker-style-name="T1"><text:span text:style-name="T125">Aggiudicazione e stipula del contratto</text:span><text:span text:style-name="T125"/></text:p>
            <text:p text:style-name="P42" loext:marker-style-name="T1"><text:span text:style-name="T125">(MEDIO)</text:span><text:span text:style-name="T125"/></text:p>
          </table:table-cell>
          <table:table-cell table:style-name="Table13.C4" office:value-type="string">
            <text:list text:continue-numbering="true" text:style-name="WWNum23">
              <text:list-item>
                <text:p text:style-name="P45" loext:marker-style-name="T1"><text:span text:style-name="T126"><text:s text:c="2"/>Annullamento di procedure di gara al fine di evitare l’aggiudicazione ad un determinato operatore</text:span><text:span text:style-name="T126"/></text:p>
              </text:list-item>
              <text:list-item>
                <text:p text:style-name="P45" loext:marker-style-name="T1"><text:span text:style-name="T126">Limitazione delle possibilità di controllo da parte degli operatori o della collettività per carenza di informazioni pubbliche</text:span><text:span text:style-name="T126"/></text:p>
              </text:list-item>
              <text:list-item>
                <text:p text:style-name="P45" loext:marker-style-name="T1"><text:span text:style-name="T126">Verifica incompleta o non sufficientemente approfondita al fine di favorire un aggiudicatario privo dei requisiti richiesti dalla legge e dal bando</text:span><text:span text:style-name="T126"/></text:p>
              </text:list-item>
            </text:list>
          </table:table-cell>
          <table:table-cell table:style-name="Table13.D4" office:value-type="string">
            <text:p text:style-name="P50" loext:marker-style-name="T125"/>
            <text:list text:continue-numbering="true" text:style-name="WWNum23">
              <text:list-item>
                <text:p text:style-name="P45" loext:marker-style-name="T1"><text:span text:style-name="T125">Misura 8</text:span><text:span text:style-name="T125"/></text:p>
              </text:list-item>
              <text:list-item>
                <text:p text:style-name="P45" loext:marker-style-name="T1"><text:span text:style-name="T125">Misura 12</text:span><text:span text:style-name="T125"/></text:p>
              </text:list-item>
              <text:list-item>
                <text:p text:style-name="P45" loext:marker-style-name="T1"><text:span text:style-name="T125">Misura 14</text:span><text:span text:style-name="T125"/></text:p>
              </text:list-item>
              <text:list-item>
                <text:p text:style-name="P45" loext:marker-style-name="T1"><text:span text:style-name="T125">Misura 28</text:span><text:span text:style-name="T125"/></text:p>
              </text:list-item>
            </text:list>
          </table:table-cell>
          <table:table-cell table:style-name="Table13.B2" office:value-type="string">
            <text:p text:style-name="P42" loext:marker-style-name="T1"><text:span text:style-name="T125">BASSO</text:span><text:span text:style-name="T125"/></text:p>
          </table:table-cell>
          <table:table-cell table:style-name="Table13.F2" office:value-type="string">
            <text:p text:style-name="P42" loext:marker-style-name="T1"><text:span text:style-name="T125">BASSO</text:span><text:span text:style-name="T125"/></text:p>
          </table:table-cell>
        </table:table-row>
        <table:table-row table:style-name="Table13.1">
          <table:table-cell table:style-name="Table13.A5" office:value-type="string">
            <text:p text:style-name="P52" loext:marker-style-name="T133"/>
          </table:table-cell>
          <table:table-cell table:style-name="Table13.B5" office:value-type="string">
            <text:p text:style-name="P52" loext:marker-style-name="T133"/>
          </table:table-cell>
          <table:table-cell table:style-name="Table13.C5" office:value-type="string">
            <text:p text:style-name="P52" loext:marker-style-name="T133"/>
          </table:table-cell>
          <table:table-cell table:style-name="Table13.D5" office:value-type="string">
            <text:p text:style-name="P52" loext:marker-style-name="T133"/>
          </table:table-cell>
          <table:table-cell table:style-name="Table13.E5" office:value-type="string">
            <text:p text:style-name="P52" loext:marker-style-name="T133"/>
          </table:table-cell>
          <table:table-cell table:style-name="Table13.F5" office:value-type="string">
            <text:p text:style-name="P52" loext:marker-style-name="T133"/>
          </table:table-cell>
        </table:table-row>
        <table:table-row table:style-name="Table13.1">
          <table:table-cell table:style-name="Table13.A6" office:value-type="string">
            <text:p text:style-name="P42" loext:marker-style-name="T1"><text:span text:style-name="T131">a</text:span><text:span text:style-name="T131"/></text:p>
          </table:table-cell>
          <table:table-cell table:style-name="Table13.B6" office:value-type="string">
            <text:p text:style-name="P42" loext:marker-style-name="T1"><text:span text:style-name="T131">b</text:span><text:span text:style-name="T131"/></text:p>
          </table:table-cell>
          <table:table-cell table:style-name="Table13.C6" office:value-type="string">
            <text:p text:style-name="P42" loext:marker-style-name="T1"><text:span text:style-name="T131">c</text:span><text:span text:style-name="T131"/></text:p>
          </table:table-cell>
          <table:table-cell table:style-name="Table13.D6" office:value-type="string">
            <text:p text:style-name="P42" loext:marker-style-name="T1"><text:span text:style-name="T131">d</text:span><text:span text:style-name="T131"/></text:p>
          </table:table-cell>
          <table:table-cell table:style-name="Table13.E6" office:value-type="string">
            <text:p text:style-name="P42" loext:marker-style-name="T1"><text:span text:style-name="T131">e</text:span><text:span text:style-name="T131"/></text:p>
          </table:table-cell>
          <table:table-cell table:style-name="Table13.F6" office:value-type="string">
            <text:p text:style-name="P42" loext:marker-style-name="T1"><text:span text:style-name="T131">f</text:span><text:span text:style-name="T131"/></text:p>
          </table:table-cell>
        </table:table-row>
      </table:table>
      <text:p text:style-name="P260" loext:marker-style-name="T132"/>
      <text:p text:style-name="P261" loext:marker-style-name="T132"><text:span text:style-name="T134">Come si vede, <text:s/>vengono aggiunte le colonne da cui si evince come cambia il PxI del processo nelle intenzioni dell’anticorruzione (colonna e) e nel riscontro del monitoraggio (colonna f).</text:span><text:span text:style-name="T132"/></text:p>
      <text:list xml:id="list172214295768430" text:continue-list="list172213222055605" text:style-name="WWNum2">
        <text:list-item>
          <text:list>
            <text:list-item>
              <text:list>
                <text:list-item>
                  <text:h text:style-name="P65" text:outline-level="2" loext:marker-style-name="T1"><text:bookmark-start text:name="__RefHeading___Toc10351093021111112"/><text:span text:style-name="T1">IL MONITORAGGIO</text:span><text:bookmark-end text:name="__RefHeading___Toc10351093021111112"/><text:span text:style-name="T1"/></text:h>
                </text:list-item>
              </text:list>
            </text:list-item>
            <text:list-item>
              <text:h text:style-name="P62" text:outline-level="2" loext:marker-style-name="T33"/>
            </text:list-item>
          </text:list>
        </text:list-item>
      </text:list>
      <text:p text:style-name="P261" loext:marker-style-name="T1"><text:span text:style-name="T134">Finora si è parlato estesamente della stima della mitigazione, ovvero degli effetti di mitigazione legati alle misure, calcolati in base alle misure previste (cioè che si stima verranno applicate). </text:span><text:span text:style-name="T134"/></text:p>
      <text:p text:style-name="P261" loext:marker-style-name="T1"><text:span text:style-name="T134">Già sta emergendo però, in più punti, nelle viste mostrate e nei ragionamenti di analisi, la presenza di una o più colonne dedicate alle indicazioni dei valori del PxI rilevati a seguito della fase di monitoraggio. </text:span><text:span text:style-name="T134"/></text:p>
      <text:p text:style-name="P261" loext:marker-style-name="T1"><text:span text:style-name="T134">In parole povere, la differenza tra stima e monitoraggio della mitigazione è la seguente: </text:span><text:span text:style-name="T134"/></text:p>
      <text:list text:style-name="WWNum31">
        <text:list-item>
          <text:p text:style-name="P262" loext:marker-style-name="T1"><text:span text:style-name="T134">la stima della mitigazione è il valore del PxI che si otterrebbe se le misure previste fossero applicate;</text:span><text:span text:style-name="T134"/></text:p>
        </text:list-item>
        <text:list-item>
          <text:p text:style-name="P262" loext:marker-style-name="T1"><text:span text:style-name="T134">il monitoraggio della mitigazione è il valore del PxI che risulta ottenuto a seguito dell’applicazione delle misure che effettivamente sono risultate applicate.</text:span><text:span text:style-name="T134"/></text:p>
        </text:list-item>
      </text:list>
      <text:p text:style-name="P261" loext:marker-style-name="T1"><text:span text:style-name="T134">Approfondiamo quindi ora il significato e l’ingegnerizzazione di questa fase ulteriore gestita dal software, ovvero la fase di monitoraggio delle misure.</text:span><text:span text:style-name="T134"/></text:p>
      <text:p text:style-name="P197" loext:marker-style-name="T77"/>
      <text:list xml:id="list172213686023355" text:continue-list="list172214307059976" text:style-name="WWNum98">
        <text:list-item>
          <text:list>
            <text:list-item>
              <text:list>
                <text:list-item>
                  <text:h text:style-name="P78" text:outline-level="3" loext:marker-style-name="T1"><text:bookmark-start text:name="__RefHeading___Toc10351093021111111_Copy"/><text:span text:style-name="T26">I NUOVI ATTORI</text:span><text:bookmark-end text:name="__RefHeading___Toc10351093021111111_Copy"/><text:span text:style-name="T26"/></text:h>
                </text:list-item>
              </text:list>
            </text:list-item>
          </text:list>
        </text:list-item>
      </text:list>
      <text:p text:style-name="P10" loext:marker-style-name="T1"><text:span text:style-name="T33">Le entità che caratterizzano questa fase di monitoraggio, atta a individuare quali delle misure richieste sono state effettivamente applicate, sono, oltre al già accennato indicatore di monitoraggio:</text:span><text:span text:style-name="T33"/></text:p>
      <text:list text:style-name="WWNum55">
        <text:list-item>
          <text:list>
            <text:list-item>
              <text:list>
                <text:list-item>
                  <text:list>
                    <text:list-item>
                      <text:h text:style-name="P94" text:outline-level="4"><text:bookmark-start text:name="__RefHeading___Toc4036_2171737923_Copy_1"/>la fase di attuazione<text:bookmark-end text:name="__RefHeading___Toc4036_2171737923_Copy_1"/></text:h>
                    </text:list-item>
                    <text:list-item>
                      <text:h text:style-name="P93" text:outline-level="4" loext:marker-style-name="T1"><text:bookmark-start text:name="__RefHeading___Toc4040_2171737923_Copy_1"/><text:span text:style-name="T39">la misurazione</text:span><text:bookmark-end text:name="__RefHeading___Toc4040_2171737923_Copy_1"/><text:span text:style-name="T39"/></text:h>
                    </text:list-item>
                  </text:list>
                </text:list-item>
              </text:list>
            </text:list-item>
          </text:list>
        </text:list-item>
      </text:list>
      <text:p text:style-name="P117" loext:marker-style-name="T1"/>
      <text:list xml:id="list172214480767535" text:continue-list="list172213686023355" text:style-name="WWNum99">
        <text:list-item>
          <text:list>
            <text:list-item>
              <text:list>
                <text:list-item>
                  <text:h text:style-name="P79" text:outline-level="3" loext:marker-style-name="T1"><text:bookmark-start text:name="__RefHeading___Toc1035109302111111113"/><text:span text:style-name="T26">L’INDICATORE DI MONITORAGGIO</text:span><text:bookmark-end text:name="__RefHeading___Toc1035109302111111113"/><text:span text:style-name="T26"/></text:h>
                </text:list-item>
              </text:list>
            </text:list-item>
          </text:list>
        </text:list-item>
      </text:list>
      <text:p text:style-name="P139" loext:marker-style-name="T1"><text:span text:style-name="T33">L’indicatore di monitoraggio permette di quantificare la natura e la quantità di interventi necessari per raggiungere un determinato obiettivo, il quale a sua volta risulta indicativo dell’applicazione della misura.</text:span><text:span text:style-name="T33"/></text:p>
      <text:p text:style-name="P138" loext:marker-style-name="T1"><text:span text:style-name="T33">Gli indicatori di monitoraggio sono oggetti attinenti alla fase di </text:span><text:span text:style-name="T34">monitoraggio</text:span><text:span text:style-name="T33"> del rischio.</text:span></text:p>
      <text:p text:style-name="P10" loext:marker-style-name="T1"><text:span text:style-name="T57">Il software [ROL], fino a circa la versione 2.0 (vale a dire nei primi circa 100 deploy del software), è stato focalizzato:</text:span><text:span text:style-name="T57"/></text:p>
      <text:list text:style-name="WWNum28">
        <text:list-item>
          <text:p text:style-name="P160" loext:marker-style-name="T1"><text:span text:style-name="T57">sulla </text:span><text:span text:style-name="T58">mappatura</text:span><text:span text:style-name="T57"> dei rischi, ovvero sulla raccolta di dati, poi elaborati tramite specifici algoritmi, che hanno permesso di quantificare i livelli PxI dei singoli processi, </text:span></text:p>
        </text:list-item>
        <text:list-item>
          <text:p text:style-name="P160" loext:marker-style-name="T1"><text:span text:style-name="T57">e, successivamente, sulla </text:span><text:span text:style-name="T58">mitigazione</text:span><text:span text:style-name="T57"> dei rischi, ovvero sulla definizione ed applicazione delle misure di mitigazione ai rischi cui i processi sono esposti.</text:span></text:p>
        </text:list-item>
      </text:list>
      <text:p text:style-name="P10" loext:marker-style-name="T1"><text:span text:style-name="T57">Le misure assegnate ai rischi, tuttavia, sono soltanto una </text:span><text:span text:style-name="T61">stima</text:span><text:span text:style-name="T57"> di quanto deve essere messo in atto al fine di ridurre il rischio; tale stima è proposta dall’esperto anticorruttivo e presuppone che le misure </text:span><text:soft-page-break/><text:span text:style-name="T57">individuate dall’ufficio anticorruzione, e proposte alle varie strutture che si occupano dei processi, vengano in seguito effettivamente applicate.</text:span></text:p>
      <text:p text:style-name="P10" loext:marker-style-name="T1"><text:span text:style-name="T57">Tuttavia, individuare una serie di misure non significa che tali misure verranno effettivamente messe in atto dalle strutture che presiedono il processo; </text:span><text:span text:style-name="T61">chiedere</text:span><text:span text:style-name="T57"> di applicarle è quindi soltanto una fase preliminare di gestione del livello di rischio corruttivo; bisogna, infatti, andare poi a </text:span><text:span text:style-name="T61">verificare</text:span><text:span text:style-name="T57"> se effettivamente le misure individuate sono state applicate dagli uffici competenti.</text:span></text:p>
      <text:p text:style-name="P117" loext:marker-style-name="T1"/>
      <text:p text:style-name="P10" loext:marker-style-name="T1"><text:span text:style-name="T57">In questo senso, la fase di stima corrisponde ai </text:span><text:span text:style-name="T61">desiderata</text:span><text:span text:style-name="T57"> e richiede costruzioni ipotetiche: </text:span><text:span text:style-name="T62">se</text:span><text:span text:style-name="T61"> le misure individuate al tempo </text:span><text:span text:style-name="T64">t</text:span><text:span text:style-name="T61"> </text:span><text:span text:style-name="T62">fossero</text:span><text:span text:style-name="T61"> state applicate al tempo </text:span><text:span text:style-name="T64">t + 1</text:span><text:span text:style-name="T61">, </text:span><text:span text:style-name="T62">allora</text:span><text:span text:style-name="T61"> il livello del PxI di tale e talatro processo </text:span><text:span text:style-name="T62">sarebbero</text:span><text:span text:style-name="T61"> cambiati dal tempo </text:span><text:span text:style-name="T64">t</text:span><text:span text:style-name="T61"> al tempo </text:span><text:span text:style-name="T64">t + 1</text:span><text:span text:style-name="T61"> in questo range.</text:span></text:p>
      <text:p text:style-name="P10" loext:marker-style-name="T1"><text:span text:style-name="T141">Il fatto che il criterio di riduzione sia scientificamente fondato ed attendibile (ovvero, applicando le stesse misure agli stessi livelli di rischio si ottengono sempre gli stessi risultati) non significa automaticamente che le misure individuate dagli esperti dell’anticorruzione siano state effettivamente applicate!</text:span><text:span text:style-name="T141"/></text:p>
      <text:p text:style-name="P10" loext:marker-style-name="T1"><text:span text:style-name="T59">Occorre quindi una fase di </text:span><text:span text:style-name="T60">monitoraggio</text:span><text:span text:style-name="T59">, che prevede di verificare cosa è effettivamente accaduto.</text:span></text:p>
      <text:p text:style-name="P10" loext:marker-style-name="T1"><text:span text:style-name="T59">Ora, questa fase </text:span><text:span text:style-name="T60">non può</text:span><text:span text:style-name="T59"> consistere semplicisticamente nel chiedere alle strutture: </text:span><text:span text:style-name="T61">“Tu hai poi applicato la misura X e la misura Y? Oppure non se ne è fatto più nulla?”</text:span><text:span text:style-name="T59"> Per meglio dire, un monitoraggio di questo genere sarebbe possibile ma al contempo risulterebbe troppo banale e inaffidabile.</text:span></text:p>
      <text:p text:style-name="P10" loext:marker-style-name="T1"><text:span text:style-name="T59">Il modo corretto per verificare se una data misura è stata applicata consiste nell’assegnare, alla misura stessa, una serie di indicatori, che recano le indicazioni circa la baseline (lo stato dell’arte) ed il target (il risultato desiderato) che si vuole realizzare entro una certa data. Se tutti gli indicatori assegnati ad una misura, o un loro sottoinsieme scelto, hanno raggiunto il target, allora la misura è stata applicata. </text:span><text:span text:style-name="T59"/></text:p>
      <text:p text:style-name="P260" loext:marker-style-name="T132"/>
      <text:p text:style-name="P154" loext:marker-style-name="T1"><text:span text:style-name="T167">NOTA BENE</text:span><text:span text:style-name="T167"/></text:p>
      <text:p text:style-name="P155" loext:marker-style-name="T1"><text:span text:style-name="T20">Il criterio di applicabilità della misura è opinabile: si può decidere, in modo maggiormente restrittivo, di utilizzare l’operatore logico AND, non l’operatore logico OR. Ciò implicherebbe che se anche un solo target non è stato pienamente raggiunto, allora la misura risulta non applicata. In questo senso non esiste una condizione di “misura parzialmente applicata”: o la misura è stata applicata (pieno raggiungimento di tutti i target) o non è stata applicata.</text:span><text:span text:style-name="T20"/></text:p>
      <text:p text:style-name="P155" loext:marker-style-name="T1"><text:span text:style-name="T20">Tuttavia, possono esistere criteri diversi, come quello di attenzionare uno specifico indicatore (“indicatore master”) che è quello che fa fede ai fini dell’applicazione della misura.</text:span><text:span text:style-name="T20"/></text:p>
      <text:p text:style-name="P2" loext:marker-style-name="T1"/>
      <text:p text:style-name="P12" loext:marker-style-name="T1"><text:span text:style-name="T1">L’indicatore di monitoraggio, quindi, è un oggetto che ha il duplice scopo di fornire una serie di informazioni:</text:span><text:span text:style-name="T1"/></text:p>
      <text:list text:style-name="WWNum25">
        <text:list-item>
          <text:p text:style-name="P161" loext:marker-style-name="T1"><text:span text:style-name="T1">situazione attuale (baseline)</text:span><text:span text:style-name="T1"/></text:p>
        </text:list-item>
        <text:list-item>
          <text:p text:style-name="P161" loext:marker-style-name="T1"><text:span text:style-name="T1">obiettivo (target)</text:span><text:span text:style-name="T1"/></text:p>
        </text:list-item>
      </text:list>
      <text:p text:style-name="P12" loext:marker-style-name="T1"><text:span text:style-name="T1">e di aggregare una serie di misurazioni (monitoraggi), che forniscono il valore effettivo, al momento della misurazione, dell’indicatore misurato.</text:span><text:span text:style-name="T1"/></text:p>
      <text:p text:style-name="P2" loext:marker-style-name="T1"/>
      <text:p text:style-name="P13"/>
      <text:p text:style-name="P154" loext:marker-style-name="T1"><text:span text:style-name="T167">NOTA BENE</text:span><text:span text:style-name="T167"/></text:p>
      <text:p text:style-name="P155" loext:marker-style-name="T1"><text:span text:style-name="T20">Bisogna stare attenti a non confondere l’</text:span><text:span text:style-name="T4">indicatore di monitoraggio</text:span><text:span text:style-name="T20">, che ha lo scopo di fornire un criterio da soddisfare per poter dire che la misura è stata applicata, <text:s/>con l’</text:span><text:span text:style-name="T4">indicatore di rischio</text:span><text:span text:style-name="T20">, che è un oggetto totalmente diverso e concorre al valore complessivo del PxI di un processo (v. parti iniziali dell’analisi).</text:span></text:p>
      <text:p text:style-name="P2" loext:marker-style-name="T1"/>
      <text:p text:style-name="P12" loext:marker-style-name="T1"><text:span text:style-name="T1">Un indicatore di monitoraggio ha quindi una serie di attributi:</text:span><text:span text:style-name="T1"/></text:p>
      <text:list text:style-name="WWNum30">
        <text:list-item>
          <text:p text:style-name="P162" loext:marker-style-name="T1"><text:span text:style-name="T1">un id</text:span><text:span text:style-name="T1"/></text:p>
        </text:list-item>
      </text:list>
      <text:list text:style-name="WWNum26">
        <text:list-item>
          <text:p text:style-name="P163" loext:marker-style-name="T1"><text:span text:style-name="T1">un tipo (on/off | quantitativo | percentuale)</text:span><text:span text:style-name="T1"/></text:p>
        </text:list-item>
        <text:list-item>
          <text:p text:style-name="P163" loext:marker-style-name="T1"><text:span text:style-name="T1">uno stato (aperto | chiuso)</text:span><text:span text:style-name="T1"/></text:p>
        </text:list-item>
        <text:list-item>
          <text:p text:style-name="P163" loext:marker-style-name="T1"><text:span text:style-name="T1">un nome</text:span><text:span text:style-name="T1"/></text:p>
        </text:list-item>
        <text:list-item>
          <text:p text:style-name="P163" loext:marker-style-name="T1"><text:span text:style-name="T1">una descrizione</text:span><text:span text:style-name="T1"/></text:p>
        </text:list-item>
        <text:list-item>
          <text:p text:style-name="P163" loext:marker-style-name="T1"><text:span text:style-name="T1">una baseline + data baseline</text:span><text:span text:style-name="T1"/></text:p>
        </text:list-item>
        <text:list-item>
          <text:p text:style-name="P163" loext:marker-style-name="T1"><text:span text:style-name="T1">un target + data target</text:span><text:span text:style-name="T1"/></text:p>
        </text:list-item>
        <text:list-item>
          <text:p text:style-name="P163" loext:marker-style-name="T1"><text:span text:style-name="T1">data ultimo aggiornamento</text:span><text:span text:style-name="T1"/></text:p>
        </text:list-item>
      </text:list>
      <text:p text:style-name="P122" loext:marker-style-name="T1"/>
      <text:p text:style-name="P12" loext:marker-style-name="T1"><text:span text:style-name="T1">Inoltre, nell’ottica del monitoraggio effettuato attraverso il controllo di un indicatore “primario” più importante degli altri, l’indicatore di monitoraggio avrà anche l’attributo</text:span><text:span text:style-name="T1"/></text:p>
      <text:list text:style-name="WWNum56">
        <text:list-item>
          <text:p text:style-name="P164">indicatore master</text:p>
        </text:list-item>
      </text:list>
      <text:p text:style-name="P12">che può assumere un valore vero o falso.</text:p>
      <text:p text:style-name="P12"/>
      <text:p text:style-name="P12" loext:marker-style-name="T1"><text:span text:style-name="T1">Un indicatore ha ovviamente una serie di relazioni</text:span><text:span text:style-name="T1"/></text:p>
      <text:list text:style-name="WWNum27">
        <text:list-item>
          <text:p text:style-name="P165" loext:marker-style-name="T1"><text:span text:style-name="T1">da un lato con la misura</text:span><text:span text:style-name="T1"/></text:p>
        </text:list-item>
        <text:list-item>
          <text:p text:style-name="P165" loext:marker-style-name="T1"><text:span text:style-name="T1">dall’altro con la misurazione (monitoraggio).</text:span><text:span text:style-name="T1"/></text:p>
        </text:list-item>
      </text:list>
      <text:p text:style-name="P12" loext:marker-style-name="T1"><text:span text:style-name="T1">La relazione con la misura non è diretta, ma mediata dalla fase di attuazione della misura stessa; introduciamo, quindi, questo ulteriore livello di descrizione, che bisogna inserire ora nel contesto del monitoraggio.</text:span><text:span text:style-name="T1"/></text:p>
      <text:p text:style-name="P2" loext:marker-style-name="T1"/>
      <text:list xml:id="list172213437779690" text:continue-list="list172214480767535" text:style-name="WWNum100">
        <text:list-item>
          <text:list>
            <text:list-item>
              <text:list>
                <text:list-item>
                  <text:h text:style-name="P80" text:outline-level="3" loext:marker-style-name="T1"><text:bookmark-start text:name="__RefHeading___Toc10351093021111111132"/><text:span text:style-name="T26">LA FASE DI ATTUAZIONE</text:span><text:bookmark-end text:name="__RefHeading___Toc10351093021111111132"/><text:span text:style-name="T26"/></text:h>
                </text:list-item>
              </text:list>
            </text:list-item>
          </text:list>
        </text:list-item>
      </text:list>
      <text:p text:style-name="P136" loext:marker-style-name="T1"><text:span text:style-name="T1">La fase di attuazione di una misura non è altro che un descrittore interno alla misura che può essere collegato ad un indicatore di monitoraggio. Quando si effettua quindi una misurazione di un indicatore, si sta misurando la realizzazione della fase di attuazione collegata alla misura.</text:span><text:span text:style-name="T1"/></text:p>
      <text:p text:style-name="P2" loext:marker-style-name="T1"/>
      <text:p text:style-name="P12" loext:marker-style-name="T1"><text:span text:style-name="T1">Una fase di attuazione ha solo:</text:span><text:span text:style-name="T1"/></text:p>
      <text:list text:style-name="WWNum29">
        <text:list-item>
          <text:p text:style-name="P166" loext:marker-style-name="T1"><text:span text:style-name="T1">un id</text:span><text:span text:style-name="T1"/></text:p>
        </text:list-item>
        <text:list-item>
          <text:p text:style-name="P166" loext:marker-style-name="T1"><text:span text:style-name="T1">un nome</text:span><text:span text:style-name="T1"/></text:p>
        </text:list-item>
        <text:list-item>
          <text:p text:style-name="P166" loext:marker-style-name="T1"><text:span text:style-name="T1">un ordinale</text:span><text:span text:style-name="T1"/></text:p>
        </text:list-item>
        <text:list-item>
          <text:p text:style-name="P166" loext:marker-style-name="T1"><text:span text:style-name="T1">una data di inserimento (da sistema)</text:span><text:span text:style-name="T1"/></text:p>
        </text:list-item>
      </text:list>
      <text:p text:style-name="P119" loext:marker-style-name="T1"/>
      <text:p text:style-name="P12" loext:marker-style-name="T1"><text:span text:style-name="T1">Non è possibile collegare un indicatore di monitoraggio direttamente alla misura: ogni indicatore va collegato alla fase di attuazione della misura, secondo la seguente relazione:</text:span><text:span text:style-name="T1"/></text:p>
      <text:p text:style-name="P2" loext:marker-style-name="T1"/>
      <text:p text:style-name="P2" loext:marker-style-name="T1"/>
      <text:p text:style-name="P2" loext:marker-style-name="T1"><draw:custom-shape text:anchor-type="char" draw:z-index="80" draw:name="Cornice34" draw:style-name="gr1" draw:text-style-name="P265" svg:width="16.828cm" svg:height="5.931cm" svg:x="0.381cm" svg:y="0.002cm"><text:p text:style-name="P31" loext:marker-style-name="T88"><draw:frame draw:style-name="fr2" draw:name="Immagine66" text:anchor-type="as-char" svg:width="12.793cm" svg:height="3.919cm" draw:z-index="135"><draw:image xlink:href="Pictures/10000001000001E50000009F69159FEF.png" xlink:type="simple" xlink:show="embed" xlink:actuate="onLoad" draw:mime-type="image/png"/></draw:frame></text:p><text:p text:style-name="P29" loext:marker-style-name="T88"><text:span text:style-name="T88">Figura </text:span><text:span text:style-name="T88"><text:sequence text:ref-name="refFigura26" text:name="Figura" text:formula="ooow:Figura+1" style:num-format="1">27</text:sequence></text:span><text:span text:style-name="T88">: Schema E-R della relazione tra la fase di attuazione di una misura e un indicatore di monitoraggi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loext:marker-style-name="T1"/>
      <text:p text:style-name="P2" loext:marker-style-name="T1"/>
      <text:p text:style-name="P12" loext:marker-style-name="T1"><text:span text:style-name="T1">Come si legge dal diagramma:</text:span><text:span text:style-name="T1"/></text:p>
      <text:list text:style-name="WWNum33">
        <text:list-item>
          <text:p text:style-name="P167" loext:marker-style-name="T1"><text:span text:style-name="T1">Una fase di attuazione può non avere indicatori collegati, e deve avere al più un indicatore.</text:span><text:span text:style-name="T1"/></text:p>
        </text:list-item>
        <text:list-item>
          <text:p text:style-name="P167" loext:marker-style-name="T1"><text:span text:style-name="T1">Un indicatore deve avere una fase di attuazione collegata e può essere collegato al più a tale fase.</text:span><text:span text:style-name="T1"/></text:p>
        </text:list-item>
      </text:list>
      <text:p text:style-name="P2" loext:marker-style-name="T1"/>
      <text:p text:style-name="P12" loext:marker-style-name="T1"><text:span text:style-name="T1">Il criterio perché il monitoraggio sia soddisfatto (cioè la misura risulti applicata) dipende dall’algoritmo che si vuole implementare. </text:span><text:span text:style-name="T1"/></text:p>
      <text:list text:style-name="WWNum57">
        <text:list-item>
          <text:p text:style-name="P168" loext:marker-style-name="T179"><text:span text:style-name="T10">Criterio “stretto”:</text:span></text:p>
          <text:list>
            <text:list-item>
              <text:p text:style-name="P123">Se tutte le misurazioni degli indicatori collegati (tramite le fasi di attuazione) a una determinata misura hanno raggiunto l’obiettivo (il target), allora la misura è stata effettivamente applicata.</text:p>
            </text:list-item>
          </text:list>
        </text:list-item>
        <text:list-item>
          <text:p text:style-name="P168" loext:marker-style-name="T179"><text:span text:style-name="T10">Criterio “lasco”:</text:span></text:p>
          <text:list>
            <text:list-item>
              <text:p text:style-name="P123">Si considera solo l’indicatore “Master”: se l’ultima misurazione dell’indicatore Master ha raggiunto (o superato) il target, allora la misura è stata effettivamente applicata.</text:p>
            </text:list-item>
          </text:list>
        </text:list-item>
      </text:list>
      <text:p text:style-name="P2" loext:marker-style-name="T1"/>
      <text:p text:style-name="P2">Il criterio “lasco” è più semplice da gestire e implementare e potrebbe anche essere più attinente semanticamente alla realtà che si vuole rappresentare, perché spesso tra i vari indicatori ce n’è uno soltanto che fa veramente fede ai fini del monitoraggio. Si pensi, ad esempio, al monitoraggio della misura che consiste nell’applicazione di un regolamento; una prima fase sarà di analisi; una seconda di stesura del regolamento ma solo la fase di attuazione del regolamento, che ha come target “On”, è quella che ha senso controllare per verificare che la misura è stata effettivamente applicata.</text:p>
      <text:p text:style-name="P122" loext:marker-style-name="T1"/>
      <text:p text:style-name="P12"><text:soft-page-break/><text:span text:style-name="T1">Come si controlla se il target è stato raggiunto? Lo si fa tramite una misurazione. </text:span></text:p>
      <text:p text:style-name="P2">In questo senso occorre fare attenzione alla distinzione tra misura e misurazione.</text:p>
      <text:p text:style-name="P2" loext:marker-style-name="T1"/>
      <text:list xml:id="list172213157966072" text:continue-list="list172213437779690" text:style-name="WWNum101">
        <text:list-item>
          <text:list>
            <text:list-item>
              <text:list>
                <text:list-item>
                  <text:h text:style-name="P86" text:outline-level="3" loext:marker-style-name="T1"><text:bookmark-start text:name="__RefHeading___Toc10351093021111111131"/><text:span text:style-name="T26">MISURA E MISURAZIONE</text:span><text:bookmark-end text:name="__RefHeading___Toc10351093021111111131"/><text:span text:style-name="T26"/></text:h>
                </text:list-item>
              </text:list>
            </text:list-item>
          </text:list>
        </text:list-item>
      </text:list>
      <text:p text:style-name="P12" loext:marker-style-name="T1"><text:span text:style-name="T1">Mentre la misura di mitigazione del rischio è un oggetto applicato al rischio, per ridurre il valore del suo PxI (e, conseguentemente, di quello del processo cui il rischio è collegato), la misurazione (o attività di monitoraggio) è l’indicazione del livello raggiunto nel contesto di un determinato indicatore di monitoraggio collegato alla misura stessa. </text:span><text:span text:style-name="T1"/></text:p>
      <text:p text:style-name="P12" loext:marker-style-name="T1"><text:span text:style-name="T1">La misurazione è dunque un oggetto più semplice della misura e dell’indicatore: essa esprime soltanto il valore riscontrato rispetto a un dato indicatore in un certo tempo.</text:span><text:span text:style-name="T1"/></text:p>
      <text:p text:style-name="P2" loext:marker-style-name="T1"/>
      <text:p text:style-name="P12" loext:marker-style-name="T1"><text:span text:style-name="T1">Ad esempio, ipotizziamo di avere previsto una misura “formazione del personale aziendale” e che le sue fasi di attuazione siano:</text:span><text:span text:style-name="T1"/></text:p>
      <text:list text:style-name="WWNum34">
        <text:list-item>
          <text:p text:style-name="P169" loext:marker-style-name="T1"><text:span text:style-name="T1">preparazione dei corsi</text:span><text:span text:style-name="T1"/></text:p>
        </text:list-item>
        <text:list-item>
          <text:p text:style-name="P169" loext:marker-style-name="T1"><text:span text:style-name="T1">erogazione dei corsi</text:span><text:span text:style-name="T1"/></text:p>
        </text:list-item>
        <text:list-item>
          <text:p text:style-name="P169" loext:marker-style-name="T1"><text:span text:style-name="T1">follow-up e verifica</text:span><text:span text:style-name="T1"/></text:p>
        </text:list-item>
      </text:list>
      <text:p text:style-name="P12" loext:marker-style-name="T1"><text:span text:style-name="T1">Su ogni fase sarà previsto, in questo caso, uno specifico indicatore:</text:span><text:span text:style-name="T1"/></text:p>
      <text:list text:style-name="WWNum35">
        <text:list-item>
          <text:p text:style-name="P170" loext:marker-style-name="T1"><text:span text:style-name="T1">varo del piano di formazione dei corsi di formazione</text:span><text:span text:style-name="T1"/></text:p>
          <text:list>
            <text:list-item>
              <text:p text:style-name="P170" loext:marker-style-name="T1"><text:span text:style-name="T1">baseline: off</text:span><text:span text:style-name="T1"/></text:p>
            </text:list-item>
            <text:list-item>
              <text:p text:style-name="P170" loext:marker-style-name="T1"><text:span text:style-name="T1">target: on</text:span><text:span text:style-name="T1"/></text:p>
            </text:list-item>
          </text:list>
        </text:list-item>
        <text:list-item>
          <text:p text:style-name="P170" loext:marker-style-name="T1"><text:span text:style-name="T1">numero di corsi erogati</text:span><text:span text:style-name="T1"/></text:p>
          <text:list>
            <text:list-item>
              <text:p text:style-name="P170" loext:marker-style-name="T1"><text:span text:style-name="T1">baseline: 4</text:span><text:span text:style-name="T1"/></text:p>
            </text:list-item>
            <text:list-item>
              <text:p text:style-name="P170" loext:marker-style-name="T1"><text:span text:style-name="T1">target: 9</text:span><text:span text:style-name="T1"/></text:p>
            </text:list-item>
          </text:list>
        </text:list-item>
        <text:list-item>
          <text:p text:style-name="P170" loext:marker-style-name="T1"><text:span text:style-name="T1">percentuale di risposte esatte ai test di verifica</text:span><text:span text:style-name="T1"/></text:p>
          <text:list>
            <text:list-item>
              <text:p text:style-name="P170" loext:marker-style-name="T1"><text:span text:style-name="T1">baseline: 0%</text:span><text:span text:style-name="T1"/></text:p>
            </text:list-item>
            <text:list-item>
              <text:p text:style-name="P170" loext:marker-style-name="T1"><text:span text:style-name="T1">target: 70%</text:span><text:span text:style-name="T1"/></text:p>
            </text:list-item>
          </text:list>
        </text:list-item>
      </text:list>
      <text:p text:style-name="P12" loext:marker-style-name="T1"><text:span text:style-name="T1">Come si vede, ogni fase di attuazione diversa ha associato un diverso indicatore (diverso anche nel tipo: il primo è un On/Off, il secondo un numerico e il terzo un percentuale). </text:span><text:span text:style-name="T1"/></text:p>
      <text:p text:style-name="P12" loext:marker-style-name="T1"><text:span text:style-name="T1">Un vero e proprio piano di formazione interna (PFI) non era presente, per cui la baseline era OFF e il target è ON. </text:span><text:span text:style-name="T1"/></text:p>
      <text:p text:style-name="P12" loext:marker-style-name="T1"><text:span text:style-name="T1">Inoltre, il secondo indicatore indica quanti corsi devono essere attivati; attualmente, esistono già alcuni corsi di formazione interna (probabilmente quelli obbligatori per legge, tipo antincendio, sicurezza etc.) ma il target prevede l’attuazione di altri 5 nuovi corsi di formazione. Con ogni probabilità, sarà questo secondo l’indicatore “Master”, ovvero quello da attenzionare per capire se la misura è stata applicata.</text:span><text:span text:style-name="T1"/></text:p>
      <text:p text:style-name="P12" loext:marker-style-name="T1"><text:span text:style-name="T1">Infine, dopo aver fatto i corsi bisogna anche verificare che il personale abbia effettivamente appreso le informazioni; bisognerà quindi prevedere appositi momenti di verifica, che porteranno a una raccolta dati, una elaborazione dei risultati e un calcolo della percentuale di risposte giuste date sul totale delle risposte. La baseline, in questo caso, è 0% perché, non essendovi un Piano della formazione interna, strumenti del genere non erano stati posti in atto; l’anno seguente, la baseline non sarà più 0 ma sarà il </text:span><text:soft-page-break/><text:span text:style-name="T1">70% (nel caso in cui il target sia stato centrato) o un valore inferiore o superiore al 70% nel caso in cui i risultati si siano discostati dall’aspettativa.</text:span><text:span text:style-name="T1"/></text:p>
      <text:p text:style-name="P12" loext:marker-style-name="T1"><text:span text:style-name="T1">A questo punto, nella fase di monitoraggio, questi indicatori vanno misurati.</text:span><text:span text:style-name="T1"/></text:p>
      <text:p text:style-name="P12" loext:marker-style-name="T1"><text:span text:style-name="T1">La misurazione del primo darà un valore ON nel caso in cui il PFI sia stato realizzato oppure OFF nel caso in cui il lavoro non sia stato fatto.</text:span><text:span text:style-name="T1"/></text:p>
      <text:p text:style-name="P12" loext:marker-style-name="T1"><text:span text:style-name="T1">La misurazione del secondo, che partiva da un valore di 4, darà un valore specifico (p.es. 8) in corrispondenza di un determinato istante temporale.</text:span><text:span text:style-name="T1"/></text:p>
      <text:p text:style-name="P12" loext:marker-style-name="T1"><text:span text:style-name="T1">Analogamente, la misurazione del terzo darà un certo valore percentuale in funzione delle risposte esatte fornite dai partecipanti.</text:span><text:span text:style-name="T1"/></text:p>
      <text:p text:style-name="P2" loext:marker-style-name="T1"/>
      <text:p text:style-name="P12" loext:marker-style-name="T1"><text:span text:style-name="T1">Come si vede, la misurazione è un oggetto semplice perché è composta essenzialmente da un valore e da una data, oltre a campi nota aggiuntivi, in cui possono essere riportate note o giustificazioni, nel caso in cui la misurazione non corrisponda al target, e così via.</text:span><text:span text:style-name="T1"/></text:p>
      <text:p text:style-name="P12" loext:marker-style-name="T1"><text:span text:style-name="T1">Le misurazioni su un indicatore possono essere più di una: p.es. una fatta in itinere e una a fine scadenza, cioè in corrispondenza della data target.</text:span><text:span text:style-name="T1"/></text:p>
      <text:p text:style-name="P12" loext:marker-style-name="T1"><text:span text:style-name="T1">Il modello si può complicare specificando un flag di ultima misurazione che, se viene acceso dall’utente, mette l’indicatore in stato “chiuso” e non permette di aggiungere ulteriori misurazioni sull’indicatore stesso nella rilevazione corrente (questo meccanismo era stato implementato con successo in un precedente progetto).</text:span><text:span text:style-name="T1"/></text:p>
      <text:p text:style-name="P2" loext:marker-style-name="T1"/>
      <text:list xml:id="list172214639572380" text:continue-list="list172213157966072" text:style-name="WWNum102">
        <text:list-item>
          <text:list>
            <text:list-item>
              <text:list>
                <text:list-item>
                  <text:h text:style-name="P87" text:outline-level="3" loext:marker-style-name="T1"><text:bookmark-start text:name="__RefHeading___Toc4221_1544842616"/><text:span text:style-name="T26">COMPLETEZZA DEL MONITORAGGIO</text:span><text:bookmark-end text:name="__RefHeading___Toc4221_1544842616"/><text:span text:style-name="T26"/></text:h>
                </text:list-item>
              </text:list>
            </text:list-item>
          </text:list>
        </text:list-item>
      </text:list>
      <text:p text:style-name="P12" loext:marker-style-name="T1"><text:span text:style-name="T1">Può convenire stabilire convenzionalmente </text:span><text:span text:style-name="T6">quando</text:span><text:span text:style-name="T1"> una misura può essere considerata “parzialmente monitorata” vs. “compiutamente monitorata”; questo, infatti, permette di consultare più agevolmente i cruscotti del monitoraggio (p.es. accesa di una icona “verde” se la misura è monitorata, “rossa” altrimenti).</text:span></text:p>
      <text:p text:style-name="P2" loext:marker-style-name="T1"/>
      <text:p text:style-name="P12" loext:marker-style-name="T1"><text:span text:style-name="T1">Specifichiamo anzitutto che </text:span><text:span text:style-name="T10">non è detto che ogni misura scomposta in fasi debba avere necessariamente almeno un indicatore.</text:span><text:span text:style-name="T1"> Alcune misure, infatti, pur essendo teoricamente scomponibili in fasi, <text:s/>potrebbero essere molto complesse da misurare tramite indicatori associati alle fasi stesse. </text:span></text:p>
      <text:p text:style-name="P12" loext:marker-style-name="T1"><text:span text:style-name="T1">Facciamo un esempio: il controllo del “pantouflage” (</text:span><text:span text:style-name="T6">Verifica dell'acquisizione delle dichiarazioni sul pantouflage in caso di scioglimento del rapporto di lavoro dei soggetti interessati dalla previsione normativa</text:span><text:span text:style-name="T1">) può essere una misura scomponibile nelle seguenti fasi:</text:span></text:p>
      <text:p text:style-name="P12" loext:marker-style-name="T1"><text:span text:style-name="T1"><text:tab/>1ª fase: individuazione campione da analizzare</text:span><text:span text:style-name="T1"/></text:p>
      <text:p text:style-name="P12" loext:marker-style-name="T1"><text:span text:style-name="T1"><text:s/><text:tab/>2ª fase: acquisizione delle dichiarazioni </text:span><text:span text:style-name="T1"/></text:p>
      <text:p text:style-name="P12" loext:marker-style-name="T1"><text:span text:style-name="T1">In questo caso, si prevede di effettuare un controllo a campione sui soggetti che sono andati in pensione, chiedendogli se hanno stretto nuovi rapporti di lavoro con aziende che avevano già relazioni con l’ente in cui lavoravano prima della buonuscita. Questa è un’operazione abbastanza complessa, perché prevede di effettuare un campionamento casuale su una serie di soggetti che devono essere individuati tra quelli che lasciano l’ente. Inoltre, prevede di raccogliere le autocertificazioni dei soggetti stessi, che però non hanno più alcun rapporto con l’ente che sta effettuando le verifiche. Insomma, una </text:span><text:soft-page-break/><text:span text:style-name="T1">misura del genere potrebbe restare a lungo senza indicatori e non ha senso considerarla “non monitorata” ma piuttosto “non monitorabile”.</text:span><text:span text:style-name="T1"/></text:p>
      <text:p text:style-name="P12" loext:marker-style-name="T1"><text:span text:style-name="T1">Un’altra situazione potrebbe essere quella di una misura scomposta in fasi in cui non tutte le fasi hanno un indicatore associato. Anche questa situazione è legittima, perché non sempre ha senso misurare tutte le fasi di attuazione di una misura: in alcuni casi potrebbe aver senso misurare soltanto l’ultima fase, perché questa misurazione è sufficiente per stabilire se l’attuazione della misura si è realizzata o meno.</text:span><text:span text:style-name="T1"/></text:p>
      <text:p text:style-name="P2" loext:marker-style-name="T1"/>
      <text:p text:style-name="P12" loext:marker-style-name="T1"><text:span text:style-name="T1">I gradi di libertà dell’associazione tra fasi e indicatori sono quindi ampi, essendo ammissibili molteplici configurazioni fase-indicatore: </text:span><text:span text:style-name="T1"/></text:p>
      <text:list text:style-name="WWNum36">
        <text:list-item>
          <text:p text:style-name="P171" loext:marker-style-name="T1"><text:span text:style-name="T1">misure in cui ogni fase ha un indicatore</text:span><text:span text:style-name="T1"/></text:p>
        </text:list-item>
        <text:list-item>
          <text:p text:style-name="P171" loext:marker-style-name="T1"><text:span text:style-name="T1">misure in cui alcune fasi sono senza indicatore</text:span><text:span text:style-name="T1"/></text:p>
        </text:list-item>
        <text:list-item>
          <text:p text:style-name="P171" loext:marker-style-name="T1"><text:span text:style-name="T1">misure in cui nessuna fase ha un indicatore.</text:span><text:span text:style-name="T1"/></text:p>
        </text:list-item>
      </text:list>
      <text:p text:style-name="P2" loext:marker-style-name="T1"/>
      <text:p text:style-name="P172" loext:marker-style-name="T1"><text:span text:style-name="T10">Rispetto alla monitorabilità</text:span><text:span text:style-name="T1">, le misure di mitigazione del rischio possono essere classificate come:</text:span></text:p>
      <text:list text:style-name="WWNum32">
        <text:list-item>
          <text:p text:style-name="P173" loext:marker-style-name="T1"><text:span text:style-name="T2">Misura non dettagliata:</text:span><text:span text:style-name="T1"> misura senza dettagli monitoraggio, cioè senza fasi (e quindi, automaticamente, senza neanche indicatori, dal momento che un indicatore è collegato a una fase). </text:span></text:p>
        </text:list-item>
      </text:list>
      <text:p text:style-name="P174" loext:marker-style-name="T1"><text:span text:style-name="T1">Una misura può non avere dettagli di monitoraggio (scomposizione in fasi, obiettivo PIAO, indicatori); in tal caso è una misura inserita nel registro delle misure, la cui applicazione può essere prevista (in stima) ma la cui effettiva applicazione non è monitorabile.</text:span><text:span text:style-name="T1"/></text:p>
      <text:list text:continue-numbering="true" text:style-name="WWNum32">
        <text:list-item>
          <text:p text:style-name="P173" loext:marker-style-name="T1"><text:span text:style-name="T2">Misura non monitorabile:</text:span><text:span text:style-name="T1"> misura con fasi ma senza indicatori. </text:span></text:p>
        </text:list-item>
      </text:list>
      <text:p text:style-name="P174" loext:marker-style-name="T1"><text:span text:style-name="T1">Una misura può avere dettagli monitoraggio (scomposizione in fasi) ma può darsi che nessuna delle sue fasi abbia indicatori associati (esempio del “pantouflage”); in tal caso, ai fini del monitoraggio, non è molto diversa dalla misura dell’esempio precedente: è una misura con scomposizione in fasi ma comunque non è monitorabile. Per monitorarla bisogna inserire almeno un indicatore su una delle sue fasi.</text:span><text:span text:style-name="T1"/></text:p>
      <text:list text:continue-numbering="true" text:style-name="WWNum32">
        <text:list-item>
          <text:p text:style-name="P173" loext:marker-style-name="T1"><text:span text:style-name="T2">Misura monitorabile:</text:span><text:span text:style-name="T1"> misura con fasi e con almeno 1 indicatore.</text:span></text:p>
        </text:list-item>
      </text:list>
      <text:p text:style-name="P174" loext:marker-style-name="T1"><text:span text:style-name="T1">Una misura scomposta in fasi con almeno una fase collegata ad un indicatore. </text:span><text:span text:style-name="T1"/></text:p>
      <text:p text:style-name="P2" loext:marker-style-name="T1"/>
      <text:p text:style-name="P172" loext:marker-style-name="T1"><text:span text:style-name="T10">Rispetto alla completezza</text:span><text:span text:style-name="T1"> del monitoraggio, la misure di mitigazione del rischio possono essere:</text:span></text:p>
      <text:list text:continue-numbering="true" text:style-name="WWNum32">
        <text:list-item>
          <text:p text:style-name="P173" loext:marker-style-name="T1"><text:span text:style-name="T178">Misura non monitorabile:</text:span><text:span text:style-name="T153"> </text:span><text:span text:style-name="T18">una misura con fasi ma senza alcun indicatore. P.es. “pantouflage” è da considerare dettagliata (in fasi) ma non monitorabile.</text:span></text:p>
        </text:list-item>
        <text:list-item>
          <text:p text:style-name="P173" loext:marker-style-name="T1"><text:span text:style-name="T180">Misura parzialmente monitorata:</text:span><text:span text:style-name="T63"> una misura con fasi e indicatori ma in cui non tutti gli indicatori sono stati misurati (alcuni indicatori risultano ancora non misurati) o in cui l’indicatore “Master” non è stato misurato (nel caso del criterio “lasco” di monitoraggio).</text:span></text:p>
        </text:list-item>
        <text:list-item>
          <text:p text:style-name="P173" loext:marker-style-name="T1"><text:span text:style-name="T181">Misura totalmente monitorata:</text:span><text:span text:style-name="T1"> Una misura con fasi e indicatori (p.es. 2 fasi e 1 solo indicatore collegato alla 2</text:span><text:span text:style-name="T182">a</text:span><text:span text:style-name="T1"> fase) in cui tutti gli indicatori hanno ricevuto almeno una misurazione. <text:s/>Condizione necessaria e sufficiente affiché una misura possa essere considerata “totalmente monitorata” è che sia stato inserito almeno un indicatore su una delle fasi della misura e che lo stesso sia stato misurato almeno una volta.</text:span></text:p>
        </text:list-item>
      </text:list>
      <text:p text:style-name="P119" loext:marker-style-name="T1"/>
      <text:p text:style-name="P12" loext:marker-style-name="T1"><text:span text:style-name="T1">Come sottolineato più volte, ricordiamo che un indicatore di monitoraggio non è relazionato direttamente con la misura ma solo con una sua fase e aggiungiamo che, se è vero che una fase ha al più un indicatore, un indicatore può avere zero o molte misurazioni (v. Schema E-R riportato nella Figura seguente). </text:span><text:span text:style-name="T1"/></text:p>
      <text:p text:style-name="P2" loext:marker-style-name="T1"/>
      <text:p text:style-name="P2" loext:marker-style-name="T1"><draw:custom-shape text:anchor-type="char" draw:z-index="27" draw:name="Cornice35" draw:style-name="gr22" draw:text-style-name="P265" svg:width="17.59cm" svg:height="7.526cm" svg:x="0cm" svg:y="0.452cm"><text:p text:style-name="P29" loext:marker-style-name="T88"><text:span text:style-name="T86"><draw:frame draw:style-name="fr2" draw:name="Immagine67" text:anchor-type="as-char" svg:width="17.59cm" svg:height="6.128cm" draw:z-index="42"><draw:image xlink:href="Pictures/1000000100000581000001EB93886917.png" xlink:type="simple" xlink:show="embed" xlink:actuate="onLoad" draw:mime-type="image/png"/></draw:frame></text:span><text:span text:style-name="T88">Figura </text:span><text:span text:style-name="T88"><text:sequence text:ref-name="refFigura27" text:name="Figura" text:formula="ooow:Figura+1" style:num-format="1">28</text:sequence></text:span><text:span text:style-name="T88">: Schema E-R del Registro e del Monitoraggio delle Misure di mitigazione del rischio corruttiv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loext:marker-style-name="T1"/>
      <text:p text:style-name="P12" loext:marker-style-name="T1"><text:span text:style-name="T1">Pertanto, non è sufficiente “contare” le misurazioni per concludere che la misura è totalmente o parzialmente monitorata: potrebbero infatti essere state inserite più misurazioni su uno stesso indicatore; pertanto, leggendo solo il totale delle misurazioni, non si può concludere che, se questo numero è pari al numero degli indicatori, tutti gli indicatori hanno ricevuto una misurazione. L’algoritmo che stabilisce se la misura è monitorata o meno deve essere più raffinato: deve controllare infatti che ogni indicatore abbia ricevuto almeno una misurazione (nel criterio “stretto”) o comunque deve controllare che l’indicatore “Master” abbia ricevuto almeno una misurazione (nel criterio “lasco”).</text:span><text:span text:style-name="T1"/></text:p>
      <text:p text:style-name="P247" loext:marker-style-name="T1"/>
      <text:list text:continue-list="list172214639572380" text:style-name="WWNum103">
        <text:list-item>
          <text:list>
            <text:list-item>
              <text:list>
                <text:list-item>
                  <text:h text:style-name="P88" text:outline-level="3" loext:marker-style-name="T1"><text:bookmark-start text:name="__RefHeading___Toc4221_1544842616_Copy_1"/><text:span text:style-name="T26">ALGORITMO DELL’APPLICAZIONE DEL MONITORAGGIO</text:span><text:bookmark-end text:name="__RefHeading___Toc4221_1544842616_Copy_1"/><text:span text:style-name="T26"/></text:h>
                </text:list-item>
              </text:list>
            </text:list-item>
          </text:list>
        </text:list-item>
      </text:list>
      <text:p text:style-name="P12" loext:marker-style-name="T1">La domanda centrale del monitoraggio è: <text:span text:style-name="T146">“Quando è che una misura prevista può essere considerata applicata?”</text:span><text:span text:style-name="T6"/></text:p>
      <text:p text:style-name="P12" loext:marker-style-name="T1">Tutto l’armamentario concettuale visto finora relativamente al monitoraggio (indicatore di monitoraggio, fase di attuazione della misura, misurazione, misura monitorata etc.) ha come ultimo fine quello di rispondere a questa domanda.<text:span text:style-name="T1"/></text:p>
      <text:p text:style-name="P12" loext:marker-style-name="T1"><text:soft-page-break/>Da tutti i ragionamenti fatti nel capitolo precedente (“<text:a xlink:type="simple" xlink:href="#_toc1250" text:style-name="Internet_20_link" text:visited-style-name="Visited_20_Internet_20_Link"><text:span text:style-name="Internet_20_link">Le misure di riduzione del rischio</text:span></text:a>”) emergono <text:s/>alcuni assunti che possono essere posti a caposaldi dei ragionamenti relativi al monitoraggio, e in particolare il seguente:</text:p>
      <text:p text:style-name="P2" loext:marker-style-name="T1"/>
      <text:p text:style-name="P12" loext:marker-style-name="T1"><text:span text:style-name="T1"><text:s text:c="38"/></text:span><draw:frame draw:style-name="fr11" draw:name="Object1" text:anchor-type="as-char" svg:width="3.986cm" svg:height="0.531cm" draw:z-index="53"><draw:object xlink:href="./Object 1" xlink:type="simple" xlink:show="embed" xlink:actuate="onLoad"/><draw:image xlink:href="./ObjectReplacements/Object 1" xlink:type="simple" xlink:show="embed" xlink:actuate="onLoad"/></draw:frame><text:span text:style-name="T1"><text:s text:c="5"/></text:span><text:span text:style-name="T21">˄ <text:s text:c="3"/></text:span><draw:frame draw:style-name="fr11" draw:name="Object2" text:anchor-type="as-char" svg:width="4.563cm" svg:height="0.531cm" draw:z-index="49"><draw:object xlink:href="./Object 2" xlink:type="simple" xlink:show="embed" xlink:actuate="onLoad"/><draw:image xlink:href="./ObjectReplacements/Object 2" xlink:type="simple" xlink:show="embed" xlink:actuate="onLoad"/></draw:frame></text:p>
      <text:p text:style-name="P2" loext:marker-style-name="T1"/>
      <text:p text:style-name="P12" loext:marker-style-name="T1"><text:span text:style-name="T21">Infatti, il PxI mitigato può essere al più uguale al PxI iniziale (anche se sarebbe auspicabile che le misure previste producessero un effetto!); invece, il PxI monitorato può anche coincidere con il PxI iniziale, laddove le misure previste non risultino effettivamente applicate. </text:span><text:span text:style-name="T21"/></text:p>
      <text:p text:style-name="P120" loext:marker-style-name="T1"/>
      <text:p text:style-name="P144" loext:marker-style-name="T1">É evidente che la questo punto si torna alla domanda iniziale: <text:span text:style-name="T146">quando una misura prevista si dice applicata?</text:span><text:span text:style-name="T6"/></text:p>
      <text:p text:style-name="P12" loext:marker-style-name="T1">Si può sviluppare, a tal fine, un algoritmo più o meno sofisticato, che considera le varie misurazioni e le incrocia in base a vari criteri; ad esempio: l’ultima misurazione, il tipo di indicatore, lo scarto tra baseline e target, e così via.<text:span text:style-name="T1"/></text:p>
      <text:p text:style-name="P12" loext:marker-style-name="T1">Tuttavia, <text:span text:style-name="T179">la soluzione scelta, chiamata “criterio lasco”</text:span><text:span text:style-name="T183">, è molto più semplice. Essa </text:span><text:span text:style-name="T179">prevede semplicemente l’applicazione di un flag di “indicatore master” su uno, e uno solo, degli indicatori della misura: affinché la misura risulti applicata, è necessario che l’indicatore “master” abbia realizzato il suo target.</text:span> </text:p>
      <text:p text:style-name="P12" loext:marker-style-name="T1">Le regole di business sono:<text:span text:style-name="T1"/></text:p>
      <text:p text:style-name="P2" loext:marker-style-name="T1"/>
      <text:list text:style-name="WWNum43">
        <text:list-item>
          <text:p text:style-name="P263" loext:marker-style-name="T1"><text:span text:style-name="T1">a una misura aggiungiamo un flag di "indicatore fondamentale ai fini del monitoraggio" o "indicatore master" ed è il target di questo indicatore che viene attenzionato dalla tabella, quindi viene contollato se la misurazione di questo indicatore ha raggiunto il target;</text:span><text:span text:style-name="T1"/></text:p>
        </text:list-item>
        <text:list-item>
          <text:p text:style-name="P263" loext:marker-style-name="T1"><text:span text:style-name="T1">l’”indicatore master” di una misura sottoposta <text:s/>a monitoraggio è uno e uno solo entro una misura (occorre implementare la gestione di flag master doppi inseriti erroneamente);</text:span><text:span text:style-name="T1"/></text:p>
        </text:list-item>
        <text:list-item>
          <text:p text:style-name="P263" loext:marker-style-name="T1"><text:span text:style-name="T1">se </text:span><text:span text:style-name="T6">non</text:span><text:span text:style-name="T1"> sono stati definiti indicatori su una fase, la fase stessa viene ignorata;</text:span></text:p>
        </text:list-item>
        <text:list-item>
          <text:p text:style-name="P263" loext:marker-style-name="T1"><text:span text:style-name="T1">se sono stati definiti indicatori ma </text:span><text:span text:style-name="T6">non</text:span><text:span text:style-name="T1"> è stato definito nessun indicatore “master” la completezza è indecidibile;</text:span></text:p>
        </text:list-item>
        <text:list-item>
          <text:p text:style-name="P263" loext:marker-style-name="T1"><text:span text:style-name="T1">se la misurazione dell'indicatore master non ha raggiunto il target dell'indicatore master allora la misura non è considerabile come applicata; viceversa, se l’ultima misurazione dell’indicatore master ha raggiunto il target, allora l’indicatore master è stato realizzato e la misura, a cui l’indicatore è collegato tramite una delle sue fasi di attuazione, può essere considerata applicata;</text:span><text:span text:style-name="T1"/></text:p>
        </text:list-item>
        <text:list-item>
          <text:p text:style-name="P263" loext:marker-style-name="T1"><text:span text:style-name="T1">se l'indicatore master non è misurato, la misura risulta proprio non monitorata (non solo non applicata ma neppure sottoposta a monitoraggio).</text:span><text:span text:style-name="T1"/></text:p>
        </text:list-item>
      </text:list>
      <text:p text:style-name="P259" loext:marker-style-name="T1"><text:span text:style-name="T1">Queste definite sopra sono le regole dell’algoritmo dell’applicazione del monitoraggio, che risponde alla domanda: “la misura considerata è stata applicata? si può considerare applicata?”</text:span><text:span text:style-name="T1"/></text:p>
      <text:p text:style-name="P246" loext:marker-style-name="T1"/>
      <text:p text:style-name="P16"/>
      <text:p text:style-name="P259" loext:marker-style-name="T1"><text:span text:style-name="T1">Come si vede, il modello ha ampi gradi di libertà, per cui vi possono essere molteplici situazioni indecidibili; vari casi sono riportati nella tabella seguente:</text:span><text:span text:style-name="T1"/></text:p>
      <text:p text:style-name="P246" loext:marker-style-name="T1"/>
      <table:table table:name="Table14" table:style-name="Table14">
        <table:table-column table:style-name="Table14.A"/>
        <table:table-column table:style-name="Table14.B"/>
        <table:table-row table:style-name="Table14.1">
          <table:table-cell table:style-name="Table14.A1" office:value-type="string">
            <text:p text:style-name="P38" loext:marker-style-name="T163"><text:span text:style-name="T163">SITUAZIONE</text:span><text:span text:style-name="T163"/></text:p>
          </table:table-cell>
          <table:table-cell table:style-name="Table14.A1" office:value-type="string">
            <text:p text:style-name="P39" loext:marker-style-name="T163"><text:span text:style-name="T163">ESITO</text:span><text:span text:style-name="T163"/></text:p>
          </table:table-cell>
        </table:table-row>
        <table:table-row table:style-name="Table14.1">
          <table:table-cell table:style-name="Table14.A2" office:value-type="string">
            <text:p text:style-name="P38" loext:marker-style-name="T102"><text:span text:style-name="T102">Misura non articolata in fasi</text:span><text:span text:style-name="T102"/></text:p>
          </table:table-cell>
          <table:table-cell table:style-name="Table14.B2" office:value-type="string">
            <text:p text:style-name="P39" loext:marker-style-name="T102"><text:span text:style-name="T102">NON MONITORATA</text:span><text:span text:style-name="T102"/></text:p>
          </table:table-cell>
        </table:table-row>
        <table:table-row table:style-name="Table14.1">
          <table:table-cell table:style-name="Table14.A2" office:value-type="string">
            <text:p text:style-name="P38" loext:marker-style-name="T102"><text:span text:style-name="T102">Misura articolata in fasi ma senza indicatori</text:span><text:span text:style-name="T102"/></text:p>
          </table:table-cell>
          <table:table-cell table:style-name="Table14.B2" office:value-type="string">
            <text:p text:style-name="P39" loext:marker-style-name="T102"><text:span text:style-name="T102">NON MONITORABILE</text:span><text:span text:style-name="T102"/></text:p>
          </table:table-cell>
        </table:table-row>
        <table:table-row table:style-name="Table14.1">
          <table:table-cell table:style-name="Table14.A4" office:value-type="string">
            <text:p text:style-name="P38" loext:marker-style-name="T102"><text:span text:style-name="T102">Misura in fasi con indicatori ma nessun master</text:span><text:span text:style-name="T102"/></text:p>
          </table:table-cell>
          <table:table-cell table:style-name="Table14.B4" office:value-type="string">
            <text:p text:style-name="P39" loext:marker-style-name="T102"><text:span text:style-name="T102">NON VALUTABILE</text:span><text:span text:style-name="T102"/></text:p>
          </table:table-cell>
        </table:table-row>
        <table:table-row table:style-name="Table14.1">
          <table:table-cell table:style-name="Table14.A5" office:value-type="string">
            <text:p text:style-name="P38" loext:marker-style-name="T102"><text:span text:style-name="T102">Misura in fasi con indicatori ma 2+ master</text:span><text:span text:style-name="T102"/></text:p>
          </table:table-cell>
          <table:table-cell table:style-name="Table14.B5" office:value-type="string">
            <text:p text:style-name="P39" loext:marker-style-name="T102"><text:span text:style-name="T102">ERRORE BUSINESS</text:span><text:span text:style-name="T102"/></text:p>
          </table:table-cell>
        </table:table-row>
        <table:table-row table:style-name="Table14.1">
          <table:table-cell table:style-name="Table14.A6" office:value-type="string">
            <text:p text:style-name="P38" loext:marker-style-name="T102"><text:span text:style-name="T102">Misura in fasi con indicatore master ma senza misurazioni</text:span><text:span text:style-name="T102"/></text:p>
          </table:table-cell>
          <table:table-cell table:style-name="Table14.B6" office:value-type="string">
            <text:p text:style-name="P39" loext:marker-style-name="T102"><text:span text:style-name="T102">NON VALUTATA</text:span><text:span text:style-name="T102"/></text:p>
          </table:table-cell>
        </table:table-row>
        <table:table-row table:style-name="Table14.1">
          <table:table-cell table:style-name="Table14.A7" office:value-type="string">
            <text:p text:style-name="P38" loext:marker-style-name="T102"><text:span text:style-name="T102">Misura in fasi con indicatore master con + misurazioni</text:span><text:span text:style-name="T102"/></text:p>
          </table:table-cell>
          <table:table-cell table:style-name="Table14.B7" office:value-type="string">
            <text:p text:style-name="P39" loext:marker-style-name="T102"><text:span text:style-name="T102">CONSIDERARE L’ULTIMA</text:span><text:span text:style-name="T102"/></text:p>
          </table:table-cell>
        </table:table-row>
        <table:table-row table:style-name="Table14.1">
          <table:table-cell table:style-name="Table14.A8" office:value-type="string">
            <text:p text:style-name="P38" loext:marker-style-name="T102"><text:span text:style-name="T102">Misura in fasi con indicatore master con misurazioni con target non raggiunto</text:span><text:span text:style-name="T102"/></text:p>
          </table:table-cell>
          <table:table-cell table:style-name="Table14.B8" office:value-type="string">
            <text:p text:style-name="P39" loext:marker-style-name="T102"><text:span text:style-name="T102">NON APPLICATA</text:span><text:span text:style-name="T102"/></text:p>
          </table:table-cell>
        </table:table-row>
        <table:table-row table:style-name="Table14.1">
          <table:table-cell table:style-name="Table14.A7" office:value-type="string">
            <text:p text:style-name="P38" loext:marker-style-name="T102"><text:span text:style-name="T102">Misura in fasi con indicatore master con misurazioni con target non raggiunto</text:span><text:span text:style-name="T102"/></text:p>
          </table:table-cell>
          <table:table-cell table:style-name="Table14.B7" office:value-type="string">
            <text:p text:style-name="P39" loext:marker-style-name="T102"><text:span text:style-name="T102">APPLICATA</text:span><text:span text:style-name="T102"/></text:p>
          </table:table-cell>
        </table:table-row>
        <table:table-row table:style-name="Table14.1">
          <table:table-cell table:style-name="Table14.A10" table:number-columns-spanned="2" office:value-type="string">
            <text:p text:style-name="P246" loext:marker-style-name="T1"/>
            <text:p text:style-name="P246" loext:marker-style-name="T1"/>
            <text:p text:style-name="P259" loext:marker-style-name="T1"><text:span text:style-name="T1">Nella tabella riportata sopra, le prime 4 situazioni sono anomale ai sensi del monitoraggio ed esulano da questo, mentre le altre 4 sono situazioni ordinarie di monitoraggio e producono esiti più definiti.</text:span><text:span text:style-name="T1"/></text:p>
            <text:p text:style-name="P246" loext:marker-style-name="T1"/>
            <text:p text:style-name="P259" loext:marker-style-name="T1"><text:span text:style-name="T1">L’algoritmo di valutazione dell’applicazione di una misura deve quindi considerare tutte queste situazioni e gestire tutti i vari rami; di seguito viene riportato un diagramma di flusso che permette di implementare i vari casi.</text:span><text:span text:style-name="T1"/></text:p>
          </table:table-cell>
          <table:covered-table-cell/>
        </table:table-row>
      </table:table>
      <text:p text:style-name="P246" loext:marker-style-name="T1"><text:soft-page-break/></text:p>
      <text:p text:style-name="P246" loext:marker-style-name="T1"><draw:frame draw:style-name="fr3" draw:name="Image1" text:anchor-type="char" svg:y="0.002cm" svg:width="17.59cm" svg:height="19.916cm" draw:z-index="58"><draw:image xlink:href="Pictures/1000000100000337000003F7BE462E2A.png" xlink:type="simple" xlink:show="embed" xlink:actuate="onLoad" draw:mime-type="image/png"/></draw:frame></text:p>
      <text:list text:continue-list="list172212321031490" text:style-name="WWNum104">
        <text:list-item>
          <text:h text:style-name="P59" text:outline-level="1" loext:marker-style-name="T1"><text:bookmark text:name="Copia___RefHeading___Toc6894_3671668814_"/><text:bookmark-start text:name="__RefHeading___Toc4382_1492729285"/><text:span text:style-name="T27">Flusso informativo</text:span><text:bookmark-end text:name="__RefHeading___Toc4382_1492729285"/><text:span text:style-name="T27"/></text:h>
        </text:list-item>
      </text:list>
      <text:p text:style-name="P105" loext:marker-style-name="T70"/>
      <text:p text:style-name="P12" loext:marker-style-name="T1"><text:span text:style-name="T1">Affinché il sistema sia il più possibile completo, è necessario prevedere l’implementazione di una serie di </text:span><text:span text:style-name="T6">funzioni di scrittura</text:span><text:span text:style-name="T1"> aventi lo scopo di modificare il contenuto informativo del sistema.</text:span></text:p>
      <text:p text:style-name="P12" loext:marker-style-name="T1"><text:span text:style-name="T1">Avendo adottato un modello di sviluppo software incrementale, risulta perfettamente coerente col modello l’attivazione di una iterazione successiva in cui si affronta il problema di fornire interfacce tramite cui poter inserire e modificare i dati.</text:span><text:span text:style-name="T1"/></text:p>
      <text:p text:style-name="P2" loext:marker-style-name="T1"/>
      <text:p text:style-name="P12" loext:marker-style-name="T1"><text:span text:style-name="T1">Riassumendo, la prima iterazione è stata costituita dallo sviluppo delle funzioni per:</text:span><text:span text:style-name="T1"/></text:p>
      <text:list text:style-name="WWNum37">
        <text:list-item>
          <text:list>
            <text:list-item>
              <text:p text:style-name="P175" loext:marker-style-name="T1"><text:span text:style-name="T1">la </text:span><text:span text:style-name="T2">mappatura di processi e strutture</text:span><text:span text:style-name="T1"> (tramite alimentazione diretta dei dati, quindi solo funzioni di visualizzazione), il registro dei rischi, dei fattori abilitanti, etc.;</text:span></text:p>
            </text:list-item>
            <text:list-item>
              <text:p text:style-name="P175" loext:marker-style-name="T1"><text:span text:style-name="T1">la mappatura delle misure di mitigazione (</text:span><text:span text:style-name="T2">registro delle misure</text:span><text:span text:style-name="T1">) e l’assegnazione stimata delle misure ai rischi;</text:span></text:p>
            </text:list-item>
            <text:list-item>
              <text:p text:style-name="P175" loext:marker-style-name="T1"><text:span text:style-name="T1">il </text:span><text:span text:style-name="T2">monitoraggio</text:span><text:span text:style-name="T1"> delle misure, ovvero la verifica circa l’applicazione effettiva delle misure previste.</text:span></text:p>
            </text:list-item>
          </text:list>
        </text:list-item>
      </text:list>
      <text:p text:style-name="P12" loext:marker-style-name="T1"><text:span text:style-name="T1">Lo sviluppo del ciclo di gestione del rischio corruttivo (o meglio, dei rischi cui sono esposti i processi organizzativi) è completo.</text:span><text:span text:style-name="T1"/></text:p>
      <text:p text:style-name="P2" loext:marker-style-name="T1"/>
      <text:p text:style-name="P12" loext:marker-style-name="T1"><text:span text:style-name="T1">Si può ora ricominciare dal punto 1, sviluppando funzioni che facilitano il lavoro di censimento e gestione. Siccome al primo punto c’è la mappatura dei processi, iniziamo quindi dallo sviluppo di una serie di funzioni di scrittura che permettono anzitutto di censire nuovi processi, valutando anche la possibilità di avere funzioni di modifica, ovvero di aggiornamento dei dati già inseriti.</text:span><text:span text:style-name="T1"/></text:p>
      <text:p text:style-name="P2" loext:marker-style-name="T1"/>
      <text:list text:continue-list="list172214295768430" text:style-name="WWNum2">
        <text:list-item>
          <text:list>
            <text:list-item>
              <text:h text:style-name="P64" text:outline-level="2" loext:marker-style-name="T1"><text:bookmark text:name="Copia___RefHeading___Toc2118_785337907_1"/><text:bookmark-start text:name="__RefHeading___Toc4384_1492729285"/><text:span text:style-name="T1">WORKFLOW DI INSERIMENTO MACRO/PROCESSO</text:span><text:bookmark-end text:name="__RefHeading___Toc4384_1492729285"/><text:span text:style-name="T1"/></text:h>
            </text:list-item>
          </text:list>
        </text:list-item>
      </text:list>
      <text:p text:style-name="P12" loext:marker-style-name="T1"><text:span text:style-name="T1">Al fine di permettere l’inserimento in autonomia di nuovi macroprocessi e processi, viene pianificato lo sviluppo di maschere apposite.</text:span><text:span text:style-name="T1"/></text:p>
      <text:p text:style-name="P2" loext:marker-style-name="T1"><draw:custom-shape text:anchor-type="char" draw:z-index="46" draw:name="Cornice36" draw:style-name="gr15" draw:text-style-name="P265" svg:width="17.59cm" svg:height="6.661cm" svg:x="0cm" svg:y="0.647cm"><text:p text:style-name="P29" loext:marker-style-name="T88"><text:span text:style-name="T86"><draw:frame draw:style-name="fr2" draw:name="Immagine68" text:anchor-type="as-char" svg:width="17.59cm" svg:height="5.263cm" draw:z-index="69"><draw:image xlink:href="Pictures/100000010000196800000974A83C5C4C.png" xlink:type="simple" xlink:show="embed" xlink:actuate="onLoad" draw:mime-type="image/png"/></draw:frame></text:span><text:span text:style-name="T88">Figura </text:span><text:span text:style-name="T88"><text:sequence text:ref-name="refFigura28" text:name="Figura" text:formula="ooow:Figura+1" style:num-format="1">29</text:sequence></text:span><text:span text:style-name="T88">: Le prime maschere della funzione di inserimento di un nuovo processo censito dall'anticorruzion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loext:marker-style-name="T1"/>
      <text:p text:style-name="P2" loext:marker-style-name="T1"><text:soft-page-break/></text:p>
      <text:list text:continue-numbering="true" text:style-name="WWNum2">
        <text:list-item>
          <text:list>
            <text:list-item>
              <text:list>
                <text:list-item>
                  <text:h text:style-name="P84" text:outline-level="3" loext:marker-style-name="T1"><text:bookmark-start text:name="__RefHeading___Toc4592_419530422"/><text:span text:style-name="T1">SCELTA LIVELLO DI PROCESSO</text:span><text:bookmark-end text:name="__RefHeading___Toc4592_419530422"/><text:span text:style-name="T1"/></text:h>
                </text:list-item>
              </text:list>
            </text:list-item>
          </text:list>
        </text:list-item>
      </text:list>
      <text:p text:style-name="P12" loext:marker-style-name="T1"><text:span text:style-name="T1">Tramite un bottone inserito nella parte di visualizzazione dell’albero dei macroprocessi viene generato l’entrypoint del flusso di inserimento di un nuovo processo.</text:span><text:span text:style-name="T1"/></text:p>
      <text:p text:style-name="P12" loext:marker-style-name="T1"><text:span text:style-name="T1">La prima maschera chiede a che livello deve essere inserito il nuovo processo:</text:span><text:span text:style-name="T1"/></text:p>
      <text:p text:style-name="P2" loext:marker-style-name="T1"><draw:custom-shape text:anchor-type="char" draw:z-index="51" draw:name="Cornice37" draw:style-name="gr13" draw:text-style-name="P265" svg:width="17.59cm" svg:height="10.887cm" svg:x="0cm" svg:y="0.785cm"><text:p text:style-name="P29" loext:marker-style-name="T88"><text:span text:style-name="T86"><draw:frame draw:style-name="fr2" draw:name="Immagine69" text:anchor-type="as-char" svg:width="17.59cm" svg:height="9.977cm" draw:z-index="75"><draw:image xlink:href="Pictures/10000000000004270000025BE5BC7E18.png" xlink:type="simple" xlink:show="embed" xlink:actuate="onLoad" draw:mime-type="image/png"/></draw:frame></text:span><text:span text:style-name="T88">Figura </text:span><text:span text:style-name="T88"><text:sequence text:ref-name="refFigura29" text:name="Figura" text:formula="ooow:Figura+1" style:num-format="1">30</text:sequence></text:span><text:span text:style-name="T88">: Form di scelta livello del processo da inseri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loext:marker-style-name="T1"/>
      <text:p text:style-name="P2" loext:marker-style-name="T1"/>
      <text:list xml:id="list172213541254414" text:continue-numbering="true" text:style-name="WWNum2">
        <text:list-item>
          <text:list>
            <text:list-item>
              <text:list>
                <text:list-item>
                  <text:h text:style-name="P84" text:outline-level="3" loext:marker-style-name="T1"><text:bookmark-start text:name="__RefHeading___Toc4594_419530422"/><text:span text:style-name="T1">INSERIMENTO MACRO/PROCESSO</text:span><text:bookmark-end text:name="__RefHeading___Toc4594_419530422"/><text:span text:style-name="T1"/></text:h>
                </text:list-item>
              </text:list>
            </text:list-item>
          </text:list>
        </text:list-item>
      </text:list>
      <text:p text:style-name="P12" loext:marker-style-name="T1"><text:span text:style-name="T1">Quindi viene mostrata una form che permette di scegliere l’elemento sotto cui aggregare il nuovo elemento (area di rischio se macroprocesso, macro se processo, processo se sottoprocesso) e si richiede di compilare il nome del nuovo elemento (v. Figura 36).</text:span><text:span text:style-name="T1"/></text:p>
      <text:p text:style-name="P2" loext:marker-style-name="T1"/>
      <text:p text:style-name="P12" loext:marker-style-name="T1"><text:span text:style-name="T1">A questo punto si hanno due scelte: </text:span><text:span text:style-name="T1"/></text:p>
      <text:list text:style-name="WWNum39">
        <text:list-item>
          <text:p text:style-name="P176" loext:marker-style-name="T1"><text:span text:style-name="T1">“Salva” permette di inserire il nuovo elemento e tornare alla visualizzazione iniziale (→ albero dei macroprocessi); </text:span><text:span text:style-name="T1"/></text:p>
        </text:list-item>
        <text:list-item>
          <text:p text:style-name="P176" loext:marker-style-name="T1"><text:span text:style-name="T1">“Salva e Continua” permette di procedere con l’inserimento delle informazioni (“specializzazione” del processo).</text:span><text:span text:style-name="T1"/></text:p>
        </text:list-item>
      </text:list>
      <text:p text:style-name="P2" loext:marker-style-name="T1"/>
      <text:p text:style-name="P2" loext:marker-style-name="T1"><text:soft-page-break/></text:p>
      <text:p text:style-name="P12" loext:marker-style-name="T1"><text:span text:style-name="T1">Sono già qui possibili vari flussi informativi; tralasciando il sottoprocesso (che funziona analogamente al processo):</text:span><text:span text:style-name="T1"/></text:p>
      <text:p text:style-name="P2" loext:marker-style-name="T1"/>
      <text:list text:style-name="WWNum38">
        <text:list-item>
          <text:p text:style-name="P177" loext:marker-style-name="T1"><text:span text:style-name="T2">Flusso base</text:span><text:span text:style-name="T1">: </text:span></text:p>
          <text:list>
            <text:list-item>
              <text:p text:style-name="P177" loext:marker-style-name="T1"><text:span text:style-name="T1">Scelta livello macroprocesso: Continua → </text:span><text:span text:style-name="T1"/></text:p>
            </text:list-item>
            <text:list-item>
              <text:p text:style-name="P177" loext:marker-style-name="T1"><text:span text:style-name="T1">Inserimento macroprocesso: Salva e Continua → </text:span><text:span text:style-name="T1"/></text:p>
            </text:list-item>
            <text:list-item>
              <text:p text:style-name="P177" loext:marker-style-name="T1"><text:span text:style-name="T1">Inserimento processo: Salva (ed esci)</text:span><text:span text:style-name="T1"/></text:p>
            </text:list-item>
          </text:list>
        </text:list-item>
        <text:list-item>
          <text:p text:style-name="P177" loext:marker-style-name="T1"><text:span text:style-name="T1">Flusso parziale in alto: </text:span><text:span text:style-name="T1"/></text:p>
          <text:list>
            <text:list-item>
              <text:p text:style-name="P177" loext:marker-style-name="T1"><text:span text:style-name="T1">Scelta livello macroprocesso: Continua → </text:span><text:span text:style-name="T1"/></text:p>
            </text:list-item>
            <text:list-item>
              <text:p text:style-name="P177" loext:marker-style-name="T1"><text:span text:style-name="T1">Inserimento macroprocesso: Salva (ed esci)</text:span><text:span text:style-name="T1"/></text:p>
            </text:list-item>
          </text:list>
        </text:list-item>
        <text:list-item>
          <text:p text:style-name="P177" loext:marker-style-name="T1"><text:span text:style-name="T1">Flusso parziale in basso:</text:span><text:span text:style-name="T1"/></text:p>
          <text:list>
            <text:list-item>
              <text:p text:style-name="P177" loext:marker-style-name="T1"><text:span text:style-name="T1">Scelta livello processo: Continua → </text:span><text:span text:style-name="T1"/></text:p>
            </text:list-item>
            <text:list-item>
              <text:p text:style-name="P177" loext:marker-style-name="T1"><text:span text:style-name="T1">Inserimento processo: Salva (ed esci)</text:span><text:span text:style-name="T1"/></text:p>
            </text:list-item>
          </text:list>
        </text:list-item>
      </text:list>
      <text:p text:style-name="P2" loext:marker-style-name="T1"/>
      <text:p text:style-name="P12" loext:marker-style-name="T1"><text:span text:style-name="T1">Avere una scelta del livello “a monte” permette di realizzare dei moduli di inserimento autosufficienti, che consentono anche flussi informativi con interruzioni (p.es. inserimento di un macroprocesso in un primo tempo e poi scelta inserimento di un processo che viene agganciato al macroprocesso inserito in precedenza). L’unico problema in questo quadro può consistere nelle conseguenze di assunzioni effettuate al tempo dello sviluppo dell’albero dei macroprocessi (p.es., se fosse stato assunto che un macro ha obbligatoriamente processi, l’inserimento del solo macroprocesso provocherebbe errori nella visualizzazione dell’albero). Bisognerà, pertanto, effettuare le necessarie verifiche.</text:span><text:span text:style-name="T1"/></text:p>
      <text:p text:style-name="P2" loext:marker-style-name="T1"/>
      <text:p text:style-name="P12" loext:marker-style-name="T1"><text:span text:style-name="T1">Notare che “Salva” e “Salva e Continua” triggerano un flusso che provoca una query di inserimento, mentre il solo “Continua” non provoca scrittura nel database ma solo in memoria RAM.</text:span><text:span text:style-name="T1"/></text:p>
      <text:p text:style-name="P2" loext:marker-style-name="T1"/>
      <text:list xml:id="list172213930415623" text:continue-list="list172213541254414" text:style-name="WWNum2">
        <text:list-item>
          <text:list>
            <text:list-item>
              <text:list>
                <text:list-item>
                  <text:h text:style-name="P84" text:outline-level="3" loext:marker-style-name="T1"><text:bookmark-start text:name="__RefHeading___Toc4596_419530422"/><text:span text:style-name="T1">INSERIMENTO INPUT</text:span><text:bookmark-end text:name="__RefHeading___Toc4596_419530422"/><text:span text:style-name="T1"/></text:h>
                </text:list-item>
              </text:list>
            </text:list-item>
          </text:list>
        </text:list-item>
      </text:list>
      <text:p text:style-name="P12" loext:marker-style-name="T1"><text:span text:style-name="T1">Il salvataggio del nome di un nuovo processo o macro corrisponde all’inserimento delle informazioni obbligatorie nella tabella relativa. Come si vede dalla Figura 30, alcune informazioni sono calcolate in autonomia dal sistema (codice, data, ora, autore etc.) mentre il nome e la relazione con il livello superiore sono fornite dall’utente.</text:span><text:span text:style-name="T1"/></text:p>
      <text:p text:style-name="P12" loext:marker-style-name="T1"><text:span text:style-name="T1">Dopo aver inserito gli estremi del nuovo processo, si passa alla fase di “specializzazione” del processo, cioè all’aggiunta di tutte le informazioni di contorno che arricchiscono il contenuto informativo del processo. Da questo punto in poi parleremo esclusivamente di “processo” perché il macro è solo un aggregatore di processi ma non ha direttamente collegamenti con input, fasi, output etc.</text:span><text:span text:style-name="T1"/></text:p>
      <text:p text:style-name="P2" loext:marker-style-name="T1"/>
      <text:p text:style-name="P12" loext:marker-style-name="T1"><text:span text:style-name="T1">Il </text:span><text:span text:style-name="T2">primo step</text:span><text:span text:style-name="T1"> di specializzazione, dunque, consiste nell’aggiunta degli input.</text:span></text:p>
      <text:p text:style-name="P12" loext:marker-style-name="T1"><text:span text:style-name="T1">Il flusso che ha portato a questo punto può derivare direttamente dall’azione di inserimento di un nuovo processo (cliccando su “Salva e Continua”) oppure può intervenire cliccando su un bottone ad hoc, posizionato p.es. sotto gli input (vuoti) del processo precedentemente inserito (anche qui bisognerà </text:span><text:soft-page-break/><text:span text:style-name="T1">verificare le assunzioni fatte a tempo dell’implementazione delle funzioni di visualizzazione dell’albero dei macroprocessi).</text:span><text:span text:style-name="T1"/></text:p>
      <text:p text:style-name="P2" loext:marker-style-name="T1"/>
      <text:p text:style-name="P2" loext:marker-style-name="T1"/>
      <text:p text:style-name="P2" loext:marker-style-name="T1"><draw:custom-shape text:anchor-type="char" draw:z-index="44" draw:name="Cornice38" draw:style-name="gr16" draw:text-style-name="P265" svg:width="17.59cm" svg:height="7.739cm" svg:x="0cm" svg:y="0.002cm"><text:p text:style-name="P29" loext:marker-style-name="T88"><text:span text:style-name="T86"><draw:frame draw:style-name="fr2" draw:name="Immagine70" text:anchor-type="as-char" svg:width="17.59cm" svg:height="6.341cm" draw:z-index="65"><draw:image xlink:href="Pictures/10000001000004BC000001B5B346B3BE.png" xlink:type="simple" xlink:show="embed" xlink:actuate="onLoad" draw:mime-type="image/png"/></draw:frame></text:span><text:span text:style-name="T88">Figura </text:span><text:span text:style-name="T88"><text:sequence text:ref-name="refFigura30" text:name="Figura" text:formula="ooow:Figura+1" style:num-format="1">31</text:sequence></text:span><text:span text:style-name="T88">: Maschera per l'inserimento degli input del processo e sottomaschera di aggiunta di un nuovo inpu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loext:marker-style-name="T1"/>
      <text:p text:style-name="P12" loext:marker-style-name="T1"><text:span text:style-name="T1">La maschera (o form) di aggiunta di input è struttura come segue:</text:span><text:span text:style-name="T1"/></text:p>
      <text:list text:style-name="WWNum40">
        <text:list-item>
          <text:p text:style-name="P178" loext:marker-style-name="T1"><text:span text:style-name="T1">campo di ricerca input che, tramite una richiesta asincrona, visualizza gli input già presenti nella base dati e permette di selezionarne uno;</text:span><text:span text:style-name="T1"/></text:p>
        </text:list-item>
        <text:list-item>
          <text:p text:style-name="P178" loext:marker-style-name="T1"><text:span text:style-name="T1">bottoni di aggiunta ed eliminazione, che permettono rispettivamente di generare un ulteriore campo di ricerca e scelta input, o rimuovere l’ultimo campo aggiunto;</text:span><text:span text:style-name="T1"/></text:p>
        </text:list-item>
        <text:list-item>
          <text:p text:style-name="P178" loext:marker-style-name="T1"><text:span text:style-name="T1">bottone di creazione nuovo input, che apre una nuova pagina con la maschera che permette di definire (inserire) un nuovo input; dopo aver terminato l’inserimento dell’input, si torna alla maschera di aggiunta input, nella quale, digitando le prime lettere del nuovo input appena inserito, sarà possibile trovarlo e selezionarlo.</text:span><text:span text:style-name="T1"/></text:p>
        </text:list-item>
      </text:list>
      <text:p text:style-name="P2" loext:marker-style-name="T1"/>
      <text:p text:style-name="P12" loext:marker-style-name="T1"><text:span text:style-name="T1">A questo punto, sono possibili due flussi informativi:</text:span><text:span text:style-name="T1"/></text:p>
      <text:list text:style-name="WWNum41">
        <text:list-item>
          <text:p text:style-name="P179" loext:marker-style-name="T1"><text:span text:style-name="T1">“Salva” chiude la pagina di aggiunta input, collega tutti gli input selezionati al processo corrente e riporta alla pagina diretta di visualizzazione del processo corrente;</text:span><text:span text:style-name="T1"/></text:p>
        </text:list-item>
        <text:list-item>
          <text:p text:style-name="P179" loext:marker-style-name="T1"><text:span text:style-name="T1">“Salva e Continua” chiude la pagina e collega i dati degli input come sopra ma in più apre la maschera di aggiunta delle fasi del processo.</text:span><text:span text:style-name="T1"/></text:p>
        </text:list-item>
      </text:list>
      <text:p text:style-name="P2" loext:marker-style-name="T1"/>
      <text:p text:style-name="P2" loext:marker-style-name="T1"/>
      <text:list xml:id="list172212997133615" text:continue-list="list172213930415623" text:style-name="WWNum2">
        <text:list-item>
          <text:list>
            <text:list-item>
              <text:list>
                <text:list-item>
                  <text:h text:style-name="P84" text:outline-level="3" loext:marker-style-name="T1"><text:bookmark-start text:name="__RefHeading___Toc4598_419530422"/><text:span text:style-name="T1">INSERIMENTO FASI</text:span><text:bookmark-end text:name="__RefHeading___Toc4598_419530422"/><text:span text:style-name="T1"/></text:h>
                </text:list-item>
              </text:list>
            </text:list-item>
          </text:list>
        </text:list-item>
      </text:list>
      <text:p text:style-name="P12" loext:marker-style-name="T1"><text:span text:style-name="T1">Il </text:span><text:span text:style-name="T2">secondo step</text:span><text:span text:style-name="T1"> di specializzazione di un nuovo processo consiste nell’aggiunta delle fasi.</text:span></text:p>
      <text:p text:style-name="P2" loext:marker-style-name="T1"/>
      <text:p text:style-name="P241" loext:marker-style-name="T132"/>
      <text:p text:style-name="P154" loext:marker-style-name="T1"><text:span text:style-name="T167">NOTA BENE</text:span><text:span text:style-name="T167"/></text:p>
      <text:p text:style-name="P155" loext:marker-style-name="T1"><text:span text:style-name="T20">Disambigua bene le </text:span><text:span text:style-name="T13">fasi di processo</text:span><text:span text:style-name="T20"> dalle</text:span><text:span text:style-name="T4"> </text:span><text:span text:style-name="T13">fasi di attuazione</text:span><text:span text:style-name="T20"> di una misura.</text:span></text:p>
      <text:p text:style-name="P155" loext:marker-style-name="T1"><text:span text:style-name="T20">I due oggetti si chiamano allo stesso modo (</text:span><text:span text:style-name="T184">fase</text:span><text:span text:style-name="T20">) ma sono completamente diversi (infatti sono memorizzati in due entità distinte dello schema). </text:span></text:p>
      <text:p text:style-name="P155" loext:marker-style-name="T1"><text:span text:style-name="T20">Le </text:span><text:span text:style-name="T4">fasi di attuazione di una misura</text:span><text:span text:style-name="T20"> sono semplici etichette ordinate in senso progressivo tramite un numero d’ordine che ne dovrebbe rispecchiare l’inserimento, mentre le </text:span><text:span text:style-name="T4">fasi di processo</text:span><text:span text:style-name="T20"> sono oggetti più articolati, che possono avere una serie di attributi aggiuntivi oltre al nome (una descrizione, un flag di obbligatorietà / facoltatività, una coppia di date) e soprattutto hanno molteplici collegamenti con altre entità (le strutture, i soggetti contingenti) e rappresentano una serie di stadi attraverso cui passa la realizzazione di un processo organizzativo. </text:span></text:p>
      <text:p text:style-name="P155" loext:marker-style-name="T1"><text:span text:style-name="T20">In letteratura sulla mappatura dei processi, le fasi sono anche chiamate “attività” o “azioni” e non vanno confuse con i sottoprocessi (che sono semplicemente processi organizzativi con uno </text:span><text:span text:style-name="T9">scope</text:span><text:span text:style-name="T14"> più circoscritto rispetto ai processi di livello superiore)</text:span><text:span text:style-name="T20">.</text:span></text:p>
      <text:p text:style-name="P2" loext:marker-style-name="T1"/>
      <text:p text:style-name="P12" loext:marker-style-name="T1"><text:span text:style-name="T1">Il flusso che ha portato all’inserimento delle fasi può derivare direttamente dall’azione di inserimento degli input di un nuovo processo (cliccando su “Salva e Continua”) oppure può azionarsi cliccando su un bottone ad hoc, posizionato p.es. nello spazio delle fasi (vuote) del processo precedentemente inserito (anche qui bisognerà verificare le assunzioni fatte a tempo dell’implementazione della pagina dei dettagli di un processo).</text:span><text:span text:style-name="T1"/></text:p>
      <text:p text:style-name="P2" loext:marker-style-name="T1"/>
      <text:p text:style-name="P2" loext:marker-style-name="T1"/>
      <text:p text:style-name="P2" loext:marker-style-name="T1"><draw:custom-shape text:anchor-type="char" draw:z-index="2" draw:name="Cornice39" draw:style-name="gr34" draw:text-style-name="P265" svg:width="14.87cm" svg:height="9.619cm" svg:x="1.36cm" svg:y="0.002cm"><text:p text:style-name="P29" loext:marker-style-name="T88"><text:span text:style-name="T86"><draw:frame draw:style-name="fr2" draw:name="Immagine71" text:anchor-type="as-char" svg:width="14.87cm" svg:height="8.708cm" draw:z-index="4"><draw:image xlink:href="Pictures/10000001000002320000016A3AFEAC0A.png" xlink:type="simple" xlink:show="embed" xlink:actuate="onLoad" draw:mime-type="image/png"/></draw:frame></text:span><text:span text:style-name="T88">Figura </text:span><text:span text:style-name="T88"><text:sequence text:ref-name="refFigura31" text:name="Figura" text:formula="ooow:Figura+1" style:num-format="1">32</text:sequence></text:span><text:span text:style-name="T88">: Form di inserimento delle fasi del process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12" loext:marker-style-name="T1"><text:soft-page-break/><text:span text:style-name="T1">Le fasi di processo, differentemente dagli input, non possono essere condivise tra vari processi, per cui non c’è motivo di implementare una funzione di ricerca sulle fasi già inserite: assumiamo che le fasi inserite in questa maschera siano nuove ed esclusivamente incardinate sul processo corrente.</text:span><text:span text:style-name="T1"/></text:p>
      <text:p text:style-name="P12" loext:marker-style-name="T1"><text:span text:style-name="T1">Cliccando su “Aggiungi” è possibile generare in modo asincrono nuovi campi per inserire, con un solo clic su un bottone di salvataggio, molteplici fasi.</text:span><text:span text:style-name="T1"/></text:p>
      <text:p text:style-name="P2" loext:marker-style-name="T1"/>
      <text:p text:style-name="P12" loext:marker-style-name="T1"><text:span text:style-name="T1">Anche qui, sono possibili due flussi informativi:</text:span><text:span text:style-name="T1"/></text:p>
      <text:list text:style-name="WWNum42">
        <text:list-item>
          <text:p text:style-name="P180" loext:marker-style-name="T1"><text:span text:style-name="T1">“Salva” chiude la pagina di inserimento fasi, collega tutte le fasi immesse al processo corrente e riporta alla pagina diretta di visualizzazione del processo corrente;</text:span><text:span text:style-name="T1"/></text:p>
        </text:list-item>
        <text:list-item>
          <text:p text:style-name="P180" loext:marker-style-name="T1"><text:span text:style-name="T1">“Salva e Continua” chiude la pagina, collega tutte le fasi immesse al processo corrente come sopra ma in più apre la maschera di assegnazione delle strutture e/o dei soggetti alle fasi stesse.</text:span><text:span text:style-name="T1"/></text:p>
        </text:list-item>
      </text:list>
      <text:p text:style-name="P2" loext:marker-style-name="T1"/>
      <text:p text:style-name="P2" loext:marker-style-name="T1"><draw:custom-shape text:anchor-type="char" draw:z-index="4" draw:name="Cornice40" draw:style-name="gr33" draw:text-style-name="P265" svg:width="15.715cm" svg:height="13.644cm" svg:x="1.813cm" svg:y="-0.034cm"><text:p text:style-name="P31" loext:marker-style-name="T88"><draw:frame draw:style-name="fr2" draw:name="Copia Copia Immagine72 1 1" text:anchor-type="as-char" svg:width="10.028cm" svg:height="12.48cm" draw:z-index="9"><draw:image xlink:href="Pictures/1000000100000232000002736C846E9A.png" xlink:type="simple" xlink:show="embed" xlink:actuate="onLoad" draw:mime-type="image/png"/></draw:frame></text:p><text:p text:style-name="P29" loext:marker-style-name="T88"><text:span text:style-name="T88">Figura </text:span><text:span text:style-name="T88"><text:sequence text:ref-name="refFigura32" text:name="Figura" text:formula="ooow:Figura+1" style:num-format="1">33</text:sequence></text:span><text:span text:style-name="T88">: Maschera di assegnazione delle strutture e/o dei soggetti alle fas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12" loext:marker-style-name="T1"><text:span text:style-name="T1">Tramite quest’ultima maschera è possibile aggiungere le strutture responsabili delle fasi e uno, o più, soggetti contingenti. Deve anche essere prevista la funzione di creazione di un nuovo soggetto contingente, se quello da inserire non è presente tra quelli già inseriti.</text:span><text:span text:style-name="T1"/></text:p>
      <text:p text:style-name="P13"/>
      <text:list xml:id="list172213357158583" text:continue-list="list172212997133615" text:style-name="WWNum2">
        <text:list-item>
          <text:list>
            <text:list-item>
              <text:h text:style-name="P66" text:outline-level="2" loext:marker-style-name="T1"><text:bookmark-start text:name="__RefHeading___Toc4384_1492729285_Copy_1"/><text:span text:style-name="T1">STORICIZZAZIONE</text:span><text:bookmark-end text:name="__RefHeading___Toc4384_1492729285_Copy_1"/><text:span text:style-name="T1"/></text:h>
            </text:list-item>
          </text:list>
        </text:list-item>
      </text:list>
      <text:p text:style-name="P181" loext:marker-style-name="T1"><text:span text:style-name="T1">Al fine di ottenere una visione storica dell’evoluzione nel tempo degli elementi mappati nel software, si prevede una fase di </text:span><text:span text:style-name="T2">storicizzazione</text:span><text:span text:style-name="T1">.</text:span></text:p>
      <text:p text:style-name="P124" loext:marker-style-name="T1"/>
      <text:p text:style-name="P12" loext:marker-style-name="T1"><text:span text:style-name="T1">Bisogna anzitutto fare una distinzione tra elementi dotati di date ed elementi, per così dire, “atemporali”. </text:span><text:span text:style-name="T1"/></text:p>
      <text:p text:style-name="P12" loext:marker-style-name="T1"><text:span text:style-name="T1">Ad esempio, un’intervista ha una data ben precisa, mentre i processi o le strutture non hanno una data analoga; certo, esiste la data di ultima modifica, ma questo dato è relativo a operazioni di backoffice, come l’inserimento fatto in un certo istante, non è attinente alla validità temporale, o “scadenza” dell’elemento stesso. </text:span><text:span text:style-name="T1"/></text:p>
      <text:p text:style-name="P12" loext:marker-style-name="T1"><text:span text:style-name="T1">In altri termini, un’intervista effettuata al tempo </text:span><text:span text:style-name="T6">t</text:span><text:span text:style-name="T1"> può essere considerata obsoleta quando la sua data di effettuazione è più vecchia, rispetto ad oggi, di un tempo </text:span><text:span text:style-name="T6">t1</text:span><text:span text:style-name="T1"> stabilito, mentre un processo non viene considerato “vecchio” in base alla data di ultima modifica; la validità di un processo rappresentato non dipende, infatti, dalla data in cui è stato inserito ma dipende dal fatto che l’organizzazione ha mantenuto quel workflow e quella filiera organizzativa, con determinati input, fasi ed output, che sono attuali ancora oggi, magari a 10 anni di distanza, da quando il processo è stato originariamente mappato; viceversa, un altro processo mappato può diventare obsoleto dopo un solo anno, perché la </text:span><text:span text:style-name="T6">governance </text:span><text:span text:style-name="T11">ha deciso di modificare il suo workflow.</text:span></text:p>
      <text:p text:style-name="P2" loext:marker-style-name="T1"/>
      <text:p text:style-name="P12" loext:marker-style-name="T1"><text:span text:style-name="T1">Ferma restando questa distinzione, la storicizzazione è un obiettivo ottenibile in due modi diversi:</text:span><text:span text:style-name="T1"/></text:p>
      <text:list text:style-name="WWNum49">
        <text:list-item>
          <text:p text:style-name="P182">tramite l’inserimento di una nuova rilevazione, con duplicazione solo degli elementi privi di date di validità (come i processi o le strutture) ma non degli elementi che hanno una data che li àncora ad un dato istante (p.es. le interviste, che in una nuova rilevazione sarebbero vuote e dovrebbero essere quindi rifatte da capo)</text:p>
        </text:list-item>
        <text:list-item>
          <text:p text:style-name="P182">tramite l’implementazione di algoritmi basati sulle date degli elementi che ne hanno di significative.</text:p>
        </text:list-item>
      </text:list>
      <text:p text:style-name="P12"/>
      <text:p text:style-name="P12" loext:marker-style-name="T1"><text:span text:style-name="T1">La storicizzazione tramite rilevazione comporterebbe quindi una duplicazione di quanto presente nel software, tranne gli elementi che già hanno una loro data che ne circoscrive la definizione temporale. Questi ultimi sono principalmente:</text:span><text:span text:style-name="T1"/></text:p>
      <text:list text:style-name="WWNum44">
        <text:list-item>
          <text:p text:style-name="P183">le interviste</text:p>
        </text:list-item>
        <text:list-item>
          <text:p text:style-name="P183">gli indicatori</text:p>
        </text:list-item>
        <text:list-item>
          <text:p text:style-name="P183">le misurazioni</text:p>
        </text:list-item>
      </text:list>
      <text:p text:style-name="P12">Le interviste, infatti, hanno una data di registrazione ben precisa, pertanto, come già detto, non avrebbe senso duplicarle collegandole alla nuova rilevazione.</text:p>
      <text:p text:style-name="P12">Le misurazioni, a loro volta, hanno una data di misurazione, mentre gli indicatori hanno un target che corrisponde a una data specifica. </text:p>
      <text:p text:style-name="P12">Tutti questi elementi, dunque, non ha senso che siano duplicati.</text:p>
      <text:p text:style-name="P12"/>
      <text:p text:style-name="P13"/>
      <text:p text:style-name="P12">Invece, gli elementi privi di data significativa, quali:</text:p>
      <text:list text:style-name="WWNum45">
        <text:list-item>
          <text:p text:style-name="P184">processi (e loro sottoelementi: input, fasi, output)</text:p>
        </text:list-item>
        <text:list-item>
          <text:p text:style-name="P184">rischi</text:p>
        </text:list-item>
        <text:list-item>
          <text:p text:style-name="P184">strutture</text:p>
        </text:list-item>
      </text:list>
      <text:p text:style-name="P12">trarrebbero beneficio dalla storicizzazione tramite rilevazione, perché ciò consentirebbe di mantenere uno storico, anche consultabile a distanza di tempo.</text:p>
      <text:p text:style-name="P12">Ad esempio, se un processo cambia le sue fasi o viene dismesso, ciò avverrebbe solo nell’istanza collegata alla nuova rilevazione; pertanto, nella vecchia rilevazione, il processo, essendo un’istanza diversa, manterebbe la sua struttura originale e sarebbe consultabile tramite una vista storica.</text:p>
      <text:p text:style-name="P12">Analogamente, se l’organigramma cambia, ciò succede nella nuova rilevazione e la vecchia strutturazione è sempre consultabile.</text:p>
      <text:p text:style-name="P12"/>
      <text:p text:style-name="P12">Come si vede, gli scopi dei due sistemi di storicizzazione (1. la rilevazione 2. gli algoritmi temporali basati su date) sono diversi. Può quindi non essere una buona idea implementare il sistema 1. per ottenere un aggiornamento degli elementi che possono essere storicizzati tramite il sistema 2.</text:p>
      <text:p text:style-name="P12">Questi ultimi sono tipicamente gli elementi elencati prima: principalmente interviste, indicatori, misurazioni. La visione storica, infatti, riveste una particolare importanza per questi elementi perché essa è importante in generale per tutti quegli elementi che richiedono un continuo aggiornamento, come i monitoraggi e le interviste. </text:p>
      <text:p text:style-name="P12">In questo senso, siccome questi elementi richiedono una scansione temporale annuale, se la loro storicizzazione venisse collegata alla rilevazione, diverrebbe necessario rifare una nuova rilevazione ogni anno.</text:p>
      <text:p text:style-name="P12">Ciò appare come un effort massivo: reinserire e ricontrollare ogni anno tutti i processi e tutte le strutture, che riceverebbero sì variazioni, ma probabilmente minime o addirittura assenti da un anno all’altro, solo per aggiornare monitoraggi e interviste, pare un processo troppo dispendioso e inefficiente.</text:p>
      <text:p text:style-name="P12">Pertanto, ferma restando la possibilità di inserire una nuova rilevazione - operazione che avrà senso quando si avrà necessità di una revisione massiva degli elementi come i processi e le strutture (p.es. passando da una mappatura di soli macroprocessi e processi a una di macroprocessi/processi/sottoprocessi, che quindi considera anche i sottoprocessi e trasforma molte fasi in questi ultimi) - si decide, in questa fase del progetto, di adottare il sistema 2. e quindi di effettuare la storicizzazione tramite il controllo delle date.</text:p>
      <text:p text:style-name="P12"/>
      <text:p text:style-name="P12">Questa operazione, in particolare, deve essere fatta sui seguenti elementi:</text:p>
      <text:list text:style-name="WWNum46">
        <text:list-item>
          <text:p text:style-name="P185">indicatori (in particolare basandosi sul target);</text:p>
        </text:list-item>
        <text:list-item>
          <text:p text:style-name="P185">misurazioni (in funzione del target dell’indicatore);</text:p>
        </text:list-item>
        <text:list-item>
          <text:p text:style-name="P185">PxI di partenza (in funzione della data intervista);</text:p>
        </text:list-item>
        <text:list-item>
          <text:p text:style-name="P185">misure (con l’aggiunta di una data di scadenza misura).</text:p>
        </text:list-item>
      </text:list>
      <text:p text:style-name="P12">Vediamo la logica di storicizzazione di questi elementi uno per uno, partendo dai PxI.</text:p>
      <text:p text:style-name="P2" loext:marker-style-name="T1"/>
      <text:p text:style-name="P119" loext:marker-style-name="T1"/>
      <text:list xml:id="list172214393302179" text:continue-list="list172213357158583" text:style-name="WWNum2">
        <text:list-item>
          <text:list>
            <text:list-item>
              <text:list>
                <text:list-item>
                  <text:h text:style-name="P84" text:outline-level="3" loext:marker-style-name="T1"><text:bookmark-start text:name="__RefHeading___Toc4598_419530422_Copy_1"/><text:span text:style-name="T1">STORICIZZAZIONE DEI PXI</text:span><text:bookmark-end text:name="__RefHeading___Toc4598_419530422_Copy_1"/><text:span text:style-name="T1"/></text:h>
                </text:list-item>
              </text:list>
            </text:list-item>
          </text:list>
        </text:list-item>
      </text:list>
      <text:p text:style-name="P12" loext:marker-style-name="T1"><text:span text:style-name="T1">Il </text:span><text:span text:style-name="T2">primo step</text:span><text:span text:style-name="T1"> di storicizzazione è quello dei PxI dei processi.</text:span></text:p>
      <text:p text:style-name="P12" loext:marker-style-name="T1"><text:span text:style-name="T1">Il livello del PxI di un processo viene determinato unicamente sulla base delle interviste (e dei relativi livelli degli indicatori). Questo tipo di PxI viene detto “PxI iniziale” per distinguerlo da:</text:span><text:span text:style-name="T1"/></text:p>
      <text:list text:style-name="WWNum47">
        <text:list-item>
          <text:p text:style-name="P186" loext:marker-style-name="T1"><text:span text:style-name="T1">“PxI stimato” (cioè <text:s/>il PxI rivisto alla luce delle misure di mitigazione che si richiede siano applicate)</text:span><text:span text:style-name="T1"/></text:p>
        </text:list-item>
        <text:list-item>
          <text:p text:style-name="P186" loext:marker-style-name="T1"><text:span text:style-name="T1">“PxI monitorato” (cioè il PxI rivisto alla luce delle misure di mitigazione che effettivamente risultano applicate a seguito del monitoraggio degli “indicatori master”).</text:span><text:span text:style-name="T1"/></text:p>
        </text:list-item>
      </text:list>
      <text:p text:style-name="P12" loext:marker-style-name="T1"><text:span text:style-name="T1">Ora, il PxI iniziale non può essere “per sempre” (come un diamante!): se un’intervista, che ha determinato un PxI iniziale, è più vecchia di 4 anni, non va considerata! Solo se c’è una, o più, interviste recenti, il PxI iniziale può essere considerato “attendibile”; pertanto, il PxI iniziale di ogni processo viene storicizzato tramite l’inserimento di questo criterio temporale nella espressione del PxI iniziale.</text:span><text:span text:style-name="T1"/></text:p>
      <text:p text:style-name="P12" loext:marker-style-name="T1"><text:span text:style-name="T1">L’algoritmo da implementare è il seguente (in pseudolinguaggio):</text:span><text:span text:style-name="T1"/></text:p>
      <text:list text:style-name="WWNum48">
        <text:list-item>
          <text:p text:style-name="P187">se esiste un’intervista nell’anno corrente (p.es. il 2026 se la data di consultazione è il 15 giugno 2026) allora il PxI iniziale del processo è quello ricavato in base a tale intervista;</text:p>
        </text:list-item>
        <text:list-item>
          <text:p text:style-name="P187">se esiste più di un’intervista nell’anno corrente, allora il PxI iniziale è ricavato dall’insieme di tutte queste interviste (algoritmo <text:span text:style-name="T146">“in dubio pro peior”</text:span>);</text:p>
        </text:list-item>
        <text:list-item>
          <text:p text:style-name="P187">se NON esiste un’intervista nell’anno corrente, allora il PxI iniziale è determinato dalle interviste (una o più di una) dell’anno precedente (quindi, nel nostro esempio, il 2025). </text:p>
        </text:list-item>
        <text:list-item>
          <text:p text:style-name="P187">Se NON esiste almeno un’intervista 2025, si considera il 2024; </text:p>
        </text:list-item>
        <text:list-item>
          <text:p text:style-name="P187">se NON esiste almeno un’intervista 2024, si va al 2023; </text:p>
        </text:list-item>
        <text:list-item>
          <text:p text:style-name="P187">se non esiste almeno un’intervista 2023, non si cerca ulteriormente perché eventuali interviste risalenti a più di {ANNO CORRENTE - 3} sono considerate troppo vecchie per fornire valori di PxI iniziale attendibili. Pertanto, in questo caso, il valore del PxI iniziale viene ritenuto indeterminato, come se non fossero state mai fatte interviste relative al processo considerato.</text:p>
        </text:list-item>
        <text:list-item>
          <text:p text:style-name="P187">Se esiste più di un’intervista nel triennio precedente, p.es. un’intervista nel 2025 e un’intervista nel 2023, viene considerata SOLO l’intervista dell’anno più recente. </text:p>
        </text:list-item>
        <text:list-item>
          <text:p text:style-name="P187">Quindi in pratica l’algoritmo “in dubio pro peior” (ovvero: nel dubbio si considera il caso peggiore) viene applicato SOLO nel caso di interviste che cadono nello stesso anno solare considerato (l’anno corrente se ci sono, oppure l’anno corrente -1 se ci sono, oppure l’anno corrente -2, <text:s/>etc., ma non viene applicato nel caso di interviste “a scavallo” su anni solari diversi.</text:p>
        </text:list-item>
        <text:list-item>
          <text:p text:style-name="P187">Se il PxI iniziale viene considerato indeterminato perché non ci sono dati abbastanza recenti, allora anche tutti i PxI “derivati” (ovvero il “PxI stimato” e il “PxI monitorato” eventualmente presenti) vengono invalidati.</text:p>
        </text:list-item>
      </text:list>
      <text:p text:style-name="P2" loext:marker-style-name="T1"/>
      <text:p text:style-name="P2" loext:marker-style-name="T1"/>
      <text:list text:continue-list="list172214393302179" text:style-name="WWNum2">
        <text:list-item>
          <text:list>
            <text:list-item>
              <text:list>
                <text:list-item>
                  <text:h text:style-name="P85" text:outline-level="3" loext:marker-style-name="T1"><text:bookmark-start text:name="__RefHeading___Toc4598_419530422_Copy_1_"/><text:span text:style-name="T1">STORICIZZAZIONE DELLE MISURE</text:span><text:bookmark-end text:name="__RefHeading___Toc4598_419530422_Copy_1_"/><text:span text:style-name="T1"/></text:h>
                </text:list-item>
              </text:list>
            </text:list-item>
          </text:list>
        </text:list-item>
      </text:list>
      <text:p text:style-name="P12" loext:marker-style-name="T1"><text:span text:style-name="T1">Il </text:span><text:span text:style-name="T2">secondo step</text:span><text:span text:style-name="T1"> di storicizzazione è quello delle misure di mitigazione. </text:span></text:p>
      <text:p text:style-name="P12" loext:marker-style-name="T1"><text:span text:style-name="T1">Per poter effettuare la storicizzazione delle misure, viene aggiunta una data di scadenza della misura, in base alla quale una misura viene esclusa dal calcolo del “PxI stimato” o del “PxI monitorato” se la data attuale è posteriore alla data di scadenza (cioè se la misura è scaduta).</text:span><text:span text:style-name="T1"/></text:p>
      <text:p text:style-name="P12" loext:marker-style-name="T1"><text:span text:style-name="T1">L’idea logica alla base è la stessa dell’algoritmo del “PxI iniziale”: se un elemento è “troppo vecchio” non è più sufficientemente valido o attendibile da poter entrare nel computo dei PxI.</text:span><text:span text:style-name="T1"/></text:p>
      <text:p text:style-name="P12" loext:marker-style-name="T1"><text:span text:style-name="T1">Inoltre, la storicizzazione ha anche un riferimento di validità iniziale, che è basato sulla data di inserimento dei dettagli del monitoraggio.</text:span><text:span text:style-name="T1"/></text:p>
      <text:p text:style-name="P2" loext:marker-style-name="T1"/>
      <text:p text:style-name="P2" loext:marker-style-name="T1"><draw:custom-shape text:anchor-type="char" draw:z-index="7" draw:name="Frame42" draw:style-name="gr32" draw:text-style-name="P265" svg:width="17.59cm" svg:height="14.593cm" svg:x="0cm" svg:y="0.002cm"><text:p text:style-name="P25" loext:marker-style-name="T45"><text:span text:style-name="T86"><draw:frame draw:style-name="fr2" draw:name="Image3" text:anchor-type="as-char" svg:width="17.59cm" svg:height="13.682cm" draw:z-index="12"><draw:image xlink:href="Pictures/10000001000005CE000004842E434480.png" xlink:type="simple" xlink:show="embed" xlink:actuate="onLoad" draw:mime-type="image/png"/></draw:frame></text:span><text:span text:style-name="T45">Fig. 41 - Scheda della misura, con la data di inserimento dei dettagli del monitoraggi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 loext:marker-style-name="T1"><text:span text:style-name="T1">La data in cui i dettagli del monitoraggio vengono inseriti viene memorizzata in un apposito campo della misura monitorata (che è una </text:span><text:span text:style-name="T6">is a </text:span><text:span text:style-name="T11">della misura). Si preferisce utilizzare questa data anziché la data di ultima modifica della misura perché si prevede di implementare la funzione di modifica della misura, </text:span><text:soft-page-break/><text:span text:style-name="T11">tramite cui sarà possibile inserire la data di scadenza della validità della misura stessa. Infatti, mentre la data di ultima modifica cambia ad ogni aggiornamento della misura, la data di inserimento dei dettagli del monitoraggio non cambia perché è sulla </text:span><text:span text:style-name="T6">is a </text:span><text:span text:style-name="T11">e non sull’oggetto padre.</text:span></text:p>
      <text:p text:style-name="P12" loext:marker-style-name="T1"><text:span text:style-name="T11">La data di scadenza della misura si rifletterà anche sulla pagina dei dettagli di un processo, perché le misure scadute non verranno visualizzate nella sezione dei rischi e fattori abilitanti.</text:span><text:span text:style-name="T11"/></text:p>
      <text:p text:style-name="P2" loext:marker-style-name="T1"/>
      <text:list xml:id="list172214223943058" text:continue-numbering="true" text:style-name="WWNum2">
        <text:list-item>
          <text:list>
            <text:list-item>
              <text:list>
                <text:list-item>
                  <text:h text:style-name="P84" text:outline-level="3" loext:marker-style-name="T1"><text:bookmark-start text:name="__RefHeading___Toc4598_419530422_Copy_11"/><text:span text:style-name="T1">STORICIZZAZIONE DEGLI INDICATORI DI MONITORAGGIO</text:span><text:bookmark-end text:name="__RefHeading___Toc4598_419530422_Copy_11"/><text:span text:style-name="T1"/></text:h>
                </text:list-item>
              </text:list>
            </text:list-item>
          </text:list>
        </text:list-item>
      </text:list>
      <text:p text:style-name="P12" loext:marker-style-name="T1"><text:span text:style-name="T1">Gli indicatori di monitoraggio vengono storicizzati in base alla data della baseline e del target.</text:span><text:span text:style-name="T1"/></text:p>
      <text:p text:style-name="P12" loext:marker-style-name="T1"><text:span text:style-name="T1">Ad esempio, se un indicatore ha baseline e target 2025, non ha senso che venga visto nel monitoraggio 2026. </text:span><text:span text:style-name="T1"/></text:p>
      <text:p text:style-name="P12" loext:marker-style-name="T1"><text:span text:style-name="T1">Il cruscotto del monitoraggio, pertanto, avrà una casella a discesa che permetterà di selezionare tutti gli indicatori con target attinente all’anno desiderato.</text:span><text:span text:style-name="T1"/></text:p>
      <text:p text:style-name="P2" loext:marker-style-name="T1"/>
      <text:p text:style-name="P2" loext:marker-style-name="T1"><draw:custom-shape text:anchor-type="char" draw:z-index="11" draw:name="Frame41" draw:style-name="gr30" draw:text-style-name="P265" svg:width="17.59cm" svg:height="11.925cm" svg:x="0cm" svg:y="0.002cm"><text:p text:style-name="P26" loext:marker-style-name="T148"><text:span text:style-name="T86"><draw:frame draw:style-name="fr2" draw:name="Image2" text:anchor-type="as-char" svg:width="17.59cm" svg:height="11.238cm" draw:z-index="128"><draw:image xlink:href="Pictures/10000001000005C7000003B18AA6BCA3.png" xlink:type="simple" xlink:show="embed" xlink:actuate="onLoad" draw:mime-type="image/png"/></draw:frame></text:span><text:span text:style-name="T89">Fig. 42 - Esempio di monitoraggio storicizzat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 loext:marker-style-name="T1"><text:span text:style-name="T1">Come funzionerà questa pagina?</text:span><text:span text:style-name="T1"/></text:p>
      <text:p text:style-name="P12" loext:marker-style-name="T1"><text:span text:style-name="T1">Verranno mostrate tutte le misure che:</text:span><text:span text:style-name="T1"/></text:p>
      <text:list text:style-name="WWNum50">
        <text:list-item>
          <text:p text:style-name="P188" loext:marker-style-name="T1"><text:span text:style-name="T1">non risultano scadute entro l’anno selezionato e</text:span><text:span text:style-name="T1"/></text:p>
        </text:list-item>
        <text:list-item>
          <text:p text:style-name="P188" loext:marker-style-name="T1"><text:span text:style-name="T1">la cui data dei dettagli monitoraggio non risulta successiva all’anno stesso.</text:span><text:span text:style-name="T1"/></text:p>
        </text:list-item>
      </text:list>
      <text:p text:style-name="P13"/>
      <text:p text:style-name="P12" loext:marker-style-name="T1"><text:span text:style-name="T1">Esempio: </text:span><text:span text:style-name="T1"/></text:p>
      <text:p text:style-name="P12" loext:marker-style-name="T1"><text:span text:style-name="T1">data la misura “</text:span><text:a xlink:type="simple" xlink:href="https://at.univr.it/roltest/?q=ms&amp;p=mes&amp;mliv=MP.S.16&amp;r=AT2022" text:style-name="Internet_20_link" text:visited-style-name="Visited_20_Internet_20_Link"><text:span text:style-name="Internet_20_link"><text:span text:style-name="T172">Applicazione regolamenti per l'autorizzazione allo svolgimento di incarichi extra-istituzionali del personale dell'Ateneo</text:span></text:span></text:a><text:span text:style-name="T1">“ avente:</text:span></text:p>
      <text:list text:style-name="WWNum51">
        <text:list-item>
          <text:p text:style-name="P189" loext:marker-style-name="T1"><text:span text:style-name="T1">data di dettagli monitoraggio = 08/04/2024 e </text:span><text:span text:style-name="T1"/></text:p>
        </text:list-item>
        <text:list-item>
          <text:p text:style-name="P189" loext:marker-style-name="T1"><text:span text:style-name="T1">data di scadenza misura = 31/12/2025</text:span><text:span text:style-name="T1"/></text:p>
        </text:list-item>
      </text:list>
      <text:p text:style-name="P12" loext:marker-style-name="T1"><text:span text:style-name="T1">essa verrà mostrata nel monitoraggio degli anni 2024 e 2025 ma non 2023 (e precedenti) o 2026 (e successivi). Questo avviene perché negli anni 2026 e successivi la misura risulta scaduta, mentre negli anni 2023 e precedenti, la misura risulta non ancora dettagliata.</text:span><text:span text:style-name="T1"/></text:p>
      <text:p text:style-name="P12" loext:marker-style-name="T1"><text:span text:style-name="T1">Questo filtro sulle misure visualizzate è il primo filtro, a monte.</text:span><text:span text:style-name="T1"/></text:p>
      <text:p text:style-name="P12" loext:marker-style-name="T1"><text:span text:style-name="T1">Vi è poi un secondo filtro, che riguarda gli indicatori di monitoraggio. Vengono infatti mostrati tutti gli indicatori di monitoraggio attivi nell’anno corrente, il che significa che devono avere baseline o target (o entrambi) che cadono nell’anno corrente.</text:span><text:span text:style-name="T1"/></text:p>
      <text:p text:style-name="P12" loext:marker-style-name="T1"><text:span text:style-name="T1">Tornando all’esempio precedente, fermo restando il filtro sulle misure, nell’anno 2025 verranno visti solo gli indicatori che hanno baseline iniziata nel 2025 oppure target terminato nel 2025 (o entrambi che cadono nel 2025, nel caso di indicatori annuali). </text:span><text:span text:style-name="T1"/></text:p>
      <text:p text:style-name="P2">Se un indicatore ha target “a scavallo” da un anno all’altro, p.es. ha baseline nel 2025 e target nel 2026 (nel raro caso di un indicatore pluriennale) dovrà essere visto in entrambi gli anni, cioè sia nel 2025 sia nel 2026. </text:p>
      <text:p text:style-name="P12" loext:marker-style-name="T1"><text:span text:style-name="T1">Se nell’anno considerato non vengono trovati indicatori, verranno mostrati i bottoni “+ Indicatore” che permetteranno di aggiungere un indicatore su una fase determinata.</text:span><text:span text:style-name="T1"/></text:p>
      <text:p text:style-name="P12" loext:marker-style-name="T1"><text:span text:style-name="T1">In questo modo, a tendere le fasi avranno parecchi indicatori collegati, man man che passa il tempo e che nuovi target devono essere raggiunti e nuove misurazioni essere fornite.</text:span><text:span text:style-name="T1"/></text:p>
      <text:p text:style-name="P2" loext:marker-style-name="T1"/>
      <text:p text:style-name="P12"/>
      <text:list text:continue-list="list172214223943058" text:style-name="WWNum2">
        <text:list-item>
          <text:list>
            <text:list-item>
              <text:list>
                <text:list-item>
                  <text:h text:style-name="P84" text:outline-level="3" loext:marker-style-name="T1"><text:bookmark-start text:name="__RefHeading___Toc4598_419530422_Copy_13"/><text:span text:style-name="T1">ADEGUAMENTO DELLA REPORTISTICA</text:span><text:bookmark-end text:name="__RefHeading___Toc4598_419530422_Copy_13"/><text:span text:style-name="T1"/></text:h>
                </text:list-item>
              </text:list>
            </text:list-item>
          </text:list>
        </text:list-item>
      </text:list>
      <text:p text:style-name="P12" loext:marker-style-name="T1"><text:span text:style-name="T1">Sarà necessario implementare funzionalità di stampa report per poter “salvare” lo stato: </text:span><text:span text:style-name="T1"/></text:p>
      <text:list text:style-name="WWNum52">
        <text:list-item>
          <text:p text:style-name="P190" loext:marker-style-name="T1"><text:span text:style-name="T1">dei PxI iniziali</text:span><text:span text:style-name="T1"/></text:p>
        </text:list-item>
        <text:list-item>
          <text:p text:style-name="P190" loext:marker-style-name="T1"><text:span text:style-name="T1">dei PxI stimati (quindi delle misure previste)</text:span><text:span text:style-name="T1"/></text:p>
        </text:list-item>
        <text:list-item>
          <text:p text:style-name="P190" loext:marker-style-name="T1"><text:span text:style-name="T1">dei PxI monitorati (quindi delle misure applicate).</text:span><text:span text:style-name="T1"/></text:p>
        </text:list-item>
      </text:list>
      <text:p text:style-name="P12" loext:marker-style-name="T1"><text:span text:style-name="T1">Infatti, nel caso in cui un PxI iniziale sia diventato obsolescente a causa di un’intervista troppo “vecchia”, esso verrà escluso dal report; di conseguenza verranno esclusi anche il suo PxI stimato e PxI monitorato, perché non è possibile stimare una riduzione di un PxI che non è determinato, e tanto meno monitorare la riduzione di un PxI che non esiste più in quanto non viene più considerato.</text:span><text:span text:style-name="T1"/></text:p>
      <text:p text:style-name="P12" loext:marker-style-name="T1"><text:span text:style-name="T1">A tal proposito, è opportuno prevedere l’implementazione di un ulteriore report complessivo, dato dall’unione dei 3 report aggregati attualmente disponibili (tabella di PxI, report PxI stimati e report PxI monitorati). Sarà quest’ultimo ad avere i metodi di stampa per poter salvare una istantanea della situazione a una certa data. </text:span><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Bahnschrift" svg:font-family="Bahnschrift" style:font-family-generic="roman" style:font-pitch="variable"/>
    <style:font-face style:name="Bahnschrift Light" svg:font-family="'Bahnschrift Light'"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roman"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ans-serif" style:font-family-generic="roman" style:font-pitch="variable"/>
    <style:font-face style:name="NSimSun" svg:font-family="NSimSun" style:font-family-generic="system" style:font-pitch="variable"/>
    <style:font-face style:name="Nimbus Mono PS" svg:font-family="'Nimbus Mono PS'" style:font-family-generic="roman"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Reem Kufi" svg:font-family="'Reem Kufi'" style:font-family-generic="roman" style:font-pitch="variable"/>
    <style:font-face style:name="Source Code Pro" svg:font-family="'Source Code Pro'" style:font-family-generic="roman"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system" style:font-pitch="variable"/>
    <style:font-face style:name="Ubuntu Mono" svg:font-family="'Ubuntu Mono'" style:font-family-generic="roman"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it" fo:country="IT" style:letter-kerning="true" style:font-name-asian="NSimSun"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1"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WWNum2" style:list-level="1" style:class="text">
      <style:paragraph-properties fo:margin-left="0cm" fo:text-align="center" style:justify-single-word="false" fo:text-indent="0cm" style:auto-text-indent="false" fo:keep-with-next="always"/>
      <style:text-properties fo:font-size="20pt" fo:font-weight="bold" style:font-size-asian="20pt" style:font-weight-asian="bold" style:font-name-complex="Arial1" style:font-family-complex="Arial" style:font-family-generic-complex="system" style:font-pitch-complex="variable" style:font-weight-complex="bold"/>
    </style:style>
    <style:style style:name="Heading_20_2" style:display-name="Heading 2" style:family="paragraph" style:parent-style-name="Titolo" style:next-style-name="Text_20_body" style:default-outline-level="2" style:list-style-name="WWNum2" style:list-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Titolo" style:next-style-name="Text_20_body" style:default-outline-level="3" style:list-style-name="WWNum2" style:list-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Titolo" style:next-style-name="Text_20_body" style:default-outline-level="4" style:list-style-name="WWNum1" style:list-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Standard" style:next-style-name="Standard" style:default-outline-level="5" style:list-style-name="WWNum2" style:list-level="5" style:class="text">
      <style:paragraph-properties fo:keep-with-next="always"/>
      <style:text-properties fo:font-size="12pt" fo:font-style="italic" fo:font-weight="bold" style:font-size-asian="12pt" style:font-style-asian="italic" style:font-weight-asian="bold" style:font-style-complex="italic" style:font-weight-complex="bold"/>
    </style:style>
    <style:style style:name="Heading_20_6" style:display-name="Heading 6" style:family="paragraph" style:parent-style-name="Standard" style:next-style-name="Standard" style:default-outline-level="6" style:list-style-name="WWNum2" style:list-level="6" style:class="text">
      <style:paragraph-properties fo:text-align="center" style:justify-single-word="false" fo:keep-with-next="always"/>
      <style:text-properties fo:font-size="36pt" fo:font-weight="bold" style:font-size-asian="36pt" style:font-weight-asian="bold" style:font-weight-complex="bold"/>
    </style:style>
    <style:style style:name="Heading_20_8" style:display-name="Heading 8" style:family="paragraph" style:parent-style-name="Standard" style:next-style-name="Standard" style:default-outline-level="8" style:list-style-name="WWNum2" style:list-level="8" style:class="text">
      <style:paragraph-properties fo:text-align="center" style:justify-single-word="false" fo:keep-with-next="always"/>
      <style:text-properties fo:font-size="16pt" style:font-size-asian="16pt"/>
    </style:style>
    <style:style style:name="Titolo"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Indice" style:family="paragraph" style:parent-style-name="Standard">
      <style:paragraph-properties text:number-lines="false" text:line-number="0"/>
      <style:text-properties style:font-name-complex="Lucida Sans1" style:font-family-complex="'Lucida Sans'" style:font-family-generic-complex="system" style:font-pitch-complex="variable"/>
    </style:style>
    <style:style style:name="Contents_20_1" style:display-name="Contents 1" style:family="paragraph" style:parent-style-name="Heading_20_1" style:next-style-name="Standard" style:list-style-name="" style:class="index">
      <style:paragraph-properties fo:margin-left="0cm" fo:text-indent="0cm" style:auto-text-indent="false">
        <style:tab-stops>
          <style:tab-stop style:position="16.983cm" style:type="right" style:leader-style="dotted" style:leader-text="."/>
        </style:tab-stops>
      </style:paragraph-properties>
      <style:text-properties style:font-name="Arial" fo:font-family="Arial" style:font-family-generic="roman" style:font-pitch="variable" fo:font-size="12pt" fo:font-weight="bold" style:font-size-asian="12pt" style:language-asian="en" style:country-asian="US" style:font-weight-asian="bold" style:font-name-complex="Arial1" style:font-family-complex="Arial" style:font-family-generic-complex="system" style:font-pitch-complex="variable" style:font-weight-complex="bold"/>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paragraph-properties fo:margin-left="0.423cm" fo:text-indent="-0.423cm" style:auto-text-indent="false"/>
    </style:style>
    <style:style style:name="Contents_20_4" style:display-name="Contents 4" style:family="paragraph" style:parent-style-name="Standard" style:next-style-name="Standard" style:class="index">
      <style:paragraph-properties fo:margin-left="1.27cm" fo:text-indent="0cm" style:auto-text-indent="false"/>
    </style:style>
    <style:style style:name="Heading_20_10_20__28_paragraph_29_" style:display-name="Heading 10 (paragraph)"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0pt" fo:language="it" fo:country="IT" style:text-underline-style="solid" style:text-underline-width="auto" style:text-underline-color="font-color" fo:font-weight="bold" style:letter-kerning="true" style:font-name-asian="Times New Roman" style:font-family-asian="'Times New Roman'" style:font-family-generic-asian="system" style:font-pitch-asian="variable" style:font-size-asian="10pt" style:language-asian="zh" style:country-asian="CN" style:font-weight-asian="bold" style:font-name-complex="Arial1" style:font-family-complex="Arial" style:font-family-generic-complex="system" style:font-pitch-complex="variable" style:font-size-complex="12pt" style:language-complex="ar" style:country-complex="SA" style:font-style-complex="italic" style:font-weight-complex="bold" fo:hyphenate="false" fo:hyphenation-remain-char-count="2" fo:hyphenation-push-char-count="2" loext:hyphenation-no-caps="false" loext:hyphenation-no-last-word="false" loext:hyphenation-word-char-count="5" loext:hyphenation-zone="no-limit"/>
    </style:style>
    <style:style style:name="Style_20_Heading_20_10_20__28_paragraph_29__20__2b__20_Left_3a__20__20_032_20_cm" style:display-name="Style Heading 10 (paragraph) + Left:  032 cm" style:family="paragraph" style:parent-style-name="Heading_20_10_20__28_paragraph_29_">
      <style:paragraph-properties fo:margin-left="0.3cm" fo:margin-right="0cm" fo:margin-top="0.212cm" fo:margin-bottom="0cm" style:contextual-spacing="false" fo:text-align="start" style:justify-single-word="false" fo:orphans="2" fo:widows="2" fo:hyphenation-ladder-count="no-limit" fo:text-indent="-0.3cm" style:auto-text-indent="false" style:writing-mode="lr-tb"/>
      <style:text-properties style:use-window-font-color="true" loext:opacity="0%" style:font-name="Arial" fo:font-family="Arial" style:font-family-generic="roman" style:font-pitch="variable" fo:font-size="10pt" fo:language="it" fo:country="IT" style:text-underline-style="solid" style:text-underline-width="auto" style:text-underline-color="font-color" fo:font-weight="bold" style:letter-kerning="true" style:font-name-asian="Times New Roman" style:font-family-asian="'Times New Roman'" style:font-family-generic-asian="system" style:font-pitch-asian="variable" style:font-size-asian="10pt" style:language-asian="zh" style:country-asian="CN" style:font-weight-asian="bold" style:font-name-complex="Arial1" style:font-family-complex="Arial" style:font-family-generic-complex="system" style:font-pitch-complex="variable" style:font-size-complex="10pt" style:language-complex="ar" style:country-complex="SA" style:font-style-complex="normal" style:font-weight-complex="bold" fo:hyphenate="false" fo:hyphenation-remain-char-count="2" fo:hyphenation-push-char-count="2" loext:hyphenation-no-caps="false" loext:hyphenation-no-last-word="false" loext:hyphenation-word-char-count="5" loext:hyphenation-zone="no-limit"/>
    </style:style>
    <style:style style:name="TOA_20_Heading" style:display-name="TOA Heading" style:family="paragraph" style:parent-style-name="Index_20_Heading">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ice" style:class="index">
      <style:paragraph-properties fo:margin-left="0.998cm" fo:text-indent="0cm" style:auto-text-indent="false">
        <style:tab-stops>
          <style:tab-stop style:position="16.591cm" style:type="right" style:leader-style="dotted" style:leader-text="."/>
        </style:tab-stops>
      </style:paragraph-properties>
      <style:text-properties style:font-name="Arial" fo:font-family="Arial" style:font-family-generic="roman" style:font-pitch="variable" fo:font-size="10pt" fo:font-weight="normal" style:font-size-asian="10pt" style:font-weight-asian="normal"/>
    </style:style>
    <style:style style:name="Contents_20_2" style:display-name="Contents 2" style:family="paragraph" style:parent-style-name="Indice" style:class="index">
      <style:paragraph-properties fo:margin-left="0.499cm" fo:text-indent="0cm" style:auto-text-indent="false">
        <style:tab-stops>
          <style:tab-stop style:position="17.09cm" style:type="right" style:leader-style="dotted" style:leader-text="."/>
        </style:tab-stops>
      </style:paragraph-properties>
      <style:text-properties style:font-name="Arial" fo:font-family="Arial" style:font-family-generic="roman" style:font-pitch="variable"/>
    </style:style>
    <style:style style:name="Footnote" style:family="paragraph" style:parent-style-name="Standard" style:class="extra">
      <style:paragraph-properties fo:margin-left="0.598cm" fo:text-indent="-0.598cm" style:auto-text-indent="false" text:number-lines="false" text:line-number="0"/>
      <style:text-properties fo:font-size="10pt" style:font-size-asian="10pt" style:font-size-complex="10pt"/>
    </style:style>
    <style:style style:name="Titolo_20_elenco" style:display-name="Titolo elenco" style:family="paragraph" style:parent-style-name="Standard" style:next-style-name="Contenuto_20_elenco">
      <style:paragraph-properties fo:text-indent="0cm" style:auto-text-indent="false"/>
    </style:style>
    <style:style style:name="Contenuto_20_elenco" style:display-name="Contenuto elenco" style:family="paragraph" style:parent-style-name="Standard">
      <style:paragraph-properties fo:margin-left="1cm" fo:text-indent="0cm" style:auto-text-indent="false"/>
    </style:style>
    <style:style style:name="Intestazione_20_e_20_piè_20_di_20_pagina" style:display-name="Intestazione e piè di pagina" style:family="paragraph" style:parent-style-name="Standard">
      <style:paragraph-properties text:number-lines="false" text:line-number="0">
        <style:tab-stops>
          <style:tab-stop style:position="8.795cm" style:type="center"/>
          <style:tab-stop style:position="17.59cm" style:type="right"/>
        </style:tab-stops>
      </style:paragraph-properties>
    </style:style>
    <style:style style:name="Header_20_and_20_Footer" style:display-name="Header and Footer" style:family="paragraph" style:parent-style-name="Standard" style:class="extra"/>
    <style:style style:name="Footer" style:family="paragraph" style:parent-style-name="Intestazione_20_e_20_piè_20_di_20_pagina" style:class="extra">
      <style:paragraph-properties text:number-lines="false" text:line-number="0"/>
    </style:style>
    <style:style style:name="Figura" style:family="paragraph" style:parent-style-name="Caption"/>
    <style:style style:name="Contenuto_20_cornice" style:display-name="Contenuto cornice" style:family="paragraph" style:parent-style-name="Standard"/>
    <style:style style:name="Linea_20_orizzontale" style:display-name="Linea orizzontale" style:family="paragraph" style:parent-style-name="Standard" style:next-style-name="Text_20_body">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Contenuto_20_tabella" style:display-name="Contenuto tabella" style:family="paragraph" style:parent-style-name="Standard">
      <style:paragraph-properties fo:orphans="0" fo:widows="0" text:number-lines="false" text:line-number="0"/>
    </style:style>
    <style:style style:name="Tabella" style:family="paragraph" style:parent-style-name="Caption"/>
    <style:style style:name="Titolo_20_tabella" style:display-name="Titolo tabella" style:family="paragraph" style:parent-style-name="Contenuto_20_tabell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alto_20_a_20_indice" style:display-name="Salto a indice" style:family="text"/>
    <style:style style:name="Punti"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Caratteri_20_nota_20_a_20_piè_20_di_20_pagina" style:display-name="Caratteri nota a piè di pagina" style:family="tex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Characters1" style:display-name="Footnote Characters1" style:family="text">
      <style:text-properties style:text-position="super 58%"/>
    </style:style>
    <style:style style:name="Caratteri_20_nota_20_di_20_chiusura" style:display-name="Caratteri nota di chiusura" style:family="text">
      <style:text-properties style:text-position="super 58%"/>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Characters1" style:display-name="Endnote Characters1" style:family="text">
      <style:text-properties style:text-position="super 58%"/>
    </style:style>
    <style:style style:name="Caratteri_20_di_20_numerazione" style:display-name="Caratteri di numerazione" style:family="text">
      <style:text-properties fo:font-weight="normal" style:font-weight-asian="normal" style:font-weight-complex="norma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ariabile" style:family="text">
      <style:text-properties fo:font-style="italic" style:font-style-asian="italic" style:font-style-complex="italic"/>
    </style:style>
    <style:style style:name="Testo_20_sorgente" style:display-name="Testo sorgente"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Internet_20_Link1" style:display-name="Internet Link1"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fo:font-weight="normal" style:font-weight-asian="normal" style:font-weight-complex="normal"/>
    </style:style>
    <style:style style:name="ListLabel_20_83" style:display-name="ListLabel 83" style:family="text">
      <style:text-properties fo:font-weight="normal" style:font-weight-asian="normal" style:font-weight-complex="normal"/>
    </style:style>
    <style:style style:name="ListLabel_20_84" style:display-name="ListLabel 84" style:family="text">
      <style:text-properties fo:font-weight="normal" style:font-weight-asian="normal" style:font-weight-complex="normal"/>
    </style:style>
    <style:style style:name="ListLabel_20_85" style:display-name="ListLabel 85" style:family="text">
      <style:text-properties fo:font-weight="normal" style:font-weight-asian="normal" style:font-weight-complex="normal"/>
    </style:style>
    <style:style style:name="ListLabel_20_86" style:display-name="ListLabel 86" style:family="text">
      <style:text-properties fo:font-weight="normal" style:font-weight-asian="normal" style:font-weight-complex="normal"/>
    </style:style>
    <style:style style:name="ListLabel_20_87" style:display-name="ListLabel 87" style:family="text">
      <style:text-properties fo:font-weight="normal" style:font-weight-asian="normal" style:font-weight-complex="normal"/>
    </style:style>
    <style:style style:name="ListLabel_20_88" style:display-name="ListLabel 88" style:family="text">
      <style:text-properties fo:font-weight="normal" style:font-weight-asian="normal" style:font-weight-complex="normal"/>
    </style:style>
    <style:style style:name="ListLabel_20_89" style:display-name="ListLabel 89" style:family="text">
      <style:text-properties fo:font-weight="normal" style:font-weight-asian="normal" style:font-weight-complex="normal"/>
    </style:style>
    <style:style style:name="ListLabel_20_90" style:display-name="ListLabel 90" style:family="text">
      <style:text-properties fo:font-weight="normal" style:font-weight-asian="normal" style:font-weight-complex="normal"/>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fo:font-weight="normal" style:font-weight-asian="normal" style:font-weight-complex="normal"/>
    </style:style>
    <style:style style:name="ListLabel_20_101" style:display-name="ListLabel 101" style:family="text">
      <style:text-properties fo:font-weight="normal" style:font-weight-asian="normal" style:font-weight-complex="normal"/>
    </style:style>
    <style:style style:name="ListLabel_20_102" style:display-name="ListLabel 102" style:family="text">
      <style:text-properties fo:font-weight="normal" style:font-weight-asian="normal" style:font-weight-complex="normal"/>
    </style:style>
    <style:style style:name="ListLabel_20_103" style:display-name="ListLabel 103" style:family="text">
      <style:text-properties fo:font-weight="normal" style:font-weight-asian="normal" style:font-weight-complex="normal"/>
    </style:style>
    <style:style style:name="ListLabel_20_104" style:display-name="ListLabel 104" style:family="text">
      <style:text-properties fo:font-weight="normal" style:font-weight-asian="normal" style:font-weight-complex="normal"/>
    </style:style>
    <style:style style:name="ListLabel_20_105" style:display-name="ListLabel 105" style:family="text">
      <style:text-properties fo:font-weight="normal" style:font-weight-asian="normal" style:font-weight-complex="normal"/>
    </style:style>
    <style:style style:name="ListLabel_20_106" style:display-name="ListLabel 106" style:family="text">
      <style:text-properties fo:font-weight="normal" style:font-weight-asian="normal" style:font-weight-complex="normal"/>
    </style:style>
    <style:style style:name="ListLabel_20_107" style:display-name="ListLabel 107" style:family="text">
      <style:text-properties fo:font-weight="normal" style:font-weight-asian="normal" style:font-weight-complex="normal"/>
    </style:style>
    <style:style style:name="ListLabel_20_108" style:display-name="ListLabel 108" style:family="text">
      <style:text-properties fo:font-weight="normal" style:font-weight-asian="normal" style:font-weight-complex="normal"/>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fo:font-weight="normal" style:font-weight-asian="normal" style:font-weight-complex="normal"/>
    </style:style>
    <style:style style:name="ListLabel_20_119" style:display-name="ListLabel 119" style:family="text">
      <style:text-properties fo:font-weight="normal" style:font-weight-asian="normal" style:font-weight-complex="normal"/>
    </style:style>
    <style:style style:name="ListLabel_20_120" style:display-name="ListLabel 120" style:family="text">
      <style:text-properties fo:font-weight="normal" style:font-weight-asian="normal" style:font-weight-complex="normal"/>
    </style:style>
    <style:style style:name="ListLabel_20_121" style:display-name="ListLabel 121" style:family="text">
      <style:text-properties fo:font-weight="normal" style:font-weight-asian="normal" style:font-weight-complex="normal"/>
    </style:style>
    <style:style style:name="ListLabel_20_122" style:display-name="ListLabel 122" style:family="text">
      <style:text-properties fo:font-weight="normal" style:font-weight-asian="normal" style:font-weight-complex="normal"/>
    </style:style>
    <style:style style:name="ListLabel_20_123" style:display-name="ListLabel 123" style:family="text">
      <style:text-properties fo:font-weight="normal" style:font-weight-asian="normal" style:font-weight-complex="normal"/>
    </style:style>
    <style:style style:name="ListLabel_20_124" style:display-name="ListLabel 124" style:family="text">
      <style:text-properties fo:font-weight="normal" style:font-weight-asian="normal" style:font-weight-complex="normal"/>
    </style:style>
    <style:style style:name="ListLabel_20_125" style:display-name="ListLabel 125" style:family="text">
      <style:text-properties fo:font-weight="normal" style:font-weight-asian="normal" style:font-weight-complex="normal"/>
    </style:style>
    <style:style style:name="ListLabel_20_126" style:display-name="ListLabel 126" style:family="text">
      <style:text-properties fo:font-weight="normal" style:font-weight-asian="normal" style:font-weight-complex="normal"/>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fo:font-weight="normal" style:font-weight-asian="normal" style:font-weight-complex="normal"/>
    </style:style>
    <style:style style:name="ListLabel_20_137" style:display-name="ListLabel 137" style:family="text">
      <style:text-properties fo:font-weight="normal" style:font-weight-asian="normal" style:font-weight-complex="normal"/>
    </style:style>
    <style:style style:name="ListLabel_20_138" style:display-name="ListLabel 138" style:family="text">
      <style:text-properties fo:font-weight="normal" style:font-weight-asian="normal" style:font-weight-complex="normal"/>
    </style:style>
    <style:style style:name="ListLabel_20_139" style:display-name="ListLabel 139" style:family="text">
      <style:text-properties fo:font-weight="normal" style:font-weight-asian="normal" style:font-weight-complex="normal"/>
    </style:style>
    <style:style style:name="ListLabel_20_140" style:display-name="ListLabel 140" style:family="text">
      <style:text-properties fo:font-weight="normal" style:font-weight-asian="normal" style:font-weight-complex="normal"/>
    </style:style>
    <style:style style:name="ListLabel_20_141" style:display-name="ListLabel 141" style:family="text">
      <style:text-properties fo:font-weight="normal" style:font-weight-asian="normal" style:font-weight-complex="normal"/>
    </style:style>
    <style:style style:name="ListLabel_20_142" style:display-name="ListLabel 142" style:family="text">
      <style:text-properties fo:font-weight="normal" style:font-weight-asian="normal" style:font-weight-complex="normal"/>
    </style:style>
    <style:style style:name="ListLabel_20_143" style:display-name="ListLabel 143" style:family="text">
      <style:text-properties fo:font-weight="normal" style:font-weight-asian="normal" style:font-weight-complex="normal"/>
    </style:style>
    <style:style style:name="ListLabel_20_144" style:display-name="ListLabel 144" style:family="text">
      <style:text-properties fo:font-weight="normal" style:font-weight-asian="normal" style:font-weight-complex="normal"/>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fo:font-weight="normal" style:font-weight-asian="normal" style:font-weight-complex="normal"/>
    </style:style>
    <style:style style:name="ListLabel_20_164" style:display-name="ListLabel 164" style:family="text">
      <style:text-properties fo:font-weight="normal" style:font-weight-asian="normal" style:font-weight-complex="normal"/>
    </style:style>
    <style:style style:name="ListLabel_20_165" style:display-name="ListLabel 165" style:family="text">
      <style:text-properties fo:font-weight="normal" style:font-weight-asian="normal" style:font-weight-complex="normal"/>
    </style:style>
    <style:style style:name="ListLabel_20_166" style:display-name="ListLabel 166" style:family="text">
      <style:text-properties fo:font-weight="normal" style:font-weight-asian="normal" style:font-weight-complex="normal"/>
    </style:style>
    <style:style style:name="ListLabel_20_167" style:display-name="ListLabel 167" style:family="text">
      <style:text-properties fo:font-weight="normal" style:font-weight-asian="normal" style:font-weight-complex="normal"/>
    </style:style>
    <style:style style:name="ListLabel_20_168" style:display-name="ListLabel 168" style:family="text">
      <style:text-properties fo:font-weight="normal" style:font-weight-asian="normal" style:font-weight-complex="normal"/>
    </style:style>
    <style:style style:name="ListLabel_20_169" style:display-name="ListLabel 169" style:family="text">
      <style:text-properties fo:font-weight="normal" style:font-weight-asian="normal" style:font-weight-complex="normal"/>
    </style:style>
    <style:style style:name="ListLabel_20_170" style:display-name="ListLabel 170" style:family="text">
      <style:text-properties fo:font-weight="normal" style:font-weight-asian="normal" style:font-weight-complex="normal"/>
    </style:style>
    <style:style style:name="ListLabel_20_171" style:display-name="ListLabel 171" style:family="text">
      <style:text-properties fo:font-weight="normal" style:font-weight-asian="normal" style:font-weight-complex="normal"/>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Symbol1" style:font-family-complex="Symbol" style:font-family-generic-complex="system" style:font-pitch-complex="variable"/>
    </style:style>
    <style:style style:name="ListLabel_20_185" style:display-name="ListLabel 185" style:family="text">
      <style:text-properties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complex="Wingdings1" style:font-family-complex="Wingdings" style:font-family-generic-complex="system" style:font-pitch-complex="variable"/>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complex="Wingdings1" style:font-family-complex="Wingdings"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Symbol1" style:font-family-complex="Symbol" style:font-family-generic-complex="system" style:font-pitch-complex="variable"/>
    </style:style>
    <style:style style:name="ListLabel_20_203" style:display-name="ListLabel 203" style:family="text">
      <style:text-properties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fo:font-weight="normal" style:font-weight-asian="normal" style:font-weight-complex="normal"/>
    </style:style>
    <style:style style:name="ListLabel_20_209" style:display-name="ListLabel 209" style:family="text">
      <style:text-properties fo:font-weight="normal" style:font-weight-asian="normal" style:font-weight-complex="normal"/>
    </style:style>
    <style:style style:name="ListLabel_20_210" style:display-name="ListLabel 210" style:family="text">
      <style:text-properties fo:font-weight="normal" style:font-weight-asian="normal" style:font-weight-complex="normal"/>
    </style:style>
    <style:style style:name="ListLabel_20_211" style:display-name="ListLabel 211" style:family="text">
      <style:text-properties fo:font-weight="normal" style:font-weight-asian="normal" style:font-weight-complex="normal"/>
    </style:style>
    <style:style style:name="ListLabel_20_212" style:display-name="ListLabel 212" style:family="text">
      <style:text-properties fo:font-weight="normal" style:font-weight-asian="normal" style:font-weight-complex="normal"/>
    </style:style>
    <style:style style:name="ListLabel_20_213" style:display-name="ListLabel 213" style:family="text">
      <style:text-properties fo:font-weight="normal" style:font-weight-asian="normal" style:font-weight-complex="normal"/>
    </style:style>
    <style:style style:name="ListLabel_20_214" style:display-name="ListLabel 214" style:family="text">
      <style:text-properties fo:font-weight="normal" style:font-weight-asian="normal" style:font-weight-complex="normal"/>
    </style:style>
    <style:style style:name="ListLabel_20_215" style:display-name="ListLabel 215" style:family="text">
      <style:text-properties fo:font-weight="normal" style:font-weight-asian="normal" style:font-weight-complex="normal"/>
    </style:style>
    <style:style style:name="ListLabel_20_216" style:display-name="ListLabel 216" style:family="text">
      <style:text-properties fo:font-weight="normal" style:font-weight-asian="normal" style:font-weight-complex="normal"/>
    </style:style>
    <style:style style:name="ListLabel_20_217" style:display-name="ListLabel 217" style:family="text">
      <style:text-properties style:font-name-complex="Symbol1" style:font-family-complex="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Symbol1" style:font-family-complex="Symbol" style:font-family-generic-complex="system" style:font-pitch-complex="variable"/>
    </style:style>
    <style:style style:name="ListLabel_20_221" style:display-name="ListLabel 221" style:family="text">
      <style:text-properties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Symbol1" style:font-family-complex="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complex="Symbol1" style:font-family-complex="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Symbol1" style:font-family-complex="Symbol" style:font-family-generic-complex="system" style:font-pitch-complex="variable"/>
    </style:style>
    <style:style style:name="ListLabel_20_230" style:display-name="ListLabel 230" style:family="text">
      <style:text-properties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Symbol1" style:font-family-complex="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complex="Symbol1" style:font-family-complex="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Symbol1" style:font-family-complex="Symbol" style:font-family-generic-complex="system" style:font-pitch-complex="variable"/>
    </style:style>
    <style:style style:name="ListLabel_20_239" style:display-name="ListLabel 239" style:family="text">
      <style:text-properties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Symbol1" style:font-family-complex="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fo:font-weight="normal" style:font-weight-asian="normal" style:font-weight-complex="normal"/>
    </style:style>
    <style:style style:name="ListLabel_20_245" style:display-name="ListLabel 245" style:family="text">
      <style:text-properties fo:font-weight="normal" style:font-weight-asian="normal" style:font-weight-complex="normal"/>
    </style:style>
    <style:style style:name="ListLabel_20_246" style:display-name="ListLabel 246" style:family="text">
      <style:text-properties fo:font-weight="normal" style:font-weight-asian="normal" style:font-weight-complex="normal"/>
    </style:style>
    <style:style style:name="ListLabel_20_247" style:display-name="ListLabel 247" style:family="text">
      <style:text-properties fo:font-weight="normal" style:font-weight-asian="normal" style:font-weight-complex="normal"/>
    </style:style>
    <style:style style:name="ListLabel_20_248" style:display-name="ListLabel 248" style:family="text">
      <style:text-properties fo:font-weight="normal" style:font-weight-asian="normal" style:font-weight-complex="normal"/>
    </style:style>
    <style:style style:name="ListLabel_20_249" style:display-name="ListLabel 249" style:family="text">
      <style:text-properties fo:font-weight="normal" style:font-weight-asian="normal" style:font-weight-complex="normal"/>
    </style:style>
    <style:style style:name="ListLabel_20_250" style:display-name="ListLabel 250" style:family="text">
      <style:text-properties fo:font-weight="normal" style:font-weight-asian="normal" style:font-weight-complex="normal"/>
    </style:style>
    <style:style style:name="ListLabel_20_251" style:display-name="ListLabel 251" style:family="text">
      <style:text-properties fo:font-weight="normal" style:font-weight-asian="normal" style:font-weight-complex="normal"/>
    </style:style>
    <style:style style:name="ListLabel_20_252" style:display-name="ListLabel 252" style:family="text">
      <style:text-properties fo:font-weight="normal" style:font-weight-asian="normal" style:font-weight-complex="normal"/>
    </style:style>
    <style:style style:name="ListLabel_20_253" style:display-name="ListLabel 253" style:family="text">
      <style:text-properties style:font-name-complex="Symbol1" style:font-family-complex="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Symbol1" style:font-family-complex="Symbol"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Symbol1" style:font-family-complex="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complex="Symbol1" style:font-family-complex="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Symbol1" style:font-family-complex="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Symbol1" style:font-family-complex="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complex="Symbol1" style:font-family-complex="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Symbol1" style:font-family-complex="Symbol"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complex="OpenSymbol1" style:font-family-complex="OpenSymbol" style:font-family-generic-complex="system" style:font-pitch-complex="variable"/>
    </style:style>
    <style:style style:name="ListLabel_20_277" style:display-name="ListLabel 277" style:family="text">
      <style:text-properties style:font-name-complex="Symbol1" style:font-family-complex="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complex="Symbol1" style:font-family-complex="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Symbol1" style:font-family-complex="Symbol"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Symbol1" style:font-family-complex="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complex="Symbol1" style:font-family-complex="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Symbol1" style:font-family-complex="Symbol" style:font-family-generic-complex="system" style:font-pitch-complex="variable"/>
    </style:style>
    <style:style style:name="ListLabel_20_293" style:display-name="ListLabel 293" style:family="text">
      <style:text-properties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Symbol1" style:font-family-complex="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fo:font-weight="normal" style:font-weight-asian="normal" style:font-weight-complex="normal"/>
    </style:style>
    <style:style style:name="ListLabel_20_299" style:display-name="ListLabel 299" style:family="text">
      <style:text-properties fo:font-weight="normal" style:font-weight-asian="normal" style:font-weight-complex="normal"/>
    </style:style>
    <style:style style:name="ListLabel_20_300" style:display-name="ListLabel 300" style:family="text">
      <style:text-properties fo:font-weight="normal" style:font-weight-asian="normal" style:font-weight-complex="normal"/>
    </style:style>
    <style:style style:name="ListLabel_20_301" style:display-name="ListLabel 301" style:family="text">
      <style:text-properties fo:font-weight="normal" style:font-weight-asian="normal" style:font-weight-complex="normal"/>
    </style:style>
    <style:style style:name="ListLabel_20_302" style:display-name="ListLabel 302" style:family="text">
      <style:text-properties fo:font-weight="normal" style:font-weight-asian="normal" style:font-weight-complex="normal"/>
    </style:style>
    <style:style style:name="ListLabel_20_303" style:display-name="ListLabel 303" style:family="text">
      <style:text-properties fo:font-weight="normal" style:font-weight-asian="normal" style:font-weight-complex="normal"/>
    </style:style>
    <style:style style:name="ListLabel_20_304" style:display-name="ListLabel 304" style:family="text">
      <style:text-properties fo:font-weight="normal" style:font-weight-asian="normal" style:font-weight-complex="normal"/>
    </style:style>
    <style:style style:name="ListLabel_20_305" style:display-name="ListLabel 305" style:family="text">
      <style:text-properties fo:font-weight="normal" style:font-weight-asian="normal" style:font-weight-complex="normal"/>
    </style:style>
    <style:style style:name="ListLabel_20_306" style:display-name="ListLabel 306" style:family="text">
      <style:text-properties fo:font-weight="normal" style:font-weight-asian="normal" style:font-weight-complex="normal"/>
    </style:style>
    <style:style style:name="ListLabel_20_307" style:display-name="ListLabel 307" style:family="text">
      <style:text-properties fo:font-weight="normal" style:font-weight-asian="normal" style:font-weight-complex="normal"/>
    </style:style>
    <style:style style:name="ListLabel_20_308" style:display-name="ListLabel 308" style:family="text">
      <style:text-properties fo:font-weight="normal" style:font-weight-asian="normal" style:font-weight-complex="normal"/>
    </style:style>
    <style:style style:name="ListLabel_20_309" style:display-name="ListLabel 309" style:family="text">
      <style:text-properties fo:font-weight="normal" style:font-weight-asian="normal" style:font-weight-complex="normal"/>
    </style:style>
    <style:style style:name="ListLabel_20_310" style:display-name="ListLabel 310" style:family="text">
      <style:text-properties style:font-name-complex="Symbol1" style:font-family-complex="Symbol" style:font-family-generic-complex="system" style:font-pitch-complex="variable"/>
    </style:style>
    <style:style style:name="ListLabel_20_311" style:display-name="ListLabel 311" style:family="text">
      <style:text-properties style:font-name-complex="Symbol1" style:font-family-complex="Symbol" style:font-family-generic-complex="system" style:font-pitch-complex="variable"/>
    </style:style>
    <style:style style:name="ListLabel_20_312" style:display-name="ListLabel 312" style:family="text">
      <style:text-properties style:font-name-complex="Symbol1" style:font-family-complex="Symbol" style:font-family-generic-complex="system" style:font-pitch-complex="variable"/>
    </style:style>
    <style:style style:name="ListLabel_20_313" style:display-name="ListLabel 313" style:family="text">
      <style:text-properties style:font-name-complex="Symbol1" style:font-family-complex="Symbol" style:font-family-generic-complex="system" style:font-pitch-complex="variable"/>
    </style:style>
    <style:style style:name="ListLabel_20_314" style:display-name="ListLabel 314" style:family="text">
      <style:text-properties style:font-name-complex="Symbol1" style:font-family-complex="Symbol" style:font-family-generic-complex="system" style:font-pitch-complex="variable"/>
    </style:style>
    <style:style style:name="ListLabel_20_315" style:display-name="ListLabel 315" style:family="text">
      <style:text-properties style:font-name-complex="Symbol1" style:font-family-complex="Symbol" style:font-family-generic-complex="system" style:font-pitch-complex="variable"/>
    </style:style>
    <style:style style:name="ListLabel_20_316" style:display-name="ListLabel 316" style:family="text">
      <style:text-properties style:font-name-complex="Symbol1" style:font-family-complex="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Symbol1" style:font-family-complex="Symbol" style:font-family-generic-complex="system" style:font-pitch-complex="variable"/>
    </style:style>
    <style:style style:name="ListLabel_20_320" style:display-name="ListLabel 320" style:family="text">
      <style:text-properties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Symbol1" style:font-family-complex="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fo:font-weight="normal" style:font-weight-asian="normal" style:font-weight-complex="normal"/>
    </style:style>
    <style:style style:name="ListLabel_20_326" style:display-name="ListLabel 326" style:family="text">
      <style:text-properties fo:font-weight="normal" style:font-weight-asian="normal" style:font-weight-complex="normal"/>
    </style:style>
    <style:style style:name="ListLabel_20_327" style:display-name="ListLabel 327" style:family="text">
      <style:text-properties fo:font-weight="normal" style:font-weight-asian="normal" style:font-weight-complex="normal"/>
    </style:style>
    <style:style style:name="ListLabel_20_328" style:display-name="ListLabel 328" style:family="text">
      <style:text-properties fo:font-weight="normal" style:font-weight-asian="normal" style:font-weight-complex="normal"/>
    </style:style>
    <style:style style:name="ListLabel_20_329" style:display-name="ListLabel 329" style:family="text">
      <style:text-properties fo:font-weight="normal" style:font-weight-asian="normal" style:font-weight-complex="normal"/>
    </style:style>
    <style:style style:name="ListLabel_20_330" style:display-name="ListLabel 330" style:family="text">
      <style:text-properties fo:font-weight="normal" style:font-weight-asian="normal" style:font-weight-complex="normal"/>
    </style:style>
    <style:style style:name="ListLabel_20_331" style:display-name="ListLabel 331" style:family="text">
      <style:text-properties fo:font-weight="normal" style:font-weight-asian="normal" style:font-weight-complex="normal"/>
    </style:style>
    <style:style style:name="ListLabel_20_332" style:display-name="ListLabel 332" style:family="text">
      <style:text-properties fo:font-weight="normal" style:font-weight-asian="normal" style:font-weight-complex="normal"/>
    </style:style>
    <style:style style:name="ListLabel_20_333" style:display-name="ListLabel 333" style:family="text">
      <style:text-properties fo:font-weight="normal" style:font-weight-asian="normal" style:font-weight-complex="normal"/>
    </style:style>
    <style:style style:name="ListLabel_20_334" style:display-name="ListLabel 334" style:family="text">
      <style:text-properties fo:font-weight="normal" style:font-weight-asian="normal" style:font-weight-complex="normal"/>
    </style:style>
    <style:style style:name="ListLabel_20_335" style:display-name="ListLabel 335" style:family="text">
      <style:text-properties fo:font-weight="normal" style:font-weight-asian="normal" style:font-weight-complex="normal"/>
    </style:style>
    <style:style style:name="ListLabel_20_336" style:display-name="ListLabel 336" style:family="text">
      <style:text-properties fo:font-weight="normal" style:font-weight-asian="normal" style:font-weight-complex="normal"/>
    </style:style>
    <style:style style:name="ListLabel_20_337" style:display-name="ListLabel 337" style:family="text">
      <style:text-properties fo:font-weight="normal" style:font-weight-asian="normal" style:font-weight-complex="normal"/>
    </style:style>
    <style:style style:name="ListLabel_20_338" style:display-name="ListLabel 338" style:family="text">
      <style:text-properties fo:font-weight="normal" style:font-weight-asian="normal" style:font-weight-complex="normal"/>
    </style:style>
    <style:style style:name="ListLabel_20_339" style:display-name="ListLabel 339" style:family="text">
      <style:text-properties fo:font-weight="normal" style:font-weight-asian="normal" style:font-weight-complex="normal"/>
    </style:style>
    <style:style style:name="ListLabel_20_340" style:display-name="ListLabel 340" style:family="text">
      <style:text-properties fo:font-weight="normal" style:font-weight-asian="normal" style:font-weight-complex="normal"/>
    </style:style>
    <style:style style:name="ListLabel_20_341" style:display-name="ListLabel 341" style:family="text">
      <style:text-properties fo:font-weight="normal" style:font-weight-asian="normal" style:font-weight-complex="normal"/>
    </style:style>
    <style:style style:name="ListLabel_20_342" style:display-name="ListLabel 342" style:family="text">
      <style:text-properties fo:font-weight="normal" style:font-weight-asian="normal" style:font-weight-complex="normal"/>
    </style:style>
    <style:style style:name="ListLabel_20_343" style:display-name="ListLabel 343" style:family="text">
      <style:text-properties style:font-name-complex="Symbol1" style:font-family-complex="Symbol" style:font-family-generic-complex="system" style:font-pitch-complex="variable"/>
    </style:style>
    <style:style style:name="ListLabel_20_344" style:display-name="ListLabel 344" style:family="text">
      <style:text-properties style:font-name-complex="OpenSymbol1" style:font-family-complex="OpenSymbol" style:font-family-generic-complex="system" style:font-pitch-complex="variable"/>
    </style:style>
    <style:style style:name="ListLabel_20_345" style:display-name="ListLabel 345" style:family="text">
      <style:text-properties style:font-name-complex="OpenSymbol1" style:font-family-complex="OpenSymbol" style:font-family-generic-complex="system" style:font-pitch-complex="variable"/>
    </style:style>
    <style:style style:name="ListLabel_20_346" style:display-name="ListLabel 346" style:family="text">
      <style:text-properties style:font-name-complex="Symbol1" style:font-family-complex="Symbol" style:font-family-generic-complex="system" style:font-pitch-complex="variable"/>
    </style:style>
    <style:style style:name="ListLabel_20_347" style:display-name="ListLabel 347" style:family="text">
      <style:text-properties style:font-name-complex="OpenSymbol1" style:font-family-complex="OpenSymbol" style:font-family-generic-complex="system" style:font-pitch-complex="variable"/>
    </style:style>
    <style:style style:name="ListLabel_20_348" style:display-name="ListLabel 348" style:family="text">
      <style:text-properties style:font-name-complex="OpenSymbol1" style:font-family-complex="OpenSymbol" style:font-family-generic-complex="system" style:font-pitch-complex="variable"/>
    </style:style>
    <style:style style:name="ListLabel_20_349" style:display-name="ListLabel 349" style:family="text">
      <style:text-properties style:font-name-complex="Symbol1" style:font-family-complex="Symbol" style:font-family-generic-complex="system" style:font-pitch-complex="variable"/>
    </style:style>
    <style:style style:name="ListLabel_20_350" style:display-name="ListLabel 350" style:family="text">
      <style:text-properties style:font-name-complex="OpenSymbol1" style:font-family-complex="OpenSymbol" style:font-family-generic-complex="system" style:font-pitch-complex="variable"/>
    </style:style>
    <style:style style:name="ListLabel_20_351" style:display-name="ListLabel 351" style:family="text">
      <style:text-properties style:font-name-complex="OpenSymbol1" style:font-family-complex="OpenSymbol" style:font-family-generic-complex="system" style:font-pitch-complex="variable"/>
    </style:style>
    <style:style style:name="ListLabel_20_352" style:display-name="ListLabel 352" style:family="text">
      <style:text-properties fo:font-weight="normal" style:font-weight-asian="normal" style:font-weight-complex="normal"/>
    </style:style>
    <style:style style:name="ListLabel_20_353" style:display-name="ListLabel 353" style:family="text">
      <style:text-properties fo:font-weight="normal" style:font-weight-asian="normal" style:font-weight-complex="normal"/>
    </style:style>
    <style:style style:name="ListLabel_20_354" style:display-name="ListLabel 354" style:family="text">
      <style:text-properties fo:font-weight="normal" style:font-weight-asian="normal" style:font-weight-complex="normal"/>
    </style:style>
    <style:style style:name="ListLabel_20_355" style:display-name="ListLabel 355" style:family="text">
      <style:text-properties fo:font-weight="normal" style:font-weight-asian="normal" style:font-weight-complex="normal"/>
    </style:style>
    <style:style style:name="ListLabel_20_356" style:display-name="ListLabel 356" style:family="text">
      <style:text-properties fo:font-weight="normal" style:font-weight-asian="normal" style:font-weight-complex="normal"/>
    </style:style>
    <style:style style:name="ListLabel_20_357" style:display-name="ListLabel 357" style:family="text">
      <style:text-properties fo:font-weight="normal" style:font-weight-asian="normal" style:font-weight-complex="normal"/>
    </style:style>
    <style:style style:name="ListLabel_20_358" style:display-name="ListLabel 358" style:family="text">
      <style:text-properties fo:font-weight="normal" style:font-weight-asian="normal" style:font-weight-complex="normal"/>
    </style:style>
    <style:style style:name="ListLabel_20_359" style:display-name="ListLabel 359" style:family="text">
      <style:text-properties fo:font-weight="normal" style:font-weight-asian="normal" style:font-weight-complex="normal"/>
    </style:style>
    <style:style style:name="ListLabel_20_360" style:display-name="ListLabel 360" style:family="text">
      <style:text-properties fo:font-weight="normal" style:font-weight-asian="normal" style:font-weight-complex="normal"/>
    </style:style>
    <style:style style:name="ListLabel_20_361" style:display-name="ListLabel 361" style:family="text">
      <style:text-properties fo:font-weight="normal" style:font-weight-asian="normal" style:font-weight-complex="normal"/>
    </style:style>
    <style:style style:name="ListLabel_20_362" style:display-name="ListLabel 362" style:family="text">
      <style:text-properties fo:font-weight="normal" style:font-weight-asian="normal" style:font-weight-complex="normal"/>
    </style:style>
    <style:style style:name="ListLabel_20_363" style:display-name="ListLabel 363" style:family="text">
      <style:text-properties fo:font-weight="normal" style:font-weight-asian="normal" style:font-weight-complex="normal"/>
    </style:style>
    <style:style style:name="ListLabel_20_364" style:display-name="ListLabel 364" style:family="text">
      <style:text-properties fo:font-weight="normal" style:font-weight-asian="normal" style:font-weight-complex="normal"/>
    </style:style>
    <style:style style:name="ListLabel_20_365" style:display-name="ListLabel 365" style:family="text">
      <style:text-properties fo:font-weight="normal" style:font-weight-asian="normal" style:font-weight-complex="normal"/>
    </style:style>
    <style:style style:name="ListLabel_20_366" style:display-name="ListLabel 366" style:family="text">
      <style:text-properties fo:font-weight="normal" style:font-weight-asian="normal" style:font-weight-complex="normal"/>
    </style:style>
    <style:style style:name="ListLabel_20_367" style:display-name="ListLabel 367" style:family="text">
      <style:text-properties fo:font-weight="normal" style:font-weight-asian="normal" style:font-weight-complex="normal"/>
    </style:style>
    <style:style style:name="ListLabel_20_368" style:display-name="ListLabel 368" style:family="text">
      <style:text-properties fo:font-weight="normal" style:font-weight-asian="normal" style:font-weight-complex="normal"/>
    </style:style>
    <style:style style:name="ListLabel_20_369" style:display-name="ListLabel 369" style:family="text">
      <style:text-properties fo:font-weight="normal" style:font-weight-asian="normal" style:font-weight-complex="normal"/>
    </style:style>
    <style:style style:name="ListLabel_20_370" style:display-name="ListLabel 370" style:family="text">
      <style:text-properties fo:font-weight="normal" style:font-weight-asian="normal" style:font-weight-complex="normal"/>
    </style:style>
    <style:style style:name="ListLabel_20_371" style:display-name="ListLabel 371" style:family="text">
      <style:text-properties fo:font-weight="normal" style:font-weight-asian="normal" style:font-weight-complex="normal"/>
    </style:style>
    <style:style style:name="ListLabel_20_372" style:display-name="ListLabel 372" style:family="text">
      <style:text-properties fo:font-weight="normal" style:font-weight-asian="normal" style:font-weight-complex="normal"/>
    </style:style>
    <style:style style:name="ListLabel_20_373" style:display-name="ListLabel 373" style:family="text">
      <style:text-properties fo:font-weight="normal" style:font-weight-asian="normal" style:font-weight-complex="normal"/>
    </style:style>
    <style:style style:name="ListLabel_20_374" style:display-name="ListLabel 374" style:family="text">
      <style:text-properties fo:font-weight="normal" style:font-weight-asian="normal" style:font-weight-complex="normal"/>
    </style:style>
    <style:style style:name="ListLabel_20_375" style:display-name="ListLabel 375" style:family="text">
      <style:text-properties fo:font-weight="normal" style:font-weight-asian="normal" style:font-weight-complex="normal"/>
    </style:style>
    <style:style style:name="ListLabel_20_376" style:display-name="ListLabel 376" style:family="text">
      <style:text-properties fo:font-weight="normal" style:font-weight-asian="normal" style:font-weight-complex="normal"/>
    </style:style>
    <style:style style:name="ListLabel_20_377" style:display-name="ListLabel 377" style:family="text">
      <style:text-properties fo:font-weight="normal" style:font-weight-asian="normal" style:font-weight-complex="normal"/>
    </style:style>
    <style:style style:name="ListLabel_20_378" style:display-name="ListLabel 378" style:family="text">
      <style:text-properties fo:font-weight="normal" style:font-weight-asian="normal" style:font-weight-complex="normal"/>
    </style:style>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text-properties style:font-name-complex="Symbol1" style:font-family-complex="Symbol" style:font-family-generic-complex="system" style:font-pitch-complex="variable"/>
    </style:style>
    <style:style style:name="ListLabel_20_389" style:display-name="ListLabel 389" style:family="text">
      <style:text-properties style:font-name-complex="OpenSymbol1" style:font-family-complex="OpenSymbol" style:font-family-generic-complex="system" style:font-pitch-complex="variable"/>
    </style:style>
    <style:style style:name="ListLabel_20_390" style:display-name="ListLabel 390" style:family="text">
      <style:text-properties style:font-name-complex="OpenSymbol1" style:font-family-complex="OpenSymbol" style:font-family-generic-complex="system" style:font-pitch-complex="variable"/>
    </style:style>
    <style:style style:name="ListLabel_20_391" style:display-name="ListLabel 391" style:family="text">
      <style:text-properties style:font-name-complex="Symbol1" style:font-family-complex="Symbol" style:font-family-generic-complex="system" style:font-pitch-complex="variable"/>
    </style:style>
    <style:style style:name="ListLabel_20_392" style:display-name="ListLabel 392" style:family="text">
      <style:text-properties style:font-name-complex="OpenSymbol1" style:font-family-complex="OpenSymbol" style:font-family-generic-complex="system" style:font-pitch-complex="variable"/>
    </style:style>
    <style:style style:name="ListLabel_20_393" style:display-name="ListLabel 393" style:family="text">
      <style:text-properties style:font-name-complex="OpenSymbol1" style:font-family-complex="OpenSymbol" style:font-family-generic-complex="system" style:font-pitch-complex="variable"/>
    </style:style>
    <style:style style:name="ListLabel_20_394" style:display-name="ListLabel 394" style:family="text">
      <style:text-properties style:font-name-complex="Symbol1" style:font-family-complex="Symbol" style:font-family-generic-complex="system" style:font-pitch-complex="variable"/>
    </style:style>
    <style:style style:name="ListLabel_20_395" style:display-name="ListLabel 395" style:family="text">
      <style:text-properties style:font-name-complex="OpenSymbol1" style:font-family-complex="OpenSymbol" style:font-family-generic-complex="system" style:font-pitch-complex="variable"/>
    </style:style>
    <style:style style:name="ListLabel_20_396" style:display-name="ListLabel 396" style:family="text">
      <style:text-properties style:font-name-complex="OpenSymbol1" style:font-family-complex="OpenSymbol" style:font-family-generic-complex="system" style:font-pitch-complex="variable"/>
    </style:style>
    <style:style style:name="ListLabel_20_397" style:display-name="ListLabel 397" style:family="text">
      <style:text-properties style:font-name-complex="Symbol1" style:font-family-complex="Symbol" style:font-family-generic-complex="system" style:font-pitch-complex="variable"/>
    </style:style>
    <style:style style:name="ListLabel_20_398" style:display-name="ListLabel 398" style:family="text">
      <style:text-properties style:font-name-complex="OpenSymbol1" style:font-family-complex="OpenSymbol" style:font-family-generic-complex="system" style:font-pitch-complex="variable"/>
    </style:style>
    <style:style style:name="ListLabel_20_399" style:display-name="ListLabel 399" style:family="text">
      <style:text-properties style:font-name-complex="OpenSymbol1" style:font-family-complex="OpenSymbol" style:font-family-generic-complex="system" style:font-pitch-complex="variable"/>
    </style:style>
    <style:style style:name="ListLabel_20_400" style:display-name="ListLabel 400" style:family="text">
      <style:text-properties style:font-name-complex="Symbol1" style:font-family-complex="Symbol" style:font-family-generic-complex="system" style:font-pitch-complex="variable"/>
    </style:style>
    <style:style style:name="ListLabel_20_401" style:display-name="ListLabel 401" style:family="text">
      <style:text-properties style:font-name-complex="OpenSymbol1" style:font-family-complex="OpenSymbol" style:font-family-generic-complex="system" style:font-pitch-complex="variable"/>
    </style:style>
    <style:style style:name="ListLabel_20_402" style:display-name="ListLabel 402" style:family="text">
      <style:text-properties style:font-name-complex="OpenSymbol1" style:font-family-complex="OpenSymbol" style:font-family-generic-complex="system" style:font-pitch-complex="variable"/>
    </style:style>
    <style:style style:name="ListLabel_20_403" style:display-name="ListLabel 403" style:family="text">
      <style:text-properties style:font-name-complex="Symbol1" style:font-family-complex="Symbol" style:font-family-generic-complex="system" style:font-pitch-complex="variable"/>
    </style:style>
    <style:style style:name="ListLabel_20_404" style:display-name="ListLabel 404" style:family="text">
      <style:text-properties style:font-name-complex="OpenSymbol1" style:font-family-complex="OpenSymbol" style:font-family-generic-complex="system" style:font-pitch-complex="variable"/>
    </style:style>
    <style:style style:name="ListLabel_20_405" style:display-name="ListLabel 405" style:family="text">
      <style:text-properties style:font-name-complex="OpenSymbol1" style:font-family-complex="OpenSymbol" style:font-family-generic-complex="system" style:font-pitch-complex="variable"/>
    </style:style>
    <style:style style:name="ListLabel_20_406" style:display-name="ListLabel 406" style:family="text">
      <style:text-properties style:font-name-complex="Symbol1" style:font-family-complex="Symbol" style:font-family-generic-complex="system" style:font-pitch-complex="variable"/>
    </style:style>
    <style:style style:name="ListLabel_20_407" style:display-name="ListLabel 407" style:family="text">
      <style:text-properties style:font-name-complex="OpenSymbol1" style:font-family-complex="OpenSymbol" style:font-family-generic-complex="system" style:font-pitch-complex="variable"/>
    </style:style>
    <style:style style:name="ListLabel_20_408" style:display-name="ListLabel 408" style:family="text">
      <style:text-properties style:font-name-complex="OpenSymbol1" style:font-family-complex="OpenSymbol" style:font-family-generic-complex="system" style:font-pitch-complex="variable"/>
    </style:style>
    <style:style style:name="ListLabel_20_409" style:display-name="ListLabel 409" style:family="text">
      <style:text-properties style:font-name-complex="Symbol1" style:font-family-complex="Symbol" style:font-family-generic-complex="system" style:font-pitch-complex="variable"/>
    </style:style>
    <style:style style:name="ListLabel_20_410" style:display-name="ListLabel 410" style:family="text">
      <style:text-properties style:font-name-complex="OpenSymbol1" style:font-family-complex="OpenSymbol" style:font-family-generic-complex="system" style:font-pitch-complex="variable"/>
    </style:style>
    <style:style style:name="ListLabel_20_411" style:display-name="ListLabel 411" style:family="text">
      <style:text-properties style:font-name-complex="OpenSymbol1" style:font-family-complex="OpenSymbol" style:font-family-generic-complex="system" style:font-pitch-complex="variable"/>
    </style:style>
    <style:style style:name="ListLabel_20_412" style:display-name="ListLabel 412" style:family="text">
      <style:text-properties style:font-name-complex="Symbol1" style:font-family-complex="Symbol" style:font-family-generic-complex="system" style:font-pitch-complex="variable"/>
    </style:style>
    <style:style style:name="ListLabel_20_413" style:display-name="ListLabel 413" style:family="text">
      <style:text-properties style:font-name-complex="OpenSymbol1" style:font-family-complex="OpenSymbol" style:font-family-generic-complex="system" style:font-pitch-complex="variable"/>
    </style:style>
    <style:style style:name="ListLabel_20_414" style:display-name="ListLabel 414" style:family="text">
      <style:text-properties style:font-name-complex="OpenSymbol1" style:font-family-complex="OpenSymbol" style:font-family-generic-complex="system" style:font-pitch-complex="variable"/>
    </style:style>
    <style:style style:name="ListLabel_20_415" style:display-name="ListLabel 415" style:family="text">
      <style:text-properties style:font-name-complex="Symbol1" style:font-family-complex="Symbol" style:font-family-generic-complex="system" style:font-pitch-complex="variable"/>
    </style:style>
    <style:style style:name="ListLabel_20_416" style:display-name="ListLabel 416" style:family="text">
      <style:text-properties style:font-name-complex="OpenSymbol1" style:font-family-complex="OpenSymbol" style:font-family-generic-complex="system" style:font-pitch-complex="variable"/>
    </style:style>
    <style:style style:name="ListLabel_20_417" style:display-name="ListLabel 417" style:family="text">
      <style:text-properties style:font-name-complex="OpenSymbol1" style:font-family-complex="OpenSymbol" style:font-family-generic-complex="system" style:font-pitch-complex="variable"/>
    </style:style>
    <style:style style:name="ListLabel_20_418" style:display-name="ListLabel 418" style:family="text">
      <style:text-properties style:font-name-complex="Symbol1" style:font-family-complex="Symbol" style:font-family-generic-complex="system" style:font-pitch-complex="variable"/>
    </style:style>
    <style:style style:name="ListLabel_20_419" style:display-name="ListLabel 419" style:family="text">
      <style:text-properties style:font-name-complex="OpenSymbol1" style:font-family-complex="OpenSymbol" style:font-family-generic-complex="system" style:font-pitch-complex="variable"/>
    </style:style>
    <style:style style:name="ListLabel_20_420" style:display-name="ListLabel 420" style:family="text">
      <style:text-properties style:font-name-complex="OpenSymbol1" style:font-family-complex="OpenSymbol" style:font-family-generic-complex="system" style:font-pitch-complex="variable"/>
    </style:style>
    <style:style style:name="ListLabel_20_421" style:display-name="ListLabel 421" style:family="text">
      <style:text-properties style:font-name-complex="Symbol1" style:font-family-complex="Symbol" style:font-family-generic-complex="system" style:font-pitch-complex="variable"/>
    </style:style>
    <style:style style:name="ListLabel_20_422" style:display-name="ListLabel 422" style:family="text">
      <style:text-properties style:font-name-complex="OpenSymbol1" style:font-family-complex="OpenSymbol" style:font-family-generic-complex="system" style:font-pitch-complex="variable"/>
    </style:style>
    <style:style style:name="ListLabel_20_423" style:display-name="ListLabel 423" style:family="text">
      <style:text-properties style:font-name-complex="OpenSymbol1" style:font-family-complex="OpenSymbol" style:font-family-generic-complex="system" style:font-pitch-complex="variable"/>
    </style:style>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text-properties style:font-name-complex="Symbol1" style:font-family-complex="Symbol" style:font-family-generic-complex="system" style:font-pitch-complex="variable"/>
    </style:style>
    <style:style style:name="ListLabel_20_452" style:display-name="ListLabel 452" style:family="text">
      <style:text-properties style:font-name-complex="OpenSymbol1" style:font-family-complex="OpenSymbol" style:font-family-generic-complex="system" style:font-pitch-complex="variable"/>
    </style:style>
    <style:style style:name="ListLabel_20_453" style:display-name="ListLabel 453" style:family="text">
      <style:text-properties style:font-name-complex="OpenSymbol1" style:font-family-complex="OpenSymbol" style:font-family-generic-complex="system" style:font-pitch-complex="variable"/>
    </style:style>
    <style:style style:name="ListLabel_20_454" style:display-name="ListLabel 454" style:family="text">
      <style:text-properties style:font-name-complex="Symbol1" style:font-family-complex="Symbol" style:font-family-generic-complex="system" style:font-pitch-complex="variable"/>
    </style:style>
    <style:style style:name="ListLabel_20_455" style:display-name="ListLabel 455" style:family="text">
      <style:text-properties style:font-name-complex="OpenSymbol1" style:font-family-complex="OpenSymbol" style:font-family-generic-complex="system" style:font-pitch-complex="variable"/>
    </style:style>
    <style:style style:name="ListLabel_20_456" style:display-name="ListLabel 456" style:family="text">
      <style:text-properties style:font-name-complex="OpenSymbol1" style:font-family-complex="OpenSymbol" style:font-family-generic-complex="system" style:font-pitch-complex="variable"/>
    </style:style>
    <style:style style:name="ListLabel_20_457" style:display-name="ListLabel 457" style:family="text">
      <style:text-properties style:font-name-complex="Symbol1" style:font-family-complex="Symbol" style:font-family-generic-complex="system" style:font-pitch-complex="variable"/>
    </style:style>
    <style:style style:name="ListLabel_20_458" style:display-name="ListLabel 458" style:family="text">
      <style:text-properties style:font-name-complex="OpenSymbol1" style:font-family-complex="OpenSymbol" style:font-family-generic-complex="system" style:font-pitch-complex="variable"/>
    </style:style>
    <style:style style:name="ListLabel_20_459" style:display-name="ListLabel 459" style:family="text">
      <style:text-properties style:font-name-complex="OpenSymbol1" style:font-family-complex="OpenSymbol" style:font-family-generic-complex="system" style:font-pitch-complex="variable"/>
    </style:style>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text-properties style:font-name-complex="Symbol1" style:font-family-complex="Symbol" style:font-family-generic-complex="system" style:font-pitch-complex="variable"/>
    </style:style>
    <style:style style:name="ListLabel_20_470" style:display-name="ListLabel 470" style:family="text">
      <style:text-properties style:font-name-complex="OpenSymbol1" style:font-family-complex="OpenSymbol" style:font-family-generic-complex="system" style:font-pitch-complex="variable"/>
    </style:style>
    <style:style style:name="ListLabel_20_471" style:display-name="ListLabel 471" style:family="text">
      <style:text-properties style:font-name-complex="OpenSymbol1" style:font-family-complex="OpenSymbol" style:font-family-generic-complex="system" style:font-pitch-complex="variable"/>
    </style:style>
    <style:style style:name="ListLabel_20_472" style:display-name="ListLabel 472" style:family="text">
      <style:text-properties style:font-name-complex="Symbol1" style:font-family-complex="Symbol" style:font-family-generic-complex="system" style:font-pitch-complex="variable"/>
    </style:style>
    <style:style style:name="ListLabel_20_473" style:display-name="ListLabel 473" style:family="text">
      <style:text-properties style:font-name-complex="OpenSymbol1" style:font-family-complex="OpenSymbol" style:font-family-generic-complex="system" style:font-pitch-complex="variable"/>
    </style:style>
    <style:style style:name="ListLabel_20_474" style:display-name="ListLabel 474" style:family="text">
      <style:text-properties style:font-name-complex="OpenSymbol1" style:font-family-complex="OpenSymbol" style:font-family-generic-complex="system" style:font-pitch-complex="variable"/>
    </style:style>
    <style:style style:name="ListLabel_20_475" style:display-name="ListLabel 475" style:family="text">
      <style:text-properties style:font-name-complex="Symbol1" style:font-family-complex="Symbol" style:font-family-generic-complex="system" style:font-pitch-complex="variable"/>
    </style:style>
    <style:style style:name="ListLabel_20_476" style:display-name="ListLabel 476" style:family="text">
      <style:text-properties style:font-name-complex="OpenSymbol1" style:font-family-complex="OpenSymbol" style:font-family-generic-complex="system" style:font-pitch-complex="variable"/>
    </style:style>
    <style:style style:name="ListLabel_20_477" style:display-name="ListLabel 477" style:family="text">
      <style:text-properties style:font-name-complex="OpenSymbol1" style:font-family-complex="OpenSymbol" style:font-family-generic-complex="system" style:font-pitch-complex="variable"/>
    </style:style>
    <style:style style:name="ListLabel_20_478" style:display-name="ListLabel 478" style:family="text">
      <style:text-properties style:font-name-complex="Symbol1" style:font-family-complex="Symbol" style:font-family-generic-complex="system" style:font-pitch-complex="variable"/>
    </style:style>
    <style:style style:name="ListLabel_20_479" style:display-name="ListLabel 479" style:family="text">
      <style:text-properties style:font-name-complex="OpenSymbol1" style:font-family-complex="OpenSymbol" style:font-family-generic-complex="system" style:font-pitch-complex="variable"/>
    </style:style>
    <style:style style:name="ListLabel_20_480" style:display-name="ListLabel 480" style:family="text">
      <style:text-properties style:font-name-complex="OpenSymbol1" style:font-family-complex="OpenSymbol" style:font-family-generic-complex="system" style:font-pitch-complex="variable"/>
    </style:style>
    <style:style style:name="ListLabel_20_481" style:display-name="ListLabel 481" style:family="text">
      <style:text-properties style:font-name-complex="Symbol1" style:font-family-complex="Symbol" style:font-family-generic-complex="system" style:font-pitch-complex="variable"/>
    </style:style>
    <style:style style:name="ListLabel_20_482" style:display-name="ListLabel 482" style:family="text">
      <style:text-properties style:font-name-complex="OpenSymbol1" style:font-family-complex="OpenSymbol" style:font-family-generic-complex="system" style:font-pitch-complex="variable"/>
    </style:style>
    <style:style style:name="ListLabel_20_483" style:display-name="ListLabel 483" style:family="text">
      <style:text-properties style:font-name-complex="OpenSymbol1" style:font-family-complex="OpenSymbol" style:font-family-generic-complex="system" style:font-pitch-complex="variable"/>
    </style:style>
    <style:style style:name="ListLabel_20_484" style:display-name="ListLabel 484" style:family="text">
      <style:text-properties style:font-name-complex="Symbol1" style:font-family-complex="Symbol" style:font-family-generic-complex="system" style:font-pitch-complex="variable"/>
    </style:style>
    <style:style style:name="ListLabel_20_485" style:display-name="ListLabel 485" style:family="text">
      <style:text-properties style:font-name-complex="OpenSymbol1" style:font-family-complex="OpenSymbol" style:font-family-generic-complex="system" style:font-pitch-complex="variable"/>
    </style:style>
    <style:style style:name="ListLabel_20_486" style:display-name="ListLabel 486" style:family="text">
      <style:text-properties style:font-name-complex="OpenSymbol1" style:font-family-complex="OpenSymbol" style:font-family-generic-complex="system" style:font-pitch-complex="variable"/>
    </style:style>
    <style:style style:name="ListLabel_20_487" style:display-name="ListLabel 487" style:family="text">
      <style:text-properties style:font-name-complex="Symbol1" style:font-family-complex="Symbol" style:font-family-generic-complex="system" style:font-pitch-complex="variable"/>
    </style:style>
    <style:style style:name="ListLabel_20_488" style:display-name="ListLabel 488" style:family="text">
      <style:text-properties style:font-name-complex="OpenSymbol1" style:font-family-complex="OpenSymbol" style:font-family-generic-complex="system" style:font-pitch-complex="variable"/>
    </style:style>
    <style:style style:name="ListLabel_20_489" style:display-name="ListLabel 489" style:family="text">
      <style:text-properties style:font-name-complex="OpenSymbol1" style:font-family-complex="OpenSymbol" style:font-family-generic-complex="system" style:font-pitch-complex="variable"/>
    </style:style>
    <style:style style:name="ListLabel_20_490" style:display-name="ListLabel 490" style:family="text">
      <style:text-properties style:font-name-complex="Symbol1" style:font-family-complex="Symbol" style:font-family-generic-complex="system" style:font-pitch-complex="variable"/>
    </style:style>
    <style:style style:name="ListLabel_20_491" style:display-name="ListLabel 491" style:family="text">
      <style:text-properties style:font-name-complex="OpenSymbol1" style:font-family-complex="OpenSymbol" style:font-family-generic-complex="system" style:font-pitch-complex="variable"/>
    </style:style>
    <style:style style:name="ListLabel_20_492" style:display-name="ListLabel 492" style:family="text">
      <style:text-properties style:font-name-complex="OpenSymbol1" style:font-family-complex="OpenSymbol" style:font-family-generic-complex="system" style:font-pitch-complex="variable"/>
    </style:style>
    <style:style style:name="ListLabel_20_493" style:display-name="ListLabel 493" style:family="text">
      <style:text-properties style:font-name-complex="Symbol1" style:font-family-complex="Symbol" style:font-family-generic-complex="system" style:font-pitch-complex="variable"/>
    </style:style>
    <style:style style:name="ListLabel_20_494" style:display-name="ListLabel 494" style:family="text">
      <style:text-properties style:font-name-complex="OpenSymbol1" style:font-family-complex="OpenSymbol" style:font-family-generic-complex="system" style:font-pitch-complex="variable"/>
    </style:style>
    <style:style style:name="ListLabel_20_495" style:display-name="ListLabel 495" style:family="text">
      <style:text-properties style:font-name-complex="OpenSymbol1" style:font-family-complex="OpenSymbol" style:font-family-generic-complex="system" style:font-pitch-complex="variable"/>
    </style:style>
    <style:style style:name="ListLabel_20_496" style:display-name="ListLabel 496" style:family="text">
      <style:text-properties style:font-name-complex="Symbol1" style:font-family-complex="Symbol" style:font-family-generic-complex="system" style:font-pitch-complex="variable"/>
    </style:style>
    <style:style style:name="ListLabel_20_497" style:display-name="ListLabel 497" style:family="text">
      <style:text-properties style:font-name-complex="OpenSymbol1" style:font-family-complex="OpenSymbol" style:font-family-generic-complex="system" style:font-pitch-complex="variable"/>
    </style:style>
    <style:style style:name="ListLabel_20_498" style:display-name="ListLabel 498" style:family="text">
      <style:text-properties style:font-name-complex="OpenSymbol1" style:font-family-complex="OpenSymbol" style:font-family-generic-complex="system" style:font-pitch-complex="variable"/>
    </style:style>
    <style:style style:name="ListLabel_20_499" style:display-name="ListLabel 499" style:family="text">
      <style:text-properties style:font-name-complex="Symbol1" style:font-family-complex="Symbol" style:font-family-generic-complex="system" style:font-pitch-complex="variable"/>
    </style:style>
    <style:style style:name="ListLabel_20_500" style:display-name="ListLabel 500" style:family="text">
      <style:text-properties style:font-name-complex="OpenSymbol1" style:font-family-complex="OpenSymbol" style:font-family-generic-complex="system" style:font-pitch-complex="variable"/>
    </style:style>
    <style:style style:name="ListLabel_20_501" style:display-name="ListLabel 501" style:family="text">
      <style:text-properties style:font-name-complex="OpenSymbol1" style:font-family-complex="OpenSymbol" style:font-family-generic-complex="system" style:font-pitch-complex="variable"/>
    </style:style>
    <style:style style:name="ListLabel_20_502" style:display-name="ListLabel 502" style:family="text">
      <style:text-properties style:font-name-complex="Symbol1" style:font-family-complex="Symbol" style:font-family-generic-complex="system" style:font-pitch-complex="variable"/>
    </style:style>
    <style:style style:name="ListLabel_20_503" style:display-name="ListLabel 503" style:family="text">
      <style:text-properties style:font-name-complex="OpenSymbol1" style:font-family-complex="OpenSymbol" style:font-family-generic-complex="system" style:font-pitch-complex="variable"/>
    </style:style>
    <style:style style:name="ListLabel_20_504" style:display-name="ListLabel 504" style:family="text">
      <style:text-properties style:font-name-complex="OpenSymbol1" style:font-family-complex="OpenSymbol" style:font-family-generic-complex="system" style:font-pitch-complex="variable"/>
    </style:style>
    <style:style style:name="ListLabel_20_505" style:display-name="ListLabel 505" style:family="text">
      <style:text-properties style:font-name-complex="Symbol1" style:font-family-complex="Symbol" style:font-family-generic-complex="system" style:font-pitch-complex="variable"/>
    </style:style>
    <style:style style:name="ListLabel_20_506" style:display-name="ListLabel 506" style:family="text">
      <style:text-properties style:font-name-complex="OpenSymbol1" style:font-family-complex="OpenSymbol" style:font-family-generic-complex="system" style:font-pitch-complex="variable"/>
    </style:style>
    <style:style style:name="ListLabel_20_507" style:display-name="ListLabel 507" style:family="text">
      <style:text-properties style:font-name-complex="OpenSymbol1" style:font-family-complex="OpenSymbol" style:font-family-generic-complex="system" style:font-pitch-complex="variable"/>
    </style:style>
    <style:style style:name="ListLabel_20_508" style:display-name="ListLabel 508" style:family="text">
      <style:text-properties style:font-name-complex="Symbol1" style:font-family-complex="Symbol" style:font-family-generic-complex="system" style:font-pitch-complex="variable"/>
    </style:style>
    <style:style style:name="ListLabel_20_509" style:display-name="ListLabel 509" style:family="text">
      <style:text-properties style:font-name-complex="OpenSymbol1" style:font-family-complex="OpenSymbol" style:font-family-generic-complex="system" style:font-pitch-complex="variable"/>
    </style:style>
    <style:style style:name="ListLabel_20_510" style:display-name="ListLabel 510" style:family="text">
      <style:text-properties style:font-name-complex="OpenSymbol1" style:font-family-complex="OpenSymbol" style:font-family-generic-complex="system" style:font-pitch-complex="variable"/>
    </style:style>
    <style:style style:name="ListLabel_20_511" style:display-name="ListLabel 511" style:family="text">
      <style:text-properties style:font-name-complex="Symbol1" style:font-family-complex="Symbol" style:font-family-generic-complex="system" style:font-pitch-complex="variable"/>
    </style:style>
    <style:style style:name="ListLabel_20_512" style:display-name="ListLabel 512" style:family="text">
      <style:text-properties style:font-name-complex="OpenSymbol1" style:font-family-complex="OpenSymbol" style:font-family-generic-complex="system" style:font-pitch-complex="variable"/>
    </style:style>
    <style:style style:name="ListLabel_20_513" style:display-name="ListLabel 513" style:family="text">
      <style:text-properties style:font-name-complex="OpenSymbol1" style:font-family-complex="OpenSymbol" style:font-family-generic-complex="system" style:font-pitch-complex="variable"/>
    </style:style>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style style:name="ListLabel_20_731" style:display-name="ListLabel 731" style:family="text"/>
    <style:style style:name="ListLabel_20_732" style:display-name="ListLabel 732" style:family="text"/>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ListLabel_20_775" style:display-name="ListLabel 775" style:family="text"/>
    <style:style style:name="ListLabel_20_776" style:display-name="ListLabel 776" style:family="text"/>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style style:name="ListLabel_20_785" style:display-name="ListLabel 785" style:family="text"/>
    <style:style style:name="ListLabel_20_786" style:display-name="ListLabel 786" style:family="text"/>
    <style:style style:name="ListLabel_20_787" style:display-name="ListLabel 787" style:family="text"/>
    <style:style style:name="ListLabel_20_788" style:display-name="ListLabel 788" style:family="text"/>
    <style:style style:name="ListLabel_20_789" style:display-name="ListLabel 789" style:family="text"/>
    <style:style style:name="ListLabel_20_790" style:display-name="ListLabel 790" style:family="text"/>
    <style:style style:name="ListLabel_20_791" style:display-name="ListLabel 791" style:family="text"/>
    <style:style style:name="ListLabel_20_792" style:display-name="ListLabel 792" style:family="text"/>
    <style:style style:name="ListLabel_20_793" style:display-name="ListLabel 793" style:family="text"/>
    <style:style style:name="ListLabel_20_794" style:display-name="ListLabel 794" style:family="text"/>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style style:name="ListLabel_20_814" style:display-name="ListLabel 814" style:family="text"/>
    <style:style style:name="ListLabel_20_815" style:display-name="ListLabel 815" style:family="text"/>
    <style:style style:name="ListLabel_20_816" style:display-name="ListLabel 816" style:family="text"/>
    <style:style style:name="ListLabel_20_817" style:display-name="ListLabel 817" style:family="text"/>
    <style:style style:name="ListLabel_20_818" style:display-name="ListLabel 818" style:family="text"/>
    <style:style style:name="ListLabel_20_819" style:display-name="ListLabel 819" style:family="text"/>
    <style:style style:name="ListLabel_20_820" style:display-name="ListLabel 820" style:family="text"/>
    <style:style style:name="ListLabel_20_821" style:display-name="ListLabel 821" style:family="text"/>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829" style:display-name="ListLabel 829" style:family="text"/>
    <style:style style:name="ListLabel_20_830" style:display-name="ListLabel 830" style:family="text"/>
    <style:style style:name="ListLabel_20_831" style:display-name="ListLabel 831" style:family="text"/>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style style:name="ListLabel_20_856" style:display-name="ListLabel 856" style:family="text"/>
    <style:style style:name="ListLabel_20_857" style:display-name="ListLabel 857" style:family="text"/>
    <style:style style:name="ListLabel_20_858" style:display-name="ListLabel 858" style:family="text"/>
    <style:style style:name="ListLabel_20_859" style:display-name="ListLabel 859" style:family="text"/>
    <style:style style:name="ListLabel_20_860" style:display-name="ListLabel 860" style:family="text"/>
    <style:style style:name="ListLabel_20_861" style:display-name="ListLabel 861" style:family="text"/>
    <style:style style:name="ListLabel_20_862" style:display-name="ListLabel 862" style:family="text"/>
    <style:style style:name="ListLabel_20_863" style:display-name="ListLabel 863" style:family="text"/>
    <style:style style:name="ListLabel_20_864" style:display-name="ListLabel 864" style:family="text"/>
    <style:style style:name="ListLabel_20_865" style:display-name="ListLabel 865" style:family="text"/>
    <style:style style:name="ListLabel_20_866" style:display-name="ListLabel 866" style:family="text"/>
    <style:style style:name="ListLabel_20_867" style:display-name="ListLabel 867" style:family="text"/>
    <style:style style:name="ListLabel_20_868" style:display-name="ListLabel 868" style:family="text"/>
    <style:style style:name="ListLabel_20_869" style:display-name="ListLabel 869" style:family="text"/>
    <style:style style:name="ListLabel_20_870" style:display-name="ListLabel 870" style:family="text"/>
    <style:style style:name="ListLabel_20_871" style:display-name="ListLabel 871" style:family="text"/>
    <style:style style:name="ListLabel_20_872" style:display-name="ListLabel 872" style:family="text"/>
    <style:style style:name="ListLabel_20_873" style:display-name="ListLabel 873" style:family="text"/>
    <style:style style:name="ListLabel_20_874" style:display-name="ListLabel 874" style:family="text"/>
    <style:style style:name="ListLabel_20_875" style:display-name="ListLabel 875" style:family="text"/>
    <style:style style:name="ListLabel_20_876" style:display-name="ListLabel 876" style:family="text"/>
    <style:style style:name="ListLabel_20_877" style:display-name="ListLabel 877" style:family="text"/>
    <style:style style:name="ListLabel_20_878" style:display-name="ListLabel 878" style:family="text"/>
    <style:style style:name="ListLabel_20_879" style:display-name="ListLabel 879" style:family="text"/>
    <style:style style:name="ListLabel_20_880" style:display-name="ListLabel 880" style:family="text"/>
    <style:style style:name="ListLabel_20_881" style:display-name="ListLabel 881" style:family="text"/>
    <style:style style:name="ListLabel_20_882" style:display-name="ListLabel 882" style:family="text"/>
    <style:style style:name="ListLabel_20_883" style:display-name="ListLabel 883" style:family="text"/>
    <style:style style:name="ListLabel_20_884" style:display-name="ListLabel 884" style:family="text"/>
    <style:style style:name="ListLabel_20_885" style:display-name="ListLabel 885" style:family="text"/>
    <style:style style:name="ListLabel_20_886" style:display-name="ListLabel 886" style:family="text"/>
    <style:style style:name="ListLabel_20_887" style:display-name="ListLabel 887" style:family="text"/>
    <style:style style:name="ListLabel_20_888" style:display-name="ListLabel 888" style:family="text"/>
    <style:style style:name="ListLabel_20_889" style:display-name="ListLabel 889" style:family="text"/>
    <style:style style:name="ListLabel_20_890" style:display-name="ListLabel 890" style:family="text"/>
    <style:style style:name="ListLabel_20_891" style:display-name="ListLabel 891" style:family="text"/>
    <style:style style:name="ListLabel_20_892" style:display-name="ListLabel 892" style:family="text"/>
    <style:style style:name="ListLabel_20_893" style:display-name="ListLabel 893" style:family="text"/>
    <style:style style:name="ListLabel_20_894" style:display-name="ListLabel 894" style:family="text"/>
    <style:style style:name="ListLabel_20_895" style:display-name="ListLabel 895" style:family="text"/>
    <style:style style:name="ListLabel_20_896" style:display-name="ListLabel 896" style:family="text"/>
    <style:style style:name="ListLabel_20_897" style:display-name="ListLabel 897" style:family="text"/>
    <style:style style:name="ListLabel_20_898" style:display-name="ListLabel 898" style:family="text"/>
    <style:style style:name="ListLabel_20_899" style:display-name="ListLabel 899" style:family="text"/>
    <style:style style:name="ListLabel_20_900" style:display-name="ListLabel 900" style:family="text"/>
    <style:style style:name="ListLabel_20_901" style:display-name="ListLabel 901" style:family="text"/>
    <style:style style:name="ListLabel_20_902" style:display-name="ListLabel 902" style:family="text"/>
    <style:style style:name="ListLabel_20_903" style:display-name="ListLabel 903" style:family="text"/>
    <style:style style:name="ListLabel_20_904" style:display-name="ListLabel 904" style:family="text"/>
    <style:style style:name="ListLabel_20_905" style:display-name="ListLabel 905" style:family="text"/>
    <style:style style:name="ListLabel_20_906" style:display-name="ListLabel 906" style:family="text"/>
    <style:style style:name="ListLabel_20_907" style:display-name="ListLabel 907" style:family="text"/>
    <style:style style:name="ListLabel_20_908" style:display-name="ListLabel 908" style:family="text"/>
    <style:style style:name="ListLabel_20_909" style:display-name="ListLabel 909" style:family="text"/>
    <style:style style:name="ListLabel_20_910" style:display-name="ListLabel 910" style:family="text"/>
    <style:style style:name="ListLabel_20_911" style:display-name="ListLabel 911" style:family="text"/>
    <style:style style:name="ListLabel_20_912" style:display-name="ListLabel 912" style:family="text"/>
    <style:style style:name="ListLabel_20_913" style:display-name="ListLabel 913" style:family="text"/>
    <style:style style:name="ListLabel_20_914" style:display-name="ListLabel 914" style:family="text"/>
    <style:style style:name="ListLabel_20_915" style:display-name="ListLabel 915" style:family="text"/>
    <style:style style:name="ListLabel_20_916" style:display-name="ListLabel 916" style:family="text"/>
    <style:style style:name="ListLabel_20_917" style:display-name="ListLabel 917" style:family="text"/>
    <style:style style:name="ListLabel_20_918" style:display-name="ListLabel 918" style:family="text"/>
    <style:style style:name="ListLabel_20_919" style:display-name="ListLabel 919" style:family="text"/>
    <style:style style:name="ListLabel_20_920" style:display-name="ListLabel 920" style:family="text"/>
    <style:style style:name="ListLabel_20_921" style:display-name="ListLabel 921" style:family="text"/>
    <style:style style:name="ListLabel_20_922" style:display-name="ListLabel 922" style:family="text"/>
    <style:style style:name="ListLabel_20_923" style:display-name="ListLabel 923" style:family="text"/>
    <style:style style:name="ListLabel_20_924" style:display-name="ListLabel 924" style:family="text"/>
    <style:style style:name="ListLabel_20_925" style:display-name="ListLabel 925" style:family="text"/>
    <style:style style:name="ListLabel_20_926" style:display-name="ListLabel 926" style:family="text"/>
    <style:style style:name="ListLabel_20_927" style:display-name="ListLabel 927" style:family="text"/>
    <style:style style:name="ListLabel_20_928" style:display-name="ListLabel 928" style:family="text"/>
    <style:style style:name="ListLabel_20_929" style:display-name="ListLabel 929" style:family="text"/>
    <style:style style:name="ListLabel_20_930" style:display-name="ListLabel 930" style:family="text"/>
    <style:style style:name="ListLabel_20_931" style:display-name="ListLabel 931" style:family="text"/>
    <style:style style:name="ListLabel_20_932" style:display-name="ListLabel 932" style:family="text"/>
    <style:style style:name="ListLabel_20_933" style:display-name="ListLabel 933" style:family="text"/>
    <style:style style:name="ListLabel_20_934" style:display-name="ListLabel 934" style:family="text"/>
    <style:style style:name="ListLabel_20_935" style:display-name="ListLabel 935" style:family="text"/>
    <style:style style:name="ListLabel_20_936" style:display-name="ListLabel 936" style:family="text"/>
    <style:style style:name="ListLabel_20_937" style:display-name="ListLabel 937" style:family="text"/>
    <style:style style:name="ListLabel_20_938" style:display-name="ListLabel 938" style:family="text">
      <style:text-properties fo:font-variant="normal" fo:text-transform="none" fo:color="#002e4d" loext:opacity="100%" style:font-name="Montserrat" fo:font-family="Montserrat, sans-serif" style:font-family-generic="roman" style:font-pitch="variable" fo:font-size="10.5pt" fo:letter-spacing="normal" fo:language="it" fo:country="IT" fo:font-style="normal" style:text-underline-style="solid" style:text-underline-width="auto" style:text-underline-color="font-color" fo:font-weight="normal" fo:background-color="#d7d9d9" style:font-size-asian="10.5pt" style:font-style-asian="normal" style:font-weight-asian="normal" style:font-size-complex="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439cm" fo:text-indent="-0.635cm" fo:margin-left="1.439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074cm" fo:text-indent="-0.635cm" fo:margin-left="2.074cm"/>
        </style:list-level-properties>
        <style:text-properties style:font-name="OpenSymbol2"/>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709cm" fo:text-indent="-0.635cm" fo:margin-left="2.709cm"/>
        </style:list-level-properties>
        <style:text-properties style:font-name="OpenSymbol2"/>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344cm" fo:text-indent="-0.635cm" fo:margin-left="3.344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979cm" fo:text-indent="-0.635cm" fo:margin-left="3.979cm"/>
        </style:list-level-properties>
        <style:text-properties style:font-name="OpenSymbol2"/>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614cm" fo:text-indent="-0.635cm" fo:margin-left="4.614cm"/>
        </style:list-level-properties>
        <style:text-properties style:font-name="OpenSymbol2"/>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249cm" fo:text-indent="-0.635cm" fo:margin-left="5.249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884cm" fo:text-indent="-0.635cm" fo:margin-left="5.884cm"/>
        </style:list-level-properties>
        <style:text-properties style:font-name="OpenSymbol2"/>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519cm" fo:text-indent="-0.635cm" fo:margin-left="6.519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space" fo:text-indent="-0.03cm" fo:margin-left="0.071cm"/>
        </style:list-level-properties>
        <style:text-properties style:font-name="Wingdings"/>
      </text:list-level-style-bullet>
      <text:list-level-style-number text:level="2" text:style-name="ListLabel_20_19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space" fo:text-indent="-0.03cm" fo:margin-left="0.071cm"/>
        </style:list-level-properties>
        <style:text-properties style:font-name="Wingding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2.057cm" fo:text-indent="-0.635cm" fo:margin-left="2.057cm"/>
        </style:list-level-properties>
        <style:text-properties style:font-name="OpenSymbol2"/>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2.692cm" fo:text-indent="-0.635cm" fo:margin-left="2.692cm"/>
        </style:list-level-properties>
        <style:text-properties style:font-name="OpenSymbol2"/>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3.327cm" fo:text-indent="-0.635cm" fo:margin-left="3.327cm"/>
        </style:list-level-properties>
        <style:text-properties style:font-name="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3.962cm" fo:text-indent="-0.635cm" fo:margin-left="3.962cm"/>
        </style:list-level-properties>
        <style:text-properties style:font-name="OpenSymbol2"/>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4.597cm" fo:text-indent="-0.635cm" fo:margin-left="4.597cm"/>
        </style:list-level-properties>
        <style:text-properties style:font-name="OpenSymbol2"/>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5.232cm" fo:text-indent="-0.635cm" fo:margin-left="5.232cm"/>
        </style:list-level-properties>
        <style:text-properties style:font-name="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5.867cm" fo:text-indent="-0.635cm" fo:margin-left="5.867cm"/>
        </style:list-level-properties>
        <style:text-properties style:font-name="OpenSymbol2"/>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6.502cm" fo:text-indent="-0.635cm" fo:margin-left="6.502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1.397cm" fo:text-indent="-0.635cm" fo:margin-left="1.397cm"/>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2.032cm" fo:text-indent="-0.635cm" fo:margin-left="2.032cm"/>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2.667cm" fo:text-indent="-0.635cm" fo:margin-left="2.667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3.937cm" fo:text-indent="-0.635cm" fo:margin-left="3.937cm"/>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4.572cm" fo:text-indent="-0.635cm" fo:margin-left="4.57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5.207cm" fo:text-indent="-0.635cm" fo:margin-left="5.207cm"/>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6.477cm" fo:text-indent="-0.635cm" fo:margin-left="6.47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08"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9"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31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2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2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3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3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35"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36"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37"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38"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9"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0"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41"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42"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7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7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7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7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7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7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text:list-tab-stop-position="1.489cm" fo:text-indent="-0.635cm" fo:margin-left="1.489cm"/>
        </style:list-level-properties>
        <style:text-properties style:font-name="Symbol"/>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2.124cm" fo:text-indent="-0.635cm" fo:margin-left="2.124cm"/>
        </style:list-level-properties>
        <style:text-properties style:font-name="OpenSymbol2"/>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2.759cm" fo:text-indent="-0.635cm" fo:margin-left="2.759cm"/>
        </style:list-level-properties>
        <style:text-properties style:font-name="OpenSymbol2"/>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3.394cm" fo:text-indent="-0.635cm" fo:margin-left="3.394cm"/>
        </style:list-level-properties>
        <style:text-properties style:font-name="Symbol"/>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4.029cm" fo:text-indent="-0.635cm" fo:margin-left="4.029cm"/>
        </style:list-level-properties>
        <style:text-properties style:font-name="OpenSymbol2"/>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4.664cm" fo:text-indent="-0.635cm" fo:margin-left="4.664cm"/>
        </style:list-level-properties>
        <style:text-properties style:font-name="OpenSymbol2"/>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5.299cm" fo:text-indent="-0.635cm" fo:margin-left="5.299cm"/>
        </style:list-level-properties>
        <style:text-properties style:font-name="Symbol"/>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5.934cm" fo:text-indent="-0.635cm" fo:margin-left="5.934cm"/>
        </style:list-level-properties>
        <style:text-properties style:font-name="OpenSymbol2"/>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6.569cm" fo:text-indent="-0.635cm" fo:margin-left="6.569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2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2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2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2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3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3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3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3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3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3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4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442" loext:num-list-format="%1%." style:num-suffix="." style:num-format="1">
        <style:list-level-properties text:list-level-position-and-space-mode="label-alignment">
          <style:list-level-label-alignment text:label-followed-by="listtab" text:list-tab-stop-position="1.461cm" fo:text-indent="-0.635cm" fo:margin-left="1.461cm"/>
        </style:list-level-properties>
      </text:list-level-style-number>
      <text:list-level-style-number text:level="2" text:style-name="ListLabel_20_443" loext:num-list-format="%2%." style:num-suffix="." style:num-format="1">
        <style:list-level-properties text:list-level-position-and-space-mode="label-alignment">
          <style:list-level-label-alignment text:label-followed-by="listtab" text:list-tab-stop-position="2.096cm" fo:text-indent="-0.635cm" fo:margin-left="2.096cm"/>
        </style:list-level-properties>
      </text:list-level-style-number>
      <text:list-level-style-number text:level="3" text:style-name="ListLabel_20_444" loext:num-list-format="%3%." style:num-suffix="." style:num-format="1">
        <style:list-level-properties text:list-level-position-and-space-mode="label-alignment">
          <style:list-level-label-alignment text:label-followed-by="listtab" text:list-tab-stop-position="2.731cm" fo:text-indent="-0.635cm" fo:margin-left="2.731cm"/>
        </style:list-level-properties>
      </text:list-level-style-number>
      <text:list-level-style-number text:level="4" text:style-name="ListLabel_20_445" loext:num-list-format="%4%." style:num-suffix="." style:num-format="1">
        <style:list-level-properties text:list-level-position-and-space-mode="label-alignment">
          <style:list-level-label-alignment text:label-followed-by="listtab" text:list-tab-stop-position="3.366cm" fo:text-indent="-0.635cm" fo:margin-left="3.366cm"/>
        </style:list-level-properties>
      </text:list-level-style-number>
      <text:list-level-style-number text:level="5" text:style-name="ListLabel_20_446" loext:num-list-format="%5%." style:num-suffix="." style:num-format="1">
        <style:list-level-properties text:list-level-position-and-space-mode="label-alignment">
          <style:list-level-label-alignment text:label-followed-by="listtab" text:list-tab-stop-position="4.001cm" fo:text-indent="-0.635cm" fo:margin-left="4.001cm"/>
        </style:list-level-properties>
      </text:list-level-style-number>
      <text:list-level-style-number text:level="6" text:style-name="ListLabel_20_447" loext:num-list-format="%6%." style:num-suffix="." style:num-format="1">
        <style:list-level-properties text:list-level-position-and-space-mode="label-alignment">
          <style:list-level-label-alignment text:label-followed-by="listtab" text:list-tab-stop-position="4.636cm" fo:text-indent="-0.635cm" fo:margin-left="4.636cm"/>
        </style:list-level-properties>
      </text:list-level-style-number>
      <text:list-level-style-number text:level="7" text:style-name="ListLabel_20_448" loext:num-list-format="%7%." style:num-suffix="." style:num-format="1">
        <style:list-level-properties text:list-level-position-and-space-mode="label-alignment">
          <style:list-level-label-alignment text:label-followed-by="listtab" text:list-tab-stop-position="5.271cm" fo:text-indent="-0.635cm" fo:margin-left="5.271cm"/>
        </style:list-level-properties>
      </text:list-level-style-number>
      <text:list-level-style-number text:level="8" text:style-name="ListLabel_20_449" loext:num-list-format="%8%." style:num-suffix="." style:num-format="1">
        <style:list-level-properties text:list-level-position-and-space-mode="label-alignment">
          <style:list-level-label-alignment text:label-followed-by="listtab" text:list-tab-stop-position="5.906cm" fo:text-indent="-0.635cm" fo:margin-left="5.906cm"/>
        </style:list-level-properties>
      </text:list-level-style-number>
      <text:list-level-style-number text:level="9" text:style-name="ListLabel_20_450" loext:num-list-format="%9%." style:num-suffix="." style:num-format="1">
        <style:list-level-properties text:list-level-position-and-space-mode="label-alignment">
          <style:list-level-label-alignment text:label-followed-by="listtab" text:list-tab-stop-position="6.541cm" fo:text-indent="-0.635cm" fo:margin-left="6.54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2"/>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2"/>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2"/>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2"/>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2"/>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6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6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6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6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6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6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6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6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6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47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8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49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50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514" loext:num-list-format="%1%" style:num-format="">
        <style:list-level-properties text:list-level-position-and-space-mode="label-alignment">
          <style:list-level-label-alignment text:label-followed-by="nothing"/>
        </style:list-level-properties>
      </text:list-level-style-number>
      <text:list-level-style-number text:level="2" text:style-name="ListLabel_20_515" loext:num-list-format="%2%" style:num-format="">
        <style:list-level-properties text:list-level-position-and-space-mode="label-alignment">
          <style:list-level-label-alignment text:label-followed-by="nothing"/>
        </style:list-level-properties>
      </text:list-level-style-number>
      <text:list-level-style-number text:level="3" text:style-name="ListLabel_20_516" loext:num-list-format="%3%" style:num-format="">
        <style:list-level-properties text:list-level-position-and-space-mode="label-alignment">
          <style:list-level-label-alignment text:label-followed-by="nothing"/>
        </style:list-level-properties>
      </text:list-level-style-number>
      <text:list-level-style-number text:level="4" text:style-name="ListLabel_20_517" loext:num-list-format="%4%" style:num-format="">
        <style:list-level-properties text:list-level-position-and-space-mode="label-alignment">
          <style:list-level-label-alignment text:label-followed-by="nothing"/>
        </style:list-level-properties>
      </text:list-level-style-number>
      <text:list-level-style-number text:level="5" text:style-name="ListLabel_20_518" loext:num-list-format="%5%" style:num-format="">
        <style:list-level-properties text:list-level-position-and-space-mode="label-alignment">
          <style:list-level-label-alignment text:label-followed-by="nothing"/>
        </style:list-level-properties>
      </text:list-level-style-number>
      <text:list-level-style-number text:level="6" text:style-name="ListLabel_20_519" loext:num-list-format="%6%" style:num-format="">
        <style:list-level-properties text:list-level-position-and-space-mode="label-alignment">
          <style:list-level-label-alignment text:label-followed-by="nothing"/>
        </style:list-level-properties>
      </text:list-level-style-number>
      <text:list-level-style-number text:level="7" text:style-name="ListLabel_20_520" loext:num-list-format="%7%" style:num-format="">
        <style:list-level-properties text:list-level-position-and-space-mode="label-alignment">
          <style:list-level-label-alignment text:label-followed-by="nothing"/>
        </style:list-level-properties>
      </text:list-level-style-number>
      <text:list-level-style-number text:level="8" text:style-name="ListLabel_20_521" loext:num-list-format="%8%" style:num-format="">
        <style:list-level-properties text:list-level-position-and-space-mode="label-alignment">
          <style:list-level-label-alignment text:label-followed-by="nothing"/>
        </style:list-level-properties>
      </text:list-level-style-number>
      <text:list-level-style-number text:level="9" text:style-name="ListLabel_20_52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523" loext:num-list-format="%1%" style:num-format="">
        <style:list-level-properties text:list-level-position-and-space-mode="label-alignment">
          <style:list-level-label-alignment text:label-followed-by="nothing"/>
        </style:list-level-properties>
      </text:list-level-style-number>
      <text:list-level-style-number text:level="2" text:style-name="ListLabel_20_524" loext:num-list-format="%2%" style:num-format="">
        <style:list-level-properties text:list-level-position-and-space-mode="label-alignment">
          <style:list-level-label-alignment text:label-followed-by="nothing"/>
        </style:list-level-properties>
      </text:list-level-style-number>
      <text:list-level-style-number text:level="3" text:style-name="ListLabel_20_525" loext:num-list-format="%3%" style:num-format="">
        <style:list-level-properties text:list-level-position-and-space-mode="label-alignment">
          <style:list-level-label-alignment text:label-followed-by="nothing"/>
        </style:list-level-properties>
      </text:list-level-style-number>
      <text:list-level-style-number text:level="4" text:style-name="ListLabel_20_526" loext:num-list-format="%4%" style:num-format="">
        <style:list-level-properties text:list-level-position-and-space-mode="label-alignment">
          <style:list-level-label-alignment text:label-followed-by="nothing"/>
        </style:list-level-properties>
      </text:list-level-style-number>
      <text:list-level-style-number text:level="5" text:style-name="ListLabel_20_527" loext:num-list-format="%5%" style:num-format="">
        <style:list-level-properties text:list-level-position-and-space-mode="label-alignment">
          <style:list-level-label-alignment text:label-followed-by="nothing"/>
        </style:list-level-properties>
      </text:list-level-style-number>
      <text:list-level-style-number text:level="6" text:style-name="ListLabel_20_528" loext:num-list-format="%6%" style:num-format="">
        <style:list-level-properties text:list-level-position-and-space-mode="label-alignment">
          <style:list-level-label-alignment text:label-followed-by="nothing"/>
        </style:list-level-properties>
      </text:list-level-style-number>
      <text:list-level-style-number text:level="7" text:style-name="ListLabel_20_529" loext:num-list-format="%7%" style:num-format="">
        <style:list-level-properties text:list-level-position-and-space-mode="label-alignment">
          <style:list-level-label-alignment text:label-followed-by="nothing"/>
        </style:list-level-properties>
      </text:list-level-style-number>
      <text:list-level-style-number text:level="8" text:style-name="ListLabel_20_530" loext:num-list-format="%8%" style:num-format="">
        <style:list-level-properties text:list-level-position-and-space-mode="label-alignment">
          <style:list-level-label-alignment text:label-followed-by="nothing"/>
        </style:list-level-properties>
      </text:list-level-style-number>
      <text:list-level-style-number text:level="9" text:style-name="ListLabel_20_53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text:style-name="ListLabel_20_532" loext:num-list-format="%1%" style:num-format="">
        <style:list-level-properties text:list-level-position-and-space-mode="label-alignment">
          <style:list-level-label-alignment text:label-followed-by="nothing"/>
        </style:list-level-properties>
      </text:list-level-style-number>
      <text:list-level-style-number text:level="2" text:style-name="ListLabel_20_533" loext:num-list-format="%2%" style:num-format="">
        <style:list-level-properties text:list-level-position-and-space-mode="label-alignment">
          <style:list-level-label-alignment text:label-followed-by="nothing"/>
        </style:list-level-properties>
      </text:list-level-style-number>
      <text:list-level-style-number text:level="3" text:style-name="ListLabel_20_534" loext:num-list-format="%3%" style:num-format="">
        <style:list-level-properties text:list-level-position-and-space-mode="label-alignment">
          <style:list-level-label-alignment text:label-followed-by="nothing"/>
        </style:list-level-properties>
      </text:list-level-style-number>
      <text:list-level-style-number text:level="4" text:style-name="ListLabel_20_535" loext:num-list-format="%4%" style:num-format="">
        <style:list-level-properties text:list-level-position-and-space-mode="label-alignment">
          <style:list-level-label-alignment text:label-followed-by="nothing"/>
        </style:list-level-properties>
      </text:list-level-style-number>
      <text:list-level-style-number text:level="5" text:style-name="ListLabel_20_536" loext:num-list-format="%5%" style:num-format="">
        <style:list-level-properties text:list-level-position-and-space-mode="label-alignment">
          <style:list-level-label-alignment text:label-followed-by="nothing"/>
        </style:list-level-properties>
      </text:list-level-style-number>
      <text:list-level-style-number text:level="6" text:style-name="ListLabel_20_537" loext:num-list-format="%6%" style:num-format="">
        <style:list-level-properties text:list-level-position-and-space-mode="label-alignment">
          <style:list-level-label-alignment text:label-followed-by="nothing"/>
        </style:list-level-properties>
      </text:list-level-style-number>
      <text:list-level-style-number text:level="7" text:style-name="ListLabel_20_538" loext:num-list-format="%7%" style:num-format="">
        <style:list-level-properties text:list-level-position-and-space-mode="label-alignment">
          <style:list-level-label-alignment text:label-followed-by="nothing"/>
        </style:list-level-properties>
      </text:list-level-style-number>
      <text:list-level-style-number text:level="8" text:style-name="ListLabel_20_539" loext:num-list-format="%8%" style:num-format="">
        <style:list-level-properties text:list-level-position-and-space-mode="label-alignment">
          <style:list-level-label-alignment text:label-followed-by="nothing"/>
        </style:list-level-properties>
      </text:list-level-style-number>
      <text:list-level-style-number text:level="9" text:style-name="ListLabel_20_54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541" loext:num-list-format="%1%" style:num-format="">
        <style:list-level-properties text:list-level-position-and-space-mode="label-alignment">
          <style:list-level-label-alignment text:label-followed-by="nothing"/>
        </style:list-level-properties>
      </text:list-level-style-number>
      <text:list-level-style-number text:level="2" text:style-name="ListLabel_20_542" loext:num-list-format="%2%" style:num-format="">
        <style:list-level-properties text:list-level-position-and-space-mode="label-alignment">
          <style:list-level-label-alignment text:label-followed-by="nothing"/>
        </style:list-level-properties>
      </text:list-level-style-number>
      <text:list-level-style-number text:level="3" text:style-name="ListLabel_20_543" loext:num-list-format="%3%" style:num-format="">
        <style:list-level-properties text:list-level-position-and-space-mode="label-alignment">
          <style:list-level-label-alignment text:label-followed-by="nothing"/>
        </style:list-level-properties>
      </text:list-level-style-number>
      <text:list-level-style-number text:level="4" text:style-name="ListLabel_20_544" loext:num-list-format="%4%" style:num-format="">
        <style:list-level-properties text:list-level-position-and-space-mode="label-alignment">
          <style:list-level-label-alignment text:label-followed-by="nothing"/>
        </style:list-level-properties>
      </text:list-level-style-number>
      <text:list-level-style-number text:level="5" text:style-name="ListLabel_20_545" loext:num-list-format="%5%" style:num-format="">
        <style:list-level-properties text:list-level-position-and-space-mode="label-alignment">
          <style:list-level-label-alignment text:label-followed-by="nothing"/>
        </style:list-level-properties>
      </text:list-level-style-number>
      <text:list-level-style-number text:level="6" text:style-name="ListLabel_20_546" loext:num-list-format="%6%" style:num-format="">
        <style:list-level-properties text:list-level-position-and-space-mode="label-alignment">
          <style:list-level-label-alignment text:label-followed-by="nothing"/>
        </style:list-level-properties>
      </text:list-level-style-number>
      <text:list-level-style-number text:level="7" text:style-name="ListLabel_20_547" loext:num-list-format="%7%" style:num-format="">
        <style:list-level-properties text:list-level-position-and-space-mode="label-alignment">
          <style:list-level-label-alignment text:label-followed-by="nothing"/>
        </style:list-level-properties>
      </text:list-level-style-number>
      <text:list-level-style-number text:level="8" text:style-name="ListLabel_20_548" loext:num-list-format="%8%" style:num-format="">
        <style:list-level-properties text:list-level-position-and-space-mode="label-alignment">
          <style:list-level-label-alignment text:label-followed-by="nothing"/>
        </style:list-level-properties>
      </text:list-level-style-number>
      <text:list-level-style-number text:level="9" text:style-name="ListLabel_20_54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text:style-name="ListLabel_20_550" loext:num-list-format="%1%" style:num-format="">
        <style:list-level-properties text:list-level-position-and-space-mode="label-alignment">
          <style:list-level-label-alignment text:label-followed-by="nothing"/>
        </style:list-level-properties>
      </text:list-level-style-number>
      <text:list-level-style-number text:level="2" text:style-name="ListLabel_20_551" loext:num-list-format="%2%" style:num-format="">
        <style:list-level-properties text:list-level-position-and-space-mode="label-alignment">
          <style:list-level-label-alignment text:label-followed-by="nothing"/>
        </style:list-level-properties>
      </text:list-level-style-number>
      <text:list-level-style-number text:level="3" text:style-name="ListLabel_20_552" loext:num-list-format="%3%" style:num-format="">
        <style:list-level-properties text:list-level-position-and-space-mode="label-alignment">
          <style:list-level-label-alignment text:label-followed-by="nothing"/>
        </style:list-level-properties>
      </text:list-level-style-number>
      <text:list-level-style-number text:level="4" text:style-name="ListLabel_20_553" loext:num-list-format="%4%" style:num-format="">
        <style:list-level-properties text:list-level-position-and-space-mode="label-alignment">
          <style:list-level-label-alignment text:label-followed-by="nothing"/>
        </style:list-level-properties>
      </text:list-level-style-number>
      <text:list-level-style-number text:level="5" text:style-name="ListLabel_20_554" loext:num-list-format="%5%" style:num-format="">
        <style:list-level-properties text:list-level-position-and-space-mode="label-alignment">
          <style:list-level-label-alignment text:label-followed-by="nothing"/>
        </style:list-level-properties>
      </text:list-level-style-number>
      <text:list-level-style-number text:level="6" text:style-name="ListLabel_20_555" loext:num-list-format="%6%" style:num-format="">
        <style:list-level-properties text:list-level-position-and-space-mode="label-alignment">
          <style:list-level-label-alignment text:label-followed-by="nothing"/>
        </style:list-level-properties>
      </text:list-level-style-number>
      <text:list-level-style-number text:level="7" text:style-name="ListLabel_20_556" loext:num-list-format="%7%" style:num-format="">
        <style:list-level-properties text:list-level-position-and-space-mode="label-alignment">
          <style:list-level-label-alignment text:label-followed-by="nothing"/>
        </style:list-level-properties>
      </text:list-level-style-number>
      <text:list-level-style-number text:level="8" text:style-name="ListLabel_20_557" loext:num-list-format="%8%" style:num-format="">
        <style:list-level-properties text:list-level-position-and-space-mode="label-alignment">
          <style:list-level-label-alignment text:label-followed-by="nothing"/>
        </style:list-level-properties>
      </text:list-level-style-number>
      <text:list-level-style-number text:level="9" text:style-name="ListLabel_20_55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559" loext:num-list-format="%1%" style:num-format="">
        <style:list-level-properties text:list-level-position-and-space-mode="label-alignment">
          <style:list-level-label-alignment text:label-followed-by="nothing"/>
        </style:list-level-properties>
      </text:list-level-style-number>
      <text:list-level-style-number text:level="2" text:style-name="ListLabel_20_560" loext:num-list-format="%2%" style:num-format="">
        <style:list-level-properties text:list-level-position-and-space-mode="label-alignment">
          <style:list-level-label-alignment text:label-followed-by="nothing"/>
        </style:list-level-properties>
      </text:list-level-style-number>
      <text:list-level-style-number text:level="3" text:style-name="ListLabel_20_561" loext:num-list-format="%3%" style:num-format="">
        <style:list-level-properties text:list-level-position-and-space-mode="label-alignment">
          <style:list-level-label-alignment text:label-followed-by="nothing"/>
        </style:list-level-properties>
      </text:list-level-style-number>
      <text:list-level-style-number text:level="4" text:style-name="ListLabel_20_562" loext:num-list-format="%4%" style:num-format="">
        <style:list-level-properties text:list-level-position-and-space-mode="label-alignment">
          <style:list-level-label-alignment text:label-followed-by="nothing"/>
        </style:list-level-properties>
      </text:list-level-style-number>
      <text:list-level-style-number text:level="5" text:style-name="ListLabel_20_563" loext:num-list-format="%5%" style:num-format="">
        <style:list-level-properties text:list-level-position-and-space-mode="label-alignment">
          <style:list-level-label-alignment text:label-followed-by="nothing"/>
        </style:list-level-properties>
      </text:list-level-style-number>
      <text:list-level-style-number text:level="6" text:style-name="ListLabel_20_564" loext:num-list-format="%6%" style:num-format="">
        <style:list-level-properties text:list-level-position-and-space-mode="label-alignment">
          <style:list-level-label-alignment text:label-followed-by="nothing"/>
        </style:list-level-properties>
      </text:list-level-style-number>
      <text:list-level-style-number text:level="7" text:style-name="ListLabel_20_565" loext:num-list-format="%7%" style:num-format="">
        <style:list-level-properties text:list-level-position-and-space-mode="label-alignment">
          <style:list-level-label-alignment text:label-followed-by="nothing"/>
        </style:list-level-properties>
      </text:list-level-style-number>
      <text:list-level-style-number text:level="8" text:style-name="ListLabel_20_566" loext:num-list-format="%8%" style:num-format="">
        <style:list-level-properties text:list-level-position-and-space-mode="label-alignment">
          <style:list-level-label-alignment text:label-followed-by="nothing"/>
        </style:list-level-properties>
      </text:list-level-style-number>
      <text:list-level-style-number text:level="9" text:style-name="ListLabel_20_56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text:style-name="ListLabel_20_568" loext:num-list-format="%1%" style:num-format="">
        <style:list-level-properties text:list-level-position-and-space-mode="label-alignment">
          <style:list-level-label-alignment text:label-followed-by="nothing"/>
        </style:list-level-properties>
      </text:list-level-style-number>
      <text:list-level-style-number text:level="2" text:style-name="ListLabel_20_569" loext:num-list-format="%2%" style:num-format="">
        <style:list-level-properties text:list-level-position-and-space-mode="label-alignment">
          <style:list-level-label-alignment text:label-followed-by="nothing"/>
        </style:list-level-properties>
      </text:list-level-style-number>
      <text:list-level-style-number text:level="3" text:style-name="ListLabel_20_570" loext:num-list-format="%3%" style:num-format="">
        <style:list-level-properties text:list-level-position-and-space-mode="label-alignment">
          <style:list-level-label-alignment text:label-followed-by="nothing"/>
        </style:list-level-properties>
      </text:list-level-style-number>
      <text:list-level-style-number text:level="4" text:style-name="ListLabel_20_571" loext:num-list-format="%4%" style:num-format="">
        <style:list-level-properties text:list-level-position-and-space-mode="label-alignment">
          <style:list-level-label-alignment text:label-followed-by="nothing"/>
        </style:list-level-properties>
      </text:list-level-style-number>
      <text:list-level-style-number text:level="5" text:style-name="ListLabel_20_572" loext:num-list-format="%5%" style:num-format="">
        <style:list-level-properties text:list-level-position-and-space-mode="label-alignment">
          <style:list-level-label-alignment text:label-followed-by="nothing"/>
        </style:list-level-properties>
      </text:list-level-style-number>
      <text:list-level-style-number text:level="6" text:style-name="ListLabel_20_573" loext:num-list-format="%6%" style:num-format="">
        <style:list-level-properties text:list-level-position-and-space-mode="label-alignment">
          <style:list-level-label-alignment text:label-followed-by="nothing"/>
        </style:list-level-properties>
      </text:list-level-style-number>
      <text:list-level-style-number text:level="7" text:style-name="ListLabel_20_574" loext:num-list-format="%7%" style:num-format="">
        <style:list-level-properties text:list-level-position-and-space-mode="label-alignment">
          <style:list-level-label-alignment text:label-followed-by="nothing"/>
        </style:list-level-properties>
      </text:list-level-style-number>
      <text:list-level-style-number text:level="8" text:style-name="ListLabel_20_575" loext:num-list-format="%8%" style:num-format="">
        <style:list-level-properties text:list-level-position-and-space-mode="label-alignment">
          <style:list-level-label-alignment text:label-followed-by="nothing"/>
        </style:list-level-properties>
      </text:list-level-style-number>
      <text:list-level-style-number text:level="9" text:style-name="ListLabel_20_57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577" loext:num-list-format="%1%" style:num-format="">
        <style:list-level-properties text:list-level-position-and-space-mode="label-alignment">
          <style:list-level-label-alignment text:label-followed-by="nothing"/>
        </style:list-level-properties>
      </text:list-level-style-number>
      <text:list-level-style-number text:level="2" text:style-name="ListLabel_20_578" loext:num-list-format="%2%" style:num-format="">
        <style:list-level-properties text:list-level-position-and-space-mode="label-alignment">
          <style:list-level-label-alignment text:label-followed-by="nothing"/>
        </style:list-level-properties>
      </text:list-level-style-number>
      <text:list-level-style-number text:level="3" text:style-name="ListLabel_20_579" loext:num-list-format="%3%" style:num-format="">
        <style:list-level-properties text:list-level-position-and-space-mode="label-alignment">
          <style:list-level-label-alignment text:label-followed-by="nothing"/>
        </style:list-level-properties>
      </text:list-level-style-number>
      <text:list-level-style-number text:level="4" text:style-name="ListLabel_20_580" loext:num-list-format="%4%" style:num-format="">
        <style:list-level-properties text:list-level-position-and-space-mode="label-alignment">
          <style:list-level-label-alignment text:label-followed-by="nothing"/>
        </style:list-level-properties>
      </text:list-level-style-number>
      <text:list-level-style-number text:level="5" text:style-name="ListLabel_20_581" loext:num-list-format="%5%" style:num-format="">
        <style:list-level-properties text:list-level-position-and-space-mode="label-alignment">
          <style:list-level-label-alignment text:label-followed-by="nothing"/>
        </style:list-level-properties>
      </text:list-level-style-number>
      <text:list-level-style-number text:level="6" text:style-name="ListLabel_20_582" loext:num-list-format="%6%" style:num-format="">
        <style:list-level-properties text:list-level-position-and-space-mode="label-alignment">
          <style:list-level-label-alignment text:label-followed-by="nothing"/>
        </style:list-level-properties>
      </text:list-level-style-number>
      <text:list-level-style-number text:level="7" text:style-name="ListLabel_20_583" loext:num-list-format="%7%" style:num-format="">
        <style:list-level-properties text:list-level-position-and-space-mode="label-alignment">
          <style:list-level-label-alignment text:label-followed-by="nothing"/>
        </style:list-level-properties>
      </text:list-level-style-number>
      <text:list-level-style-number text:level="8" text:style-name="ListLabel_20_584" loext:num-list-format="%8%" style:num-format="">
        <style:list-level-properties text:list-level-position-and-space-mode="label-alignment">
          <style:list-level-label-alignment text:label-followed-by="nothing"/>
        </style:list-level-properties>
      </text:list-level-style-number>
      <text:list-level-style-number text:level="9" text:style-name="ListLabel_20_58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586" loext:num-list-format="%1%" style:num-format="">
        <style:list-level-properties text:list-level-position-and-space-mode="label-alignment">
          <style:list-level-label-alignment text:label-followed-by="nothing"/>
        </style:list-level-properties>
      </text:list-level-style-number>
      <text:list-level-style-number text:level="2" text:style-name="ListLabel_20_587" loext:num-list-format="%2%" style:num-format="">
        <style:list-level-properties text:list-level-position-and-space-mode="label-alignment">
          <style:list-level-label-alignment text:label-followed-by="nothing"/>
        </style:list-level-properties>
      </text:list-level-style-number>
      <text:list-level-style-number text:level="3" text:style-name="ListLabel_20_588" loext:num-list-format="%3%" style:num-format="">
        <style:list-level-properties text:list-level-position-and-space-mode="label-alignment">
          <style:list-level-label-alignment text:label-followed-by="nothing"/>
        </style:list-level-properties>
      </text:list-level-style-number>
      <text:list-level-style-number text:level="4" text:style-name="ListLabel_20_589" loext:num-list-format="%4%" style:num-format="">
        <style:list-level-properties text:list-level-position-and-space-mode="label-alignment">
          <style:list-level-label-alignment text:label-followed-by="nothing"/>
        </style:list-level-properties>
      </text:list-level-style-number>
      <text:list-level-style-number text:level="5" text:style-name="ListLabel_20_590" loext:num-list-format="%5%" style:num-format="">
        <style:list-level-properties text:list-level-position-and-space-mode="label-alignment">
          <style:list-level-label-alignment text:label-followed-by="nothing"/>
        </style:list-level-properties>
      </text:list-level-style-number>
      <text:list-level-style-number text:level="6" text:style-name="ListLabel_20_591" loext:num-list-format="%6%" style:num-format="">
        <style:list-level-properties text:list-level-position-and-space-mode="label-alignment">
          <style:list-level-label-alignment text:label-followed-by="nothing"/>
        </style:list-level-properties>
      </text:list-level-style-number>
      <text:list-level-style-number text:level="7" text:style-name="ListLabel_20_592" loext:num-list-format="%7%" style:num-format="">
        <style:list-level-properties text:list-level-position-and-space-mode="label-alignment">
          <style:list-level-label-alignment text:label-followed-by="nothing"/>
        </style:list-level-properties>
      </text:list-level-style-number>
      <text:list-level-style-number text:level="8" text:style-name="ListLabel_20_593" loext:num-list-format="%8%" style:num-format="">
        <style:list-level-properties text:list-level-position-and-space-mode="label-alignment">
          <style:list-level-label-alignment text:label-followed-by="nothing"/>
        </style:list-level-properties>
      </text:list-level-style-number>
      <text:list-level-style-number text:level="9" text:style-name="ListLabel_20_59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595" loext:num-list-format="%1%" style:num-format="">
        <style:list-level-properties text:list-level-position-and-space-mode="label-alignment">
          <style:list-level-label-alignment text:label-followed-by="nothing"/>
        </style:list-level-properties>
      </text:list-level-style-number>
      <text:list-level-style-number text:level="2" text:style-name="ListLabel_20_596" loext:num-list-format="%2%" style:num-format="">
        <style:list-level-properties text:list-level-position-and-space-mode="label-alignment">
          <style:list-level-label-alignment text:label-followed-by="nothing"/>
        </style:list-level-properties>
      </text:list-level-style-number>
      <text:list-level-style-number text:level="3" text:style-name="ListLabel_20_597" loext:num-list-format="%3%" style:num-format="">
        <style:list-level-properties text:list-level-position-and-space-mode="label-alignment">
          <style:list-level-label-alignment text:label-followed-by="nothing"/>
        </style:list-level-properties>
      </text:list-level-style-number>
      <text:list-level-style-number text:level="4" text:style-name="ListLabel_20_59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0" loext:num-list-format="%6%" style:num-format="">
        <style:list-level-properties text:list-level-position-and-space-mode="label-alignment">
          <style:list-level-label-alignment text:label-followed-by="nothing"/>
        </style:list-level-properties>
      </text:list-level-style-number>
      <text:list-level-style-number text:level="7" text:style-name="ListLabel_20_601" loext:num-list-format="%7%" style:num-format="">
        <style:list-level-properties text:list-level-position-and-space-mode="label-alignment">
          <style:list-level-label-alignment text:label-followed-by="nothing"/>
        </style:list-level-properties>
      </text:list-level-style-number>
      <text:list-level-style-number text:level="8" text:style-name="ListLabel_20_602" loext:num-list-format="%8%" style:num-format="">
        <style:list-level-properties text:list-level-position-and-space-mode="label-alignment">
          <style:list-level-label-alignment text:label-followed-by="nothing"/>
        </style:list-level-properties>
      </text:list-level-style-number>
      <text:list-level-style-number text:level="9" text:style-name="ListLabel_20_60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text:style-name="ListLabel_20_604" loext:num-list-format="%1%" style:num-format="">
        <style:list-level-properties text:list-level-position-and-space-mode="label-alignment">
          <style:list-level-label-alignment text:label-followed-by="nothing"/>
        </style:list-level-properties>
      </text:list-level-style-number>
      <text:list-level-style-number text:level="2" text:style-name="ListLabel_20_605" loext:num-list-format="%2%" style:num-format="">
        <style:list-level-properties text:list-level-position-and-space-mode="label-alignment">
          <style:list-level-label-alignment text:label-followed-by="nothing"/>
        </style:list-level-properties>
      </text:list-level-style-number>
      <text:list-level-style-number text:level="3" text:style-name="ListLabel_20_606" loext:num-list-format="%3%" style:num-format="">
        <style:list-level-properties text:list-level-position-and-space-mode="label-alignment">
          <style:list-level-label-alignment text:label-followed-by="nothing"/>
        </style:list-level-properties>
      </text:list-level-style-number>
      <text:list-level-style-number text:level="4" text:style-name="ListLabel_20_607" loext:num-list-format="%4%" style:num-format="">
        <style:list-level-properties text:list-level-position-and-space-mode="label-alignment">
          <style:list-level-label-alignment text:label-followed-by="nothing"/>
        </style:list-level-properties>
      </text:list-level-style-number>
      <text:list-level-style-number text:level="5" text:style-name="ListLabel_20_608" loext:num-list-format="%5%" style:num-format="">
        <style:list-level-properties text:list-level-position-and-space-mode="label-alignment">
          <style:list-level-label-alignment text:label-followed-by="nothing"/>
        </style:list-level-properties>
      </text:list-level-style-number>
      <text:list-level-style-number text:level="6" text:style-name="ListLabel_20_609" loext:num-list-format="%6%" style:num-format="">
        <style:list-level-properties text:list-level-position-and-space-mode="label-alignment">
          <style:list-level-label-alignment text:label-followed-by="nothing"/>
        </style:list-level-properties>
      </text:list-level-style-number>
      <text:list-level-style-number text:level="7" text:style-name="ListLabel_20_610" loext:num-list-format="%7%" style:num-format="">
        <style:list-level-properties text:list-level-position-and-space-mode="label-alignment">
          <style:list-level-label-alignment text:label-followed-by="nothing"/>
        </style:list-level-properties>
      </text:list-level-style-number>
      <text:list-level-style-number text:level="8" text:style-name="ListLabel_20_611" loext:num-list-format="%8%" style:num-format="">
        <style:list-level-properties text:list-level-position-and-space-mode="label-alignment">
          <style:list-level-label-alignment text:label-followed-by="nothing"/>
        </style:list-level-properties>
      </text:list-level-style-number>
      <text:list-level-style-number text:level="9" text:style-name="ListLabel_20_61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613" loext:num-list-format="%1%" style:num-format="">
        <style:list-level-properties text:list-level-position-and-space-mode="label-alignment">
          <style:list-level-label-alignment text:label-followed-by="nothing"/>
        </style:list-level-properties>
      </text:list-level-style-number>
      <text:list-level-style-number text:level="2" text:style-name="ListLabel_20_614" loext:num-list-format="%2%" style:num-format="">
        <style:list-level-properties text:list-level-position-and-space-mode="label-alignment">
          <style:list-level-label-alignment text:label-followed-by="nothing"/>
        </style:list-level-properties>
      </text:list-level-style-number>
      <text:list-level-style-number text:level="3" text:style-name="ListLabel_20_615" loext:num-list-format="%3%" style:num-format="">
        <style:list-level-properties text:list-level-position-and-space-mode="label-alignment">
          <style:list-level-label-alignment text:label-followed-by="nothing"/>
        </style:list-level-properties>
      </text:list-level-style-number>
      <text:list-level-style-number text:level="4" text:style-name="ListLabel_20_616" loext:num-list-format="%4%" style:num-format="">
        <style:list-level-properties text:list-level-position-and-space-mode="label-alignment">
          <style:list-level-label-alignment text:label-followed-by="nothing"/>
        </style:list-level-properties>
      </text:list-level-style-number>
      <text:list-level-style-number text:level="5" text:style-name="ListLabel_20_617" loext:num-list-format="%5%" style:num-format="">
        <style:list-level-properties text:list-level-position-and-space-mode="label-alignment">
          <style:list-level-label-alignment text:label-followed-by="nothing"/>
        </style:list-level-properties>
      </text:list-level-style-number>
      <text:list-level-style-number text:level="6" text:style-name="ListLabel_20_618" loext:num-list-format="%6%" style:num-format="">
        <style:list-level-properties text:list-level-position-and-space-mode="label-alignment">
          <style:list-level-label-alignment text:label-followed-by="nothing"/>
        </style:list-level-properties>
      </text:list-level-style-number>
      <text:list-level-style-number text:level="7" text:style-name="ListLabel_20_619" loext:num-list-format="%7%" style:num-format="">
        <style:list-level-properties text:list-level-position-and-space-mode="label-alignment">
          <style:list-level-label-alignment text:label-followed-by="nothing"/>
        </style:list-level-properties>
      </text:list-level-style-number>
      <text:list-level-style-number text:level="8" text:style-name="ListLabel_20_620" loext:num-list-format="%8%" style:num-format="">
        <style:list-level-properties text:list-level-position-and-space-mode="label-alignment">
          <style:list-level-label-alignment text:label-followed-by="nothing"/>
        </style:list-level-properties>
      </text:list-level-style-number>
      <text:list-level-style-number text:level="9" text:style-name="ListLabel_20_62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text:style-name="ListLabel_20_622" loext:num-list-format="%1%" style:num-format="">
        <style:list-level-properties text:list-level-position-and-space-mode="label-alignment">
          <style:list-level-label-alignment text:label-followed-by="nothing"/>
        </style:list-level-properties>
      </text:list-level-style-number>
      <text:list-level-style-number text:level="2" text:style-name="ListLabel_20_623" loext:num-list-format="%2%" style:num-format="">
        <style:list-level-properties text:list-level-position-and-space-mode="label-alignment">
          <style:list-level-label-alignment text:label-followed-by="nothing"/>
        </style:list-level-properties>
      </text:list-level-style-number>
      <text:list-level-style-number text:level="3" text:style-name="ListLabel_20_624" loext:num-list-format="%3%" style:num-format="">
        <style:list-level-properties text:list-level-position-and-space-mode="label-alignment">
          <style:list-level-label-alignment text:label-followed-by="nothing"/>
        </style:list-level-properties>
      </text:list-level-style-number>
      <text:list-level-style-number text:level="4" text:style-name="ListLabel_20_625" loext:num-list-format="%4%" style:num-format="">
        <style:list-level-properties text:list-level-position-and-space-mode="label-alignment">
          <style:list-level-label-alignment text:label-followed-by="nothing"/>
        </style:list-level-properties>
      </text:list-level-style-number>
      <text:list-level-style-number text:level="5" text:style-name="ListLabel_20_626" loext:num-list-format="%5%" style:num-format="">
        <style:list-level-properties text:list-level-position-and-space-mode="label-alignment">
          <style:list-level-label-alignment text:label-followed-by="nothing"/>
        </style:list-level-properties>
      </text:list-level-style-number>
      <text:list-level-style-number text:level="6" text:style-name="ListLabel_20_627" loext:num-list-format="%6%" style:num-format="">
        <style:list-level-properties text:list-level-position-and-space-mode="label-alignment">
          <style:list-level-label-alignment text:label-followed-by="nothing"/>
        </style:list-level-properties>
      </text:list-level-style-number>
      <text:list-level-style-number text:level="7" text:style-name="ListLabel_20_628" loext:num-list-format="%7%" style:num-format="">
        <style:list-level-properties text:list-level-position-and-space-mode="label-alignment">
          <style:list-level-label-alignment text:label-followed-by="nothing"/>
        </style:list-level-properties>
      </text:list-level-style-number>
      <text:list-level-style-number text:level="8" text:style-name="ListLabel_20_629" loext:num-list-format="%8%" style:num-format="">
        <style:list-level-properties text:list-level-position-and-space-mode="label-alignment">
          <style:list-level-label-alignment text:label-followed-by="nothing"/>
        </style:list-level-properties>
      </text:list-level-style-number>
      <text:list-level-style-number text:level="9" text:style-name="ListLabel_20_63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text:style-name="ListLabel_20_631" loext:num-list-format="%1%" style:num-format="">
        <style:list-level-properties text:list-level-position-and-space-mode="label-alignment">
          <style:list-level-label-alignment text:label-followed-by="nothing"/>
        </style:list-level-properties>
      </text:list-level-style-number>
      <text:list-level-style-number text:level="2" text:style-name="ListLabel_20_632" loext:num-list-format="%2%" style:num-format="">
        <style:list-level-properties text:list-level-position-and-space-mode="label-alignment">
          <style:list-level-label-alignment text:label-followed-by="nothing"/>
        </style:list-level-properties>
      </text:list-level-style-number>
      <text:list-level-style-number text:level="3" text:style-name="ListLabel_20_633" loext:num-list-format="%3%" style:num-format="">
        <style:list-level-properties text:list-level-position-and-space-mode="label-alignment">
          <style:list-level-label-alignment text:label-followed-by="nothing"/>
        </style:list-level-properties>
      </text:list-level-style-number>
      <text:list-level-style-number text:level="4" text:style-name="ListLabel_20_634" loext:num-list-format="%4%" style:num-format="">
        <style:list-level-properties text:list-level-position-and-space-mode="label-alignment">
          <style:list-level-label-alignment text:label-followed-by="nothing"/>
        </style:list-level-properties>
      </text:list-level-style-number>
      <text:list-level-style-number text:level="5" text:style-name="ListLabel_20_635" loext:num-list-format="%5%" style:num-format="">
        <style:list-level-properties text:list-level-position-and-space-mode="label-alignment">
          <style:list-level-label-alignment text:label-followed-by="nothing"/>
        </style:list-level-properties>
      </text:list-level-style-number>
      <text:list-level-style-number text:level="6" text:style-name="ListLabel_20_636" loext:num-list-format="%6%" style:num-format="">
        <style:list-level-properties text:list-level-position-and-space-mode="label-alignment">
          <style:list-level-label-alignment text:label-followed-by="nothing"/>
        </style:list-level-properties>
      </text:list-level-style-number>
      <text:list-level-style-number text:level="7" text:style-name="ListLabel_20_637" loext:num-list-format="%7%" style:num-format="">
        <style:list-level-properties text:list-level-position-and-space-mode="label-alignment">
          <style:list-level-label-alignment text:label-followed-by="nothing"/>
        </style:list-level-properties>
      </text:list-level-style-number>
      <text:list-level-style-number text:level="8" text:style-name="ListLabel_20_638" loext:num-list-format="%8%" style:num-format="">
        <style:list-level-properties text:list-level-position-and-space-mode="label-alignment">
          <style:list-level-label-alignment text:label-followed-by="nothing"/>
        </style:list-level-properties>
      </text:list-level-style-number>
      <text:list-level-style-number text:level="9" text:style-name="ListLabel_20_63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text:style-name="ListLabel_20_640" loext:num-list-format="%1%" style:num-format="">
        <style:list-level-properties text:list-level-position-and-space-mode="label-alignment">
          <style:list-level-label-alignment text:label-followed-by="nothing"/>
        </style:list-level-properties>
      </text:list-level-style-number>
      <text:list-level-style-number text:level="2" text:style-name="ListLabel_20_641" loext:num-list-format="%2%" style:num-format="">
        <style:list-level-properties text:list-level-position-and-space-mode="label-alignment">
          <style:list-level-label-alignment text:label-followed-by="nothing"/>
        </style:list-level-properties>
      </text:list-level-style-number>
      <text:list-level-style-number text:level="3" text:style-name="ListLabel_20_642" loext:num-list-format="%3%" style:num-format="">
        <style:list-level-properties text:list-level-position-and-space-mode="label-alignment">
          <style:list-level-label-alignment text:label-followed-by="nothing"/>
        </style:list-level-properties>
      </text:list-level-style-number>
      <text:list-level-style-number text:level="4" text:style-name="ListLabel_20_643" loext:num-list-format="%4%" style:num-format="">
        <style:list-level-properties text:list-level-position-and-space-mode="label-alignment">
          <style:list-level-label-alignment text:label-followed-by="nothing"/>
        </style:list-level-properties>
      </text:list-level-style-number>
      <text:list-level-style-number text:level="5" text:style-name="ListLabel_20_644" loext:num-list-format="%5%" style:num-format="">
        <style:list-level-properties text:list-level-position-and-space-mode="label-alignment">
          <style:list-level-label-alignment text:label-followed-by="nothing"/>
        </style:list-level-properties>
      </text:list-level-style-number>
      <text:list-level-style-number text:level="6" text:style-name="ListLabel_20_645" loext:num-list-format="%6%" style:num-format="">
        <style:list-level-properties text:list-level-position-and-space-mode="label-alignment">
          <style:list-level-label-alignment text:label-followed-by="nothing"/>
        </style:list-level-properties>
      </text:list-level-style-number>
      <text:list-level-style-number text:level="7" text:style-name="ListLabel_20_646" loext:num-list-format="%7%" style:num-format="">
        <style:list-level-properties text:list-level-position-and-space-mode="label-alignment">
          <style:list-level-label-alignment text:label-followed-by="nothing"/>
        </style:list-level-properties>
      </text:list-level-style-number>
      <text:list-level-style-number text:level="8" text:style-name="ListLabel_20_647" loext:num-list-format="%8%" style:num-format="">
        <style:list-level-properties text:list-level-position-and-space-mode="label-alignment">
          <style:list-level-label-alignment text:label-followed-by="nothing"/>
        </style:list-level-properties>
      </text:list-level-style-number>
      <text:list-level-style-number text:level="9" text:style-name="ListLabel_20_64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text:style-name="ListLabel_20_649" loext:num-list-format="%1%" style:num-format="">
        <style:list-level-properties text:list-level-position-and-space-mode="label-alignment">
          <style:list-level-label-alignment text:label-followed-by="nothing"/>
        </style:list-level-properties>
      </text:list-level-style-number>
      <text:list-level-style-number text:level="2" text:style-name="ListLabel_20_650" loext:num-list-format="%2%" style:num-format="">
        <style:list-level-properties text:list-level-position-and-space-mode="label-alignment">
          <style:list-level-label-alignment text:label-followed-by="nothing"/>
        </style:list-level-properties>
      </text:list-level-style-number>
      <text:list-level-style-number text:level="3" text:style-name="ListLabel_20_651" loext:num-list-format="%3%" style:num-format="">
        <style:list-level-properties text:list-level-position-and-space-mode="label-alignment">
          <style:list-level-label-alignment text:label-followed-by="nothing"/>
        </style:list-level-properties>
      </text:list-level-style-number>
      <text:list-level-style-number text:level="4" text:style-name="ListLabel_20_652" loext:num-list-format="%4%" style:num-format="">
        <style:list-level-properties text:list-level-position-and-space-mode="label-alignment">
          <style:list-level-label-alignment text:label-followed-by="nothing"/>
        </style:list-level-properties>
      </text:list-level-style-number>
      <text:list-level-style-number text:level="5" text:style-name="ListLabel_20_653" loext:num-list-format="%5%" style:num-format="">
        <style:list-level-properties text:list-level-position-and-space-mode="label-alignment">
          <style:list-level-label-alignment text:label-followed-by="nothing"/>
        </style:list-level-properties>
      </text:list-level-style-number>
      <text:list-level-style-number text:level="6" text:style-name="ListLabel_20_654" loext:num-list-format="%6%" style:num-format="">
        <style:list-level-properties text:list-level-position-and-space-mode="label-alignment">
          <style:list-level-label-alignment text:label-followed-by="nothing"/>
        </style:list-level-properties>
      </text:list-level-style-number>
      <text:list-level-style-number text:level="7" text:style-name="ListLabel_20_655" loext:num-list-format="%7%" style:num-format="">
        <style:list-level-properties text:list-level-position-and-space-mode="label-alignment">
          <style:list-level-label-alignment text:label-followed-by="nothing"/>
        </style:list-level-properties>
      </text:list-level-style-number>
      <text:list-level-style-number text:level="8" text:style-name="ListLabel_20_656" loext:num-list-format="%8%" style:num-format="">
        <style:list-level-properties text:list-level-position-and-space-mode="label-alignment">
          <style:list-level-label-alignment text:label-followed-by="nothing"/>
        </style:list-level-properties>
      </text:list-level-style-number>
      <text:list-level-style-number text:level="9" text:style-name="ListLabel_20_65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text:style-name="ListLabel_20_658" loext:num-list-format="%1%" style:num-format="">
        <style:list-level-properties text:list-level-position-and-space-mode="label-alignment">
          <style:list-level-label-alignment text:label-followed-by="nothing"/>
        </style:list-level-properties>
      </text:list-level-style-number>
      <text:list-level-style-number text:level="2" text:style-name="ListLabel_20_659" loext:num-list-format="%2%" style:num-format="">
        <style:list-level-properties text:list-level-position-and-space-mode="label-alignment">
          <style:list-level-label-alignment text:label-followed-by="nothing"/>
        </style:list-level-properties>
      </text:list-level-style-number>
      <text:list-level-style-number text:level="3" text:style-name="ListLabel_20_660" loext:num-list-format="%3%" style:num-format="">
        <style:list-level-properties text:list-level-position-and-space-mode="label-alignment">
          <style:list-level-label-alignment text:label-followed-by="nothing"/>
        </style:list-level-properties>
      </text:list-level-style-number>
      <text:list-level-style-number text:level="4" text:style-name="ListLabel_20_661" loext:num-list-format="%4%" style:num-format="">
        <style:list-level-properties text:list-level-position-and-space-mode="label-alignment">
          <style:list-level-label-alignment text:label-followed-by="nothing"/>
        </style:list-level-properties>
      </text:list-level-style-number>
      <text:list-level-style-number text:level="5" text:style-name="ListLabel_20_662" loext:num-list-format="%5%" style:num-format="">
        <style:list-level-properties text:list-level-position-and-space-mode="label-alignment">
          <style:list-level-label-alignment text:label-followed-by="nothing"/>
        </style:list-level-properties>
      </text:list-level-style-number>
      <text:list-level-style-number text:level="6" text:style-name="ListLabel_20_663" loext:num-list-format="%6%" style:num-format="">
        <style:list-level-properties text:list-level-position-and-space-mode="label-alignment">
          <style:list-level-label-alignment text:label-followed-by="nothing"/>
        </style:list-level-properties>
      </text:list-level-style-number>
      <text:list-level-style-number text:level="7" text:style-name="ListLabel_20_664" loext:num-list-format="%7%" style:num-format="">
        <style:list-level-properties text:list-level-position-and-space-mode="label-alignment">
          <style:list-level-label-alignment text:label-followed-by="nothing"/>
        </style:list-level-properties>
      </text:list-level-style-number>
      <text:list-level-style-number text:level="8" text:style-name="ListLabel_20_665" loext:num-list-format="%8%" style:num-format="">
        <style:list-level-properties text:list-level-position-and-space-mode="label-alignment">
          <style:list-level-label-alignment text:label-followed-by="nothing"/>
        </style:list-level-properties>
      </text:list-level-style-number>
      <text:list-level-style-number text:level="9" text:style-name="ListLabel_20_66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text:style-name="ListLabel_20_667" loext:num-list-format="%1%" style:num-format="">
        <style:list-level-properties text:list-level-position-and-space-mode="label-alignment">
          <style:list-level-label-alignment text:label-followed-by="nothing"/>
        </style:list-level-properties>
      </text:list-level-style-number>
      <text:list-level-style-number text:level="2" text:style-name="ListLabel_20_668" loext:num-list-format="%2%" style:num-format="">
        <style:list-level-properties text:list-level-position-and-space-mode="label-alignment">
          <style:list-level-label-alignment text:label-followed-by="nothing"/>
        </style:list-level-properties>
      </text:list-level-style-number>
      <text:list-level-style-number text:level="3" text:style-name="ListLabel_20_669" loext:num-list-format="%3%" style:num-format="">
        <style:list-level-properties text:list-level-position-and-space-mode="label-alignment">
          <style:list-level-label-alignment text:label-followed-by="nothing"/>
        </style:list-level-properties>
      </text:list-level-style-number>
      <text:list-level-style-number text:level="4" text:style-name="ListLabel_20_670" loext:num-list-format="%4%" style:num-format="">
        <style:list-level-properties text:list-level-position-and-space-mode="label-alignment">
          <style:list-level-label-alignment text:label-followed-by="nothing"/>
        </style:list-level-properties>
      </text:list-level-style-number>
      <text:list-level-style-number text:level="5" text:style-name="ListLabel_20_671" loext:num-list-format="%5%" style:num-format="">
        <style:list-level-properties text:list-level-position-and-space-mode="label-alignment">
          <style:list-level-label-alignment text:label-followed-by="nothing"/>
        </style:list-level-properties>
      </text:list-level-style-number>
      <text:list-level-style-number text:level="6" text:style-name="ListLabel_20_672" loext:num-list-format="%6%" style:num-format="">
        <style:list-level-properties text:list-level-position-and-space-mode="label-alignment">
          <style:list-level-label-alignment text:label-followed-by="nothing"/>
        </style:list-level-properties>
      </text:list-level-style-number>
      <text:list-level-style-number text:level="7" text:style-name="ListLabel_20_673" loext:num-list-format="%7%" style:num-format="">
        <style:list-level-properties text:list-level-position-and-space-mode="label-alignment">
          <style:list-level-label-alignment text:label-followed-by="nothing"/>
        </style:list-level-properties>
      </text:list-level-style-number>
      <text:list-level-style-number text:level="8" text:style-name="ListLabel_20_674" loext:num-list-format="%8%" style:num-format="">
        <style:list-level-properties text:list-level-position-and-space-mode="label-alignment">
          <style:list-level-label-alignment text:label-followed-by="nothing"/>
        </style:list-level-properties>
      </text:list-level-style-number>
      <text:list-level-style-number text:level="9" text:style-name="ListLabel_20_67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text:style-name="ListLabel_20_676" loext:num-list-format="%1%" style:num-format="">
        <style:list-level-properties text:list-level-position-and-space-mode="label-alignment">
          <style:list-level-label-alignment text:label-followed-by="nothing"/>
        </style:list-level-properties>
      </text:list-level-style-number>
      <text:list-level-style-number text:level="2" text:style-name="ListLabel_20_677" loext:num-list-format="%2%" style:num-format="">
        <style:list-level-properties text:list-level-position-and-space-mode="label-alignment">
          <style:list-level-label-alignment text:label-followed-by="nothing"/>
        </style:list-level-properties>
      </text:list-level-style-number>
      <text:list-level-style-number text:level="3" text:style-name="ListLabel_20_678" loext:num-list-format="%3%" style:num-format="">
        <style:list-level-properties text:list-level-position-and-space-mode="label-alignment">
          <style:list-level-label-alignment text:label-followed-by="nothing"/>
        </style:list-level-properties>
      </text:list-level-style-number>
      <text:list-level-style-number text:level="4" text:style-name="ListLabel_20_679" loext:num-list-format="%4%" style:num-format="">
        <style:list-level-properties text:list-level-position-and-space-mode="label-alignment">
          <style:list-level-label-alignment text:label-followed-by="nothing"/>
        </style:list-level-properties>
      </text:list-level-style-number>
      <text:list-level-style-number text:level="5" text:style-name="ListLabel_20_680" loext:num-list-format="%5%" style:num-format="">
        <style:list-level-properties text:list-level-position-and-space-mode="label-alignment">
          <style:list-level-label-alignment text:label-followed-by="nothing"/>
        </style:list-level-properties>
      </text:list-level-style-number>
      <text:list-level-style-number text:level="6" text:style-name="ListLabel_20_681" loext:num-list-format="%6%" style:num-format="">
        <style:list-level-properties text:list-level-position-and-space-mode="label-alignment">
          <style:list-level-label-alignment text:label-followed-by="nothing"/>
        </style:list-level-properties>
      </text:list-level-style-number>
      <text:list-level-style-number text:level="7" text:style-name="ListLabel_20_682" loext:num-list-format="%7%" style:num-format="">
        <style:list-level-properties text:list-level-position-and-space-mode="label-alignment">
          <style:list-level-label-alignment text:label-followed-by="nothing"/>
        </style:list-level-properties>
      </text:list-level-style-number>
      <text:list-level-style-number text:level="8" text:style-name="ListLabel_20_683" loext:num-list-format="%8%" style:num-format="">
        <style:list-level-properties text:list-level-position-and-space-mode="label-alignment">
          <style:list-level-label-alignment text:label-followed-by="nothing"/>
        </style:list-level-properties>
      </text:list-level-style-number>
      <text:list-level-style-number text:level="9" text:style-name="ListLabel_20_68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text:style-name="ListLabel_20_685" loext:num-list-format="%1%" style:num-format="">
        <style:list-level-properties text:list-level-position-and-space-mode="label-alignment">
          <style:list-level-label-alignment text:label-followed-by="nothing"/>
        </style:list-level-properties>
      </text:list-level-style-number>
      <text:list-level-style-number text:level="2" text:style-name="ListLabel_20_686" loext:num-list-format="%2%" style:num-format="">
        <style:list-level-properties text:list-level-position-and-space-mode="label-alignment">
          <style:list-level-label-alignment text:label-followed-by="nothing"/>
        </style:list-level-properties>
      </text:list-level-style-number>
      <text:list-level-style-number text:level="3" text:style-name="ListLabel_20_687" loext:num-list-format="%3%" style:num-format="">
        <style:list-level-properties text:list-level-position-and-space-mode="label-alignment">
          <style:list-level-label-alignment text:label-followed-by="nothing"/>
        </style:list-level-properties>
      </text:list-level-style-number>
      <text:list-level-style-number text:level="4" text:style-name="ListLabel_20_688" loext:num-list-format="%4%" style:num-format="">
        <style:list-level-properties text:list-level-position-and-space-mode="label-alignment">
          <style:list-level-label-alignment text:label-followed-by="nothing"/>
        </style:list-level-properties>
      </text:list-level-style-number>
      <text:list-level-style-number text:level="5" text:style-name="ListLabel_20_689" loext:num-list-format="%5%" style:num-format="">
        <style:list-level-properties text:list-level-position-and-space-mode="label-alignment">
          <style:list-level-label-alignment text:label-followed-by="nothing"/>
        </style:list-level-properties>
      </text:list-level-style-number>
      <text:list-level-style-number text:level="6" text:style-name="ListLabel_20_690" loext:num-list-format="%6%" style:num-format="">
        <style:list-level-properties text:list-level-position-and-space-mode="label-alignment">
          <style:list-level-label-alignment text:label-followed-by="nothing"/>
        </style:list-level-properties>
      </text:list-level-style-number>
      <text:list-level-style-number text:level="7" text:style-name="ListLabel_20_691" loext:num-list-format="%7%" style:num-format="">
        <style:list-level-properties text:list-level-position-and-space-mode="label-alignment">
          <style:list-level-label-alignment text:label-followed-by="nothing"/>
        </style:list-level-properties>
      </text:list-level-style-number>
      <text:list-level-style-number text:level="8" text:style-name="ListLabel_20_692" loext:num-list-format="%8%" style:num-format="">
        <style:list-level-properties text:list-level-position-and-space-mode="label-alignment">
          <style:list-level-label-alignment text:label-followed-by="nothing"/>
        </style:list-level-properties>
      </text:list-level-style-number>
      <text:list-level-style-number text:level="9" text:style-name="ListLabel_20_69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text:style-name="ListLabel_20_694" loext:num-list-format="%1%" style:num-format="">
        <style:list-level-properties text:list-level-position-and-space-mode="label-alignment">
          <style:list-level-label-alignment text:label-followed-by="nothing"/>
        </style:list-level-properties>
      </text:list-level-style-number>
      <text:list-level-style-number text:level="2" text:style-name="ListLabel_20_695" loext:num-list-format="%2%" style:num-format="">
        <style:list-level-properties text:list-level-position-and-space-mode="label-alignment">
          <style:list-level-label-alignment text:label-followed-by="nothing"/>
        </style:list-level-properties>
      </text:list-level-style-number>
      <text:list-level-style-number text:level="3" text:style-name="ListLabel_20_696" loext:num-list-format="%3%" style:num-format="">
        <style:list-level-properties text:list-level-position-and-space-mode="label-alignment">
          <style:list-level-label-alignment text:label-followed-by="nothing"/>
        </style:list-level-properties>
      </text:list-level-style-number>
      <text:list-level-style-number text:level="4" text:style-name="ListLabel_20_697" loext:num-list-format="%4%" style:num-format="">
        <style:list-level-properties text:list-level-position-and-space-mode="label-alignment">
          <style:list-level-label-alignment text:label-followed-by="nothing"/>
        </style:list-level-properties>
      </text:list-level-style-number>
      <text:list-level-style-number text:level="5" text:style-name="ListLabel_20_698" loext:num-list-format="%5%" style:num-format="">
        <style:list-level-properties text:list-level-position-and-space-mode="label-alignment">
          <style:list-level-label-alignment text:label-followed-by="nothing"/>
        </style:list-level-properties>
      </text:list-level-style-number>
      <text:list-level-style-number text:level="6" text:style-name="ListLabel_20_699" loext:num-list-format="%6%" style:num-format="">
        <style:list-level-properties text:list-level-position-and-space-mode="label-alignment">
          <style:list-level-label-alignment text:label-followed-by="nothing"/>
        </style:list-level-properties>
      </text:list-level-style-number>
      <text:list-level-style-number text:level="7" text:style-name="ListLabel_20_700" loext:num-list-format="%7%" style:num-format="">
        <style:list-level-properties text:list-level-position-and-space-mode="label-alignment">
          <style:list-level-label-alignment text:label-followed-by="nothing"/>
        </style:list-level-properties>
      </text:list-level-style-number>
      <text:list-level-style-number text:level="8" text:style-name="ListLabel_20_701" loext:num-list-format="%8%" style:num-format="">
        <style:list-level-properties text:list-level-position-and-space-mode="label-alignment">
          <style:list-level-label-alignment text:label-followed-by="nothing"/>
        </style:list-level-properties>
      </text:list-level-style-number>
      <text:list-level-style-number text:level="9" text:style-name="ListLabel_20_70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text:style-name="ListLabel_20_703" loext:num-list-format="%1%" style:num-format="">
        <style:list-level-properties text:list-level-position-and-space-mode="label-alignment">
          <style:list-level-label-alignment text:label-followed-by="nothing"/>
        </style:list-level-properties>
      </text:list-level-style-number>
      <text:list-level-style-number text:level="2" text:style-name="ListLabel_20_704" loext:num-list-format="%2%" style:num-format="">
        <style:list-level-properties text:list-level-position-and-space-mode="label-alignment">
          <style:list-level-label-alignment text:label-followed-by="nothing"/>
        </style:list-level-properties>
      </text:list-level-style-number>
      <text:list-level-style-number text:level="3" text:style-name="ListLabel_20_705" loext:num-list-format="%3%" style:num-format="">
        <style:list-level-properties text:list-level-position-and-space-mode="label-alignment">
          <style:list-level-label-alignment text:label-followed-by="nothing"/>
        </style:list-level-properties>
      </text:list-level-style-number>
      <text:list-level-style-number text:level="4" text:style-name="ListLabel_20_706" loext:num-list-format="%4%" style:num-format="">
        <style:list-level-properties text:list-level-position-and-space-mode="label-alignment">
          <style:list-level-label-alignment text:label-followed-by="nothing"/>
        </style:list-level-properties>
      </text:list-level-style-number>
      <text:list-level-style-number text:level="5" text:style-name="ListLabel_20_707" loext:num-list-format="%5%" style:num-format="">
        <style:list-level-properties text:list-level-position-and-space-mode="label-alignment">
          <style:list-level-label-alignment text:label-followed-by="nothing"/>
        </style:list-level-properties>
      </text:list-level-style-number>
      <text:list-level-style-number text:level="6" text:style-name="ListLabel_20_708" loext:num-list-format="%6%" style:num-format="">
        <style:list-level-properties text:list-level-position-and-space-mode="label-alignment">
          <style:list-level-label-alignment text:label-followed-by="nothing"/>
        </style:list-level-properties>
      </text:list-level-style-number>
      <text:list-level-style-number text:level="7" text:style-name="ListLabel_20_709" loext:num-list-format="%7%" style:num-format="">
        <style:list-level-properties text:list-level-position-and-space-mode="label-alignment">
          <style:list-level-label-alignment text:label-followed-by="nothing"/>
        </style:list-level-properties>
      </text:list-level-style-number>
      <text:list-level-style-number text:level="8" text:style-name="ListLabel_20_710" loext:num-list-format="%8%" style:num-format="">
        <style:list-level-properties text:list-level-position-and-space-mode="label-alignment">
          <style:list-level-label-alignment text:label-followed-by="nothing"/>
        </style:list-level-properties>
      </text:list-level-style-number>
      <text:list-level-style-number text:level="9" text:style-name="ListLabel_20_71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text:style-name="ListLabel_20_712" loext:num-list-format="%1%" style:num-format="">
        <style:list-level-properties text:list-level-position-and-space-mode="label-alignment">
          <style:list-level-label-alignment text:label-followed-by="nothing"/>
        </style:list-level-properties>
      </text:list-level-style-number>
      <text:list-level-style-number text:level="2" text:style-name="ListLabel_20_713" loext:num-list-format="%2%" style:num-format="">
        <style:list-level-properties text:list-level-position-and-space-mode="label-alignment">
          <style:list-level-label-alignment text:label-followed-by="nothing"/>
        </style:list-level-properties>
      </text:list-level-style-number>
      <text:list-level-style-number text:level="3" text:style-name="ListLabel_20_714" loext:num-list-format="%3%" style:num-format="">
        <style:list-level-properties text:list-level-position-and-space-mode="label-alignment">
          <style:list-level-label-alignment text:label-followed-by="nothing"/>
        </style:list-level-properties>
      </text:list-level-style-number>
      <text:list-level-style-number text:level="4" text:style-name="ListLabel_20_715" loext:num-list-format="%4%" style:num-format="">
        <style:list-level-properties text:list-level-position-and-space-mode="label-alignment">
          <style:list-level-label-alignment text:label-followed-by="nothing"/>
        </style:list-level-properties>
      </text:list-level-style-number>
      <text:list-level-style-number text:level="5" text:style-name="ListLabel_20_716" loext:num-list-format="%5%" style:num-format="">
        <style:list-level-properties text:list-level-position-and-space-mode="label-alignment">
          <style:list-level-label-alignment text:label-followed-by="nothing"/>
        </style:list-level-properties>
      </text:list-level-style-number>
      <text:list-level-style-number text:level="6" text:style-name="ListLabel_20_717" loext:num-list-format="%6%" style:num-format="">
        <style:list-level-properties text:list-level-position-and-space-mode="label-alignment">
          <style:list-level-label-alignment text:label-followed-by="nothing"/>
        </style:list-level-properties>
      </text:list-level-style-number>
      <text:list-level-style-number text:level="7" text:style-name="ListLabel_20_718" loext:num-list-format="%7%" style:num-format="">
        <style:list-level-properties text:list-level-position-and-space-mode="label-alignment">
          <style:list-level-label-alignment text:label-followed-by="nothing"/>
        </style:list-level-properties>
      </text:list-level-style-number>
      <text:list-level-style-number text:level="8" text:style-name="ListLabel_20_719" loext:num-list-format="%8%" style:num-format="">
        <style:list-level-properties text:list-level-position-and-space-mode="label-alignment">
          <style:list-level-label-alignment text:label-followed-by="nothing"/>
        </style:list-level-properties>
      </text:list-level-style-number>
      <text:list-level-style-number text:level="9" text:style-name="ListLabel_20_72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text:style-name="ListLabel_20_721" loext:num-list-format="%1%" style:num-format="">
        <style:list-level-properties text:list-level-position-and-space-mode="label-alignment">
          <style:list-level-label-alignment text:label-followed-by="nothing"/>
        </style:list-level-properties>
      </text:list-level-style-number>
      <text:list-level-style-number text:level="2" text:style-name="ListLabel_20_722" loext:num-list-format="%2%" style:num-format="">
        <style:list-level-properties text:list-level-position-and-space-mode="label-alignment">
          <style:list-level-label-alignment text:label-followed-by="nothing"/>
        </style:list-level-properties>
      </text:list-level-style-number>
      <text:list-level-style-number text:level="3" text:style-name="ListLabel_20_723" loext:num-list-format="%3%" style:num-format="">
        <style:list-level-properties text:list-level-position-and-space-mode="label-alignment">
          <style:list-level-label-alignment text:label-followed-by="nothing"/>
        </style:list-level-properties>
      </text:list-level-style-number>
      <text:list-level-style-number text:level="4" text:style-name="ListLabel_20_724" loext:num-list-format="%4%" style:num-format="">
        <style:list-level-properties text:list-level-position-and-space-mode="label-alignment">
          <style:list-level-label-alignment text:label-followed-by="nothing"/>
        </style:list-level-properties>
      </text:list-level-style-number>
      <text:list-level-style-number text:level="5" text:style-name="ListLabel_20_725" loext:num-list-format="%5%" style:num-format="">
        <style:list-level-properties text:list-level-position-and-space-mode="label-alignment">
          <style:list-level-label-alignment text:label-followed-by="nothing"/>
        </style:list-level-properties>
      </text:list-level-style-number>
      <text:list-level-style-number text:level="6" text:style-name="ListLabel_20_726" loext:num-list-format="%6%" style:num-format="">
        <style:list-level-properties text:list-level-position-and-space-mode="label-alignment">
          <style:list-level-label-alignment text:label-followed-by="nothing"/>
        </style:list-level-properties>
      </text:list-level-style-number>
      <text:list-level-style-number text:level="7" text:style-name="ListLabel_20_727" loext:num-list-format="%7%" style:num-format="">
        <style:list-level-properties text:list-level-position-and-space-mode="label-alignment">
          <style:list-level-label-alignment text:label-followed-by="nothing"/>
        </style:list-level-properties>
      </text:list-level-style-number>
      <text:list-level-style-number text:level="8" text:style-name="ListLabel_20_728" loext:num-list-format="%8%" style:num-format="">
        <style:list-level-properties text:list-level-position-and-space-mode="label-alignment">
          <style:list-level-label-alignment text:label-followed-by="nothing"/>
        </style:list-level-properties>
      </text:list-level-style-number>
      <text:list-level-style-number text:level="9" text:style-name="ListLabel_20_72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text:style-name="ListLabel_20_730" loext:num-list-format="%1%" style:num-format="">
        <style:list-level-properties text:list-level-position-and-space-mode="label-alignment">
          <style:list-level-label-alignment text:label-followed-by="nothing"/>
        </style:list-level-properties>
      </text:list-level-style-number>
      <text:list-level-style-number text:level="2" text:style-name="ListLabel_20_731" loext:num-list-format="%2%" style:num-format="">
        <style:list-level-properties text:list-level-position-and-space-mode="label-alignment">
          <style:list-level-label-alignment text:label-followed-by="nothing"/>
        </style:list-level-properties>
      </text:list-level-style-number>
      <text:list-level-style-number text:level="3" text:style-name="ListLabel_20_732" loext:num-list-format="%3%" style:num-format="">
        <style:list-level-properties text:list-level-position-and-space-mode="label-alignment">
          <style:list-level-label-alignment text:label-followed-by="nothing"/>
        </style:list-level-properties>
      </text:list-level-style-number>
      <text:list-level-style-number text:level="4" text:style-name="ListLabel_20_733" loext:num-list-format="%4%" style:num-format="">
        <style:list-level-properties text:list-level-position-and-space-mode="label-alignment">
          <style:list-level-label-alignment text:label-followed-by="nothing"/>
        </style:list-level-properties>
      </text:list-level-style-number>
      <text:list-level-style-number text:level="5" text:style-name="ListLabel_20_734" loext:num-list-format="%5%" style:num-format="">
        <style:list-level-properties text:list-level-position-and-space-mode="label-alignment">
          <style:list-level-label-alignment text:label-followed-by="nothing"/>
        </style:list-level-properties>
      </text:list-level-style-number>
      <text:list-level-style-number text:level="6" text:style-name="ListLabel_20_735" loext:num-list-format="%6%" style:num-format="">
        <style:list-level-properties text:list-level-position-and-space-mode="label-alignment">
          <style:list-level-label-alignment text:label-followed-by="nothing"/>
        </style:list-level-properties>
      </text:list-level-style-number>
      <text:list-level-style-number text:level="7" text:style-name="ListLabel_20_736" loext:num-list-format="%7%" style:num-format="">
        <style:list-level-properties text:list-level-position-and-space-mode="label-alignment">
          <style:list-level-label-alignment text:label-followed-by="nothing"/>
        </style:list-level-properties>
      </text:list-level-style-number>
      <text:list-level-style-number text:level="8" text:style-name="ListLabel_20_737" loext:num-list-format="%8%" style:num-format="">
        <style:list-level-properties text:list-level-position-and-space-mode="label-alignment">
          <style:list-level-label-alignment text:label-followed-by="nothing"/>
        </style:list-level-properties>
      </text:list-level-style-number>
      <text:list-level-style-number text:level="9" text:style-name="ListLabel_20_73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text:style-name="ListLabel_20_739" loext:num-list-format="%1%" style:num-format="">
        <style:list-level-properties text:list-level-position-and-space-mode="label-alignment">
          <style:list-level-label-alignment text:label-followed-by="nothing"/>
        </style:list-level-properties>
      </text:list-level-style-number>
      <text:list-level-style-number text:level="2" text:style-name="ListLabel_20_740" loext:num-list-format="%2%" style:num-format="">
        <style:list-level-properties text:list-level-position-and-space-mode="label-alignment">
          <style:list-level-label-alignment text:label-followed-by="nothing"/>
        </style:list-level-properties>
      </text:list-level-style-number>
      <text:list-level-style-number text:level="3" text:style-name="ListLabel_20_741" loext:num-list-format="%3%" style:num-format="">
        <style:list-level-properties text:list-level-position-and-space-mode="label-alignment">
          <style:list-level-label-alignment text:label-followed-by="nothing"/>
        </style:list-level-properties>
      </text:list-level-style-number>
      <text:list-level-style-number text:level="4" text:style-name="ListLabel_20_742" loext:num-list-format="%4%" style:num-format="">
        <style:list-level-properties text:list-level-position-and-space-mode="label-alignment">
          <style:list-level-label-alignment text:label-followed-by="nothing"/>
        </style:list-level-properties>
      </text:list-level-style-number>
      <text:list-level-style-number text:level="5" text:style-name="ListLabel_20_743" loext:num-list-format="%5%" style:num-format="">
        <style:list-level-properties text:list-level-position-and-space-mode="label-alignment">
          <style:list-level-label-alignment text:label-followed-by="nothing"/>
        </style:list-level-properties>
      </text:list-level-style-number>
      <text:list-level-style-number text:level="6" text:style-name="ListLabel_20_744" loext:num-list-format="%6%" style:num-format="">
        <style:list-level-properties text:list-level-position-and-space-mode="label-alignment">
          <style:list-level-label-alignment text:label-followed-by="nothing"/>
        </style:list-level-properties>
      </text:list-level-style-number>
      <text:list-level-style-number text:level="7" text:style-name="ListLabel_20_745" loext:num-list-format="%7%" style:num-format="">
        <style:list-level-properties text:list-level-position-and-space-mode="label-alignment">
          <style:list-level-label-alignment text:label-followed-by="nothing"/>
        </style:list-level-properties>
      </text:list-level-style-number>
      <text:list-level-style-number text:level="8" text:style-name="ListLabel_20_746" loext:num-list-format="%8%" style:num-format="">
        <style:list-level-properties text:list-level-position-and-space-mode="label-alignment">
          <style:list-level-label-alignment text:label-followed-by="nothing"/>
        </style:list-level-properties>
      </text:list-level-style-number>
      <text:list-level-style-number text:level="9" text:style-name="ListLabel_20_74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text:style-name="ListLabel_20_748" loext:num-list-format="%1%" style:num-format="">
        <style:list-level-properties text:list-level-position-and-space-mode="label-alignment">
          <style:list-level-label-alignment text:label-followed-by="nothing"/>
        </style:list-level-properties>
      </text:list-level-style-number>
      <text:list-level-style-number text:level="2" text:style-name="ListLabel_20_749" loext:num-list-format="%2%" style:num-format="">
        <style:list-level-properties text:list-level-position-and-space-mode="label-alignment">
          <style:list-level-label-alignment text:label-followed-by="nothing"/>
        </style:list-level-properties>
      </text:list-level-style-number>
      <text:list-level-style-number text:level="3" text:style-name="ListLabel_20_750" loext:num-list-format="%3%" style:num-format="">
        <style:list-level-properties text:list-level-position-and-space-mode="label-alignment">
          <style:list-level-label-alignment text:label-followed-by="nothing"/>
        </style:list-level-properties>
      </text:list-level-style-number>
      <text:list-level-style-number text:level="4" text:style-name="ListLabel_20_751" loext:num-list-format="%4%" style:num-format="">
        <style:list-level-properties text:list-level-position-and-space-mode="label-alignment">
          <style:list-level-label-alignment text:label-followed-by="nothing"/>
        </style:list-level-properties>
      </text:list-level-style-number>
      <text:list-level-style-number text:level="5" text:style-name="ListLabel_20_752" loext:num-list-format="%5%" style:num-format="">
        <style:list-level-properties text:list-level-position-and-space-mode="label-alignment">
          <style:list-level-label-alignment text:label-followed-by="nothing"/>
        </style:list-level-properties>
      </text:list-level-style-number>
      <text:list-level-style-number text:level="6" text:style-name="ListLabel_20_753" loext:num-list-format="%6%" style:num-format="">
        <style:list-level-properties text:list-level-position-and-space-mode="label-alignment">
          <style:list-level-label-alignment text:label-followed-by="nothing"/>
        </style:list-level-properties>
      </text:list-level-style-number>
      <text:list-level-style-number text:level="7" text:style-name="ListLabel_20_754" loext:num-list-format="%7%" style:num-format="">
        <style:list-level-properties text:list-level-position-and-space-mode="label-alignment">
          <style:list-level-label-alignment text:label-followed-by="nothing"/>
        </style:list-level-properties>
      </text:list-level-style-number>
      <text:list-level-style-number text:level="8" text:style-name="ListLabel_20_755" loext:num-list-format="%8%" style:num-format="">
        <style:list-level-properties text:list-level-position-and-space-mode="label-alignment">
          <style:list-level-label-alignment text:label-followed-by="nothing"/>
        </style:list-level-properties>
      </text:list-level-style-number>
      <text:list-level-style-number text:level="9" text:style-name="ListLabel_20_75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text:style-name="ListLabel_20_757" loext:num-list-format="%1%" style:num-format="">
        <style:list-level-properties text:list-level-position-and-space-mode="label-alignment">
          <style:list-level-label-alignment text:label-followed-by="nothing"/>
        </style:list-level-properties>
      </text:list-level-style-number>
      <text:list-level-style-number text:level="2" text:style-name="ListLabel_20_758" loext:num-list-format="%2%" style:num-format="">
        <style:list-level-properties text:list-level-position-and-space-mode="label-alignment">
          <style:list-level-label-alignment text:label-followed-by="nothing"/>
        </style:list-level-properties>
      </text:list-level-style-number>
      <text:list-level-style-number text:level="3" text:style-name="ListLabel_20_759" loext:num-list-format="%3%" style:num-format="">
        <style:list-level-properties text:list-level-position-and-space-mode="label-alignment">
          <style:list-level-label-alignment text:label-followed-by="nothing"/>
        </style:list-level-properties>
      </text:list-level-style-number>
      <text:list-level-style-number text:level="4" text:style-name="ListLabel_20_760" loext:num-list-format="%4%" style:num-format="">
        <style:list-level-properties text:list-level-position-and-space-mode="label-alignment">
          <style:list-level-label-alignment text:label-followed-by="nothing"/>
        </style:list-level-properties>
      </text:list-level-style-number>
      <text:list-level-style-number text:level="5" text:style-name="ListLabel_20_761" loext:num-list-format="%5%" style:num-format="">
        <style:list-level-properties text:list-level-position-and-space-mode="label-alignment">
          <style:list-level-label-alignment text:label-followed-by="nothing"/>
        </style:list-level-properties>
      </text:list-level-style-number>
      <text:list-level-style-number text:level="6" text:style-name="ListLabel_20_762" loext:num-list-format="%6%" style:num-format="">
        <style:list-level-properties text:list-level-position-and-space-mode="label-alignment">
          <style:list-level-label-alignment text:label-followed-by="nothing"/>
        </style:list-level-properties>
      </text:list-level-style-number>
      <text:list-level-style-number text:level="7" text:style-name="ListLabel_20_763" loext:num-list-format="%7%" style:num-format="">
        <style:list-level-properties text:list-level-position-and-space-mode="label-alignment">
          <style:list-level-label-alignment text:label-followed-by="nothing"/>
        </style:list-level-properties>
      </text:list-level-style-number>
      <text:list-level-style-number text:level="8" text:style-name="ListLabel_20_764" loext:num-list-format="%8%" style:num-format="">
        <style:list-level-properties text:list-level-position-and-space-mode="label-alignment">
          <style:list-level-label-alignment text:label-followed-by="nothing"/>
        </style:list-level-properties>
      </text:list-level-style-number>
      <text:list-level-style-number text:level="9" text:style-name="ListLabel_20_76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text:style-name="ListLabel_20_766" loext:num-list-format="%1%" style:num-format="">
        <style:list-level-properties text:list-level-position-and-space-mode="label-alignment">
          <style:list-level-label-alignment text:label-followed-by="nothing"/>
        </style:list-level-properties>
      </text:list-level-style-number>
      <text:list-level-style-number text:level="2" text:style-name="ListLabel_20_767" loext:num-list-format="%2%" style:num-format="">
        <style:list-level-properties text:list-level-position-and-space-mode="label-alignment">
          <style:list-level-label-alignment text:label-followed-by="nothing"/>
        </style:list-level-properties>
      </text:list-level-style-number>
      <text:list-level-style-number text:level="3" text:style-name="ListLabel_20_768" loext:num-list-format="%3%" style:num-format="">
        <style:list-level-properties text:list-level-position-and-space-mode="label-alignment">
          <style:list-level-label-alignment text:label-followed-by="nothing"/>
        </style:list-level-properties>
      </text:list-level-style-number>
      <text:list-level-style-number text:level="4" text:style-name="ListLabel_20_769" loext:num-list-format="%4%" style:num-format="">
        <style:list-level-properties text:list-level-position-and-space-mode="label-alignment">
          <style:list-level-label-alignment text:label-followed-by="nothing"/>
        </style:list-level-properties>
      </text:list-level-style-number>
      <text:list-level-style-number text:level="5" text:style-name="ListLabel_20_770" loext:num-list-format="%5%" style:num-format="">
        <style:list-level-properties text:list-level-position-and-space-mode="label-alignment">
          <style:list-level-label-alignment text:label-followed-by="nothing"/>
        </style:list-level-properties>
      </text:list-level-style-number>
      <text:list-level-style-number text:level="6" text:style-name="ListLabel_20_771" loext:num-list-format="%6%" style:num-format="">
        <style:list-level-properties text:list-level-position-and-space-mode="label-alignment">
          <style:list-level-label-alignment text:label-followed-by="nothing"/>
        </style:list-level-properties>
      </text:list-level-style-number>
      <text:list-level-style-number text:level="7" text:style-name="ListLabel_20_772" loext:num-list-format="%7%" style:num-format="">
        <style:list-level-properties text:list-level-position-and-space-mode="label-alignment">
          <style:list-level-label-alignment text:label-followed-by="nothing"/>
        </style:list-level-properties>
      </text:list-level-style-number>
      <text:list-level-style-number text:level="8" text:style-name="ListLabel_20_773" loext:num-list-format="%8%" style:num-format="">
        <style:list-level-properties text:list-level-position-and-space-mode="label-alignment">
          <style:list-level-label-alignment text:label-followed-by="nothing"/>
        </style:list-level-properties>
      </text:list-level-style-number>
      <text:list-level-style-number text:level="9" text:style-name="ListLabel_20_77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text:style-name="ListLabel_20_775" loext:num-list-format="%1%" style:num-format="">
        <style:list-level-properties text:list-level-position-and-space-mode="label-alignment">
          <style:list-level-label-alignment text:label-followed-by="nothing"/>
        </style:list-level-properties>
      </text:list-level-style-number>
      <text:list-level-style-number text:level="2" text:style-name="ListLabel_20_776" loext:num-list-format="%2%" style:num-format="">
        <style:list-level-properties text:list-level-position-and-space-mode="label-alignment">
          <style:list-level-label-alignment text:label-followed-by="nothing"/>
        </style:list-level-properties>
      </text:list-level-style-number>
      <text:list-level-style-number text:level="3" text:style-name="ListLabel_20_777" loext:num-list-format="%3%" style:num-format="">
        <style:list-level-properties text:list-level-position-and-space-mode="label-alignment">
          <style:list-level-label-alignment text:label-followed-by="nothing"/>
        </style:list-level-properties>
      </text:list-level-style-number>
      <text:list-level-style-number text:level="4" text:style-name="ListLabel_20_778" loext:num-list-format="%4%" style:num-format="">
        <style:list-level-properties text:list-level-position-and-space-mode="label-alignment">
          <style:list-level-label-alignment text:label-followed-by="nothing"/>
        </style:list-level-properties>
      </text:list-level-style-number>
      <text:list-level-style-number text:level="5" text:style-name="ListLabel_20_779" loext:num-list-format="%5%" style:num-format="">
        <style:list-level-properties text:list-level-position-and-space-mode="label-alignment">
          <style:list-level-label-alignment text:label-followed-by="nothing"/>
        </style:list-level-properties>
      </text:list-level-style-number>
      <text:list-level-style-number text:level="6" text:style-name="ListLabel_20_780" loext:num-list-format="%6%" style:num-format="">
        <style:list-level-properties text:list-level-position-and-space-mode="label-alignment">
          <style:list-level-label-alignment text:label-followed-by="nothing"/>
        </style:list-level-properties>
      </text:list-level-style-number>
      <text:list-level-style-number text:level="7" text:style-name="ListLabel_20_781" loext:num-list-format="%7%" style:num-format="">
        <style:list-level-properties text:list-level-position-and-space-mode="label-alignment">
          <style:list-level-label-alignment text:label-followed-by="nothing"/>
        </style:list-level-properties>
      </text:list-level-style-number>
      <text:list-level-style-number text:level="8" text:style-name="ListLabel_20_782" loext:num-list-format="%8%" style:num-format="">
        <style:list-level-properties text:list-level-position-and-space-mode="label-alignment">
          <style:list-level-label-alignment text:label-followed-by="nothing"/>
        </style:list-level-properties>
      </text:list-level-style-number>
      <text:list-level-style-number text:level="9" text:style-name="ListLabel_20_78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text:style-name="ListLabel_20_784" loext:num-list-format="%1%" style:num-format="">
        <style:list-level-properties text:list-level-position-and-space-mode="label-alignment">
          <style:list-level-label-alignment text:label-followed-by="nothing"/>
        </style:list-level-properties>
      </text:list-level-style-number>
      <text:list-level-style-number text:level="2" text:style-name="ListLabel_20_785" loext:num-list-format="%2%" style:num-format="">
        <style:list-level-properties text:list-level-position-and-space-mode="label-alignment">
          <style:list-level-label-alignment text:label-followed-by="nothing"/>
        </style:list-level-properties>
      </text:list-level-style-number>
      <text:list-level-style-number text:level="3" text:style-name="ListLabel_20_786" loext:num-list-format="%3%" style:num-format="">
        <style:list-level-properties text:list-level-position-and-space-mode="label-alignment">
          <style:list-level-label-alignment text:label-followed-by="nothing"/>
        </style:list-level-properties>
      </text:list-level-style-number>
      <text:list-level-style-number text:level="4" text:style-name="ListLabel_20_787" loext:num-list-format="%4%" style:num-format="">
        <style:list-level-properties text:list-level-position-and-space-mode="label-alignment">
          <style:list-level-label-alignment text:label-followed-by="nothing"/>
        </style:list-level-properties>
      </text:list-level-style-number>
      <text:list-level-style-number text:level="5" text:style-name="ListLabel_20_788" loext:num-list-format="%5%" style:num-format="">
        <style:list-level-properties text:list-level-position-and-space-mode="label-alignment">
          <style:list-level-label-alignment text:label-followed-by="nothing"/>
        </style:list-level-properties>
      </text:list-level-style-number>
      <text:list-level-style-number text:level="6" text:style-name="ListLabel_20_789" loext:num-list-format="%6%" style:num-format="">
        <style:list-level-properties text:list-level-position-and-space-mode="label-alignment">
          <style:list-level-label-alignment text:label-followed-by="nothing"/>
        </style:list-level-properties>
      </text:list-level-style-number>
      <text:list-level-style-number text:level="7" text:style-name="ListLabel_20_790" loext:num-list-format="%7%" style:num-format="">
        <style:list-level-properties text:list-level-position-and-space-mode="label-alignment">
          <style:list-level-label-alignment text:label-followed-by="nothing"/>
        </style:list-level-properties>
      </text:list-level-style-number>
      <text:list-level-style-number text:level="8" text:style-name="ListLabel_20_791" loext:num-list-format="%8%" style:num-format="">
        <style:list-level-properties text:list-level-position-and-space-mode="label-alignment">
          <style:list-level-label-alignment text:label-followed-by="nothing"/>
        </style:list-level-properties>
      </text:list-level-style-number>
      <text:list-level-style-number text:level="9" text:style-name="ListLabel_20_79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text:style-name="ListLabel_20_793" loext:num-list-format="%1%" style:num-format="">
        <style:list-level-properties text:list-level-position-and-space-mode="label-alignment">
          <style:list-level-label-alignment text:label-followed-by="nothing"/>
        </style:list-level-properties>
      </text:list-level-style-number>
      <text:list-level-style-number text:level="2" text:style-name="ListLabel_20_794" loext:num-list-format="%2%" style:num-format="">
        <style:list-level-properties text:list-level-position-and-space-mode="label-alignment">
          <style:list-level-label-alignment text:label-followed-by="nothing"/>
        </style:list-level-properties>
      </text:list-level-style-number>
      <text:list-level-style-number text:level="3" text:style-name="ListLabel_20_795" loext:num-list-format="%3%" style:num-format="">
        <style:list-level-properties text:list-level-position-and-space-mode="label-alignment">
          <style:list-level-label-alignment text:label-followed-by="nothing"/>
        </style:list-level-properties>
      </text:list-level-style-number>
      <text:list-level-style-number text:level="4" text:style-name="ListLabel_20_796" loext:num-list-format="%4%" style:num-format="">
        <style:list-level-properties text:list-level-position-and-space-mode="label-alignment">
          <style:list-level-label-alignment text:label-followed-by="nothing"/>
        </style:list-level-properties>
      </text:list-level-style-number>
      <text:list-level-style-number text:level="5" text:style-name="ListLabel_20_797" loext:num-list-format="%5%" style:num-format="">
        <style:list-level-properties text:list-level-position-and-space-mode="label-alignment">
          <style:list-level-label-alignment text:label-followed-by="nothing"/>
        </style:list-level-properties>
      </text:list-level-style-number>
      <text:list-level-style-number text:level="6" text:style-name="ListLabel_20_798" loext:num-list-format="%6%" style:num-format="">
        <style:list-level-properties text:list-level-position-and-space-mode="label-alignment">
          <style:list-level-label-alignment text:label-followed-by="nothing"/>
        </style:list-level-properties>
      </text:list-level-style-number>
      <text:list-level-style-number text:level="7" text:style-name="ListLabel_20_799" loext:num-list-format="%7%" style:num-format="">
        <style:list-level-properties text:list-level-position-and-space-mode="label-alignment">
          <style:list-level-label-alignment text:label-followed-by="nothing"/>
        </style:list-level-properties>
      </text:list-level-style-number>
      <text:list-level-style-number text:level="8" text:style-name="ListLabel_20_800" loext:num-list-format="%8%" style:num-format="">
        <style:list-level-properties text:list-level-position-and-space-mode="label-alignment">
          <style:list-level-label-alignment text:label-followed-by="nothing"/>
        </style:list-level-properties>
      </text:list-level-style-number>
      <text:list-level-style-number text:level="9" text:style-name="ListLabel_20_80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text:style-name="ListLabel_20_802" loext:num-list-format="%1%" style:num-format="">
        <style:list-level-properties text:list-level-position-and-space-mode="label-alignment">
          <style:list-level-label-alignment text:label-followed-by="nothing"/>
        </style:list-level-properties>
      </text:list-level-style-number>
      <text:list-level-style-number text:level="2" text:style-name="ListLabel_20_803" loext:num-list-format="%2%" style:num-format="">
        <style:list-level-properties text:list-level-position-and-space-mode="label-alignment">
          <style:list-level-label-alignment text:label-followed-by="nothing"/>
        </style:list-level-properties>
      </text:list-level-style-number>
      <text:list-level-style-number text:level="3" text:style-name="ListLabel_20_804" loext:num-list-format="%3%" style:num-format="">
        <style:list-level-properties text:list-level-position-and-space-mode="label-alignment">
          <style:list-level-label-alignment text:label-followed-by="nothing"/>
        </style:list-level-properties>
      </text:list-level-style-number>
      <text:list-level-style-number text:level="4" text:style-name="ListLabel_20_805" loext:num-list-format="%4%" style:num-format="">
        <style:list-level-properties text:list-level-position-and-space-mode="label-alignment">
          <style:list-level-label-alignment text:label-followed-by="nothing"/>
        </style:list-level-properties>
      </text:list-level-style-number>
      <text:list-level-style-number text:level="5" text:style-name="ListLabel_20_806" loext:num-list-format="%5%" style:num-format="">
        <style:list-level-properties text:list-level-position-and-space-mode="label-alignment">
          <style:list-level-label-alignment text:label-followed-by="nothing"/>
        </style:list-level-properties>
      </text:list-level-style-number>
      <text:list-level-style-number text:level="6" text:style-name="ListLabel_20_807" loext:num-list-format="%6%" style:num-format="">
        <style:list-level-properties text:list-level-position-and-space-mode="label-alignment">
          <style:list-level-label-alignment text:label-followed-by="nothing"/>
        </style:list-level-properties>
      </text:list-level-style-number>
      <text:list-level-style-number text:level="7" text:style-name="ListLabel_20_808" loext:num-list-format="%7%" style:num-format="">
        <style:list-level-properties text:list-level-position-and-space-mode="label-alignment">
          <style:list-level-label-alignment text:label-followed-by="nothing"/>
        </style:list-level-properties>
      </text:list-level-style-number>
      <text:list-level-style-number text:level="8" text:style-name="ListLabel_20_809" loext:num-list-format="%8%" style:num-format="">
        <style:list-level-properties text:list-level-position-and-space-mode="label-alignment">
          <style:list-level-label-alignment text:label-followed-by="nothing"/>
        </style:list-level-properties>
      </text:list-level-style-number>
      <text:list-level-style-number text:level="9" text:style-name="ListLabel_20_81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text:style-name="ListLabel_20_811" loext:num-list-format="%1%" style:num-format="">
        <style:list-level-properties text:list-level-position-and-space-mode="label-alignment">
          <style:list-level-label-alignment text:label-followed-by="nothing"/>
        </style:list-level-properties>
      </text:list-level-style-number>
      <text:list-level-style-number text:level="2" text:style-name="ListLabel_20_812" loext:num-list-format="%2%" style:num-format="">
        <style:list-level-properties text:list-level-position-and-space-mode="label-alignment">
          <style:list-level-label-alignment text:label-followed-by="nothing"/>
        </style:list-level-properties>
      </text:list-level-style-number>
      <text:list-level-style-number text:level="3" text:style-name="ListLabel_20_813" loext:num-list-format="%3%" style:num-format="">
        <style:list-level-properties text:list-level-position-and-space-mode="label-alignment">
          <style:list-level-label-alignment text:label-followed-by="nothing"/>
        </style:list-level-properties>
      </text:list-level-style-number>
      <text:list-level-style-number text:level="4" text:style-name="ListLabel_20_814" loext:num-list-format="%4%" style:num-format="">
        <style:list-level-properties text:list-level-position-and-space-mode="label-alignment">
          <style:list-level-label-alignment text:label-followed-by="nothing"/>
        </style:list-level-properties>
      </text:list-level-style-number>
      <text:list-level-style-number text:level="5" text:style-name="ListLabel_20_815" loext:num-list-format="%5%" style:num-format="">
        <style:list-level-properties text:list-level-position-and-space-mode="label-alignment">
          <style:list-level-label-alignment text:label-followed-by="nothing"/>
        </style:list-level-properties>
      </text:list-level-style-number>
      <text:list-level-style-number text:level="6" text:style-name="ListLabel_20_816" loext:num-list-format="%6%" style:num-format="">
        <style:list-level-properties text:list-level-position-and-space-mode="label-alignment">
          <style:list-level-label-alignment text:label-followed-by="nothing"/>
        </style:list-level-properties>
      </text:list-level-style-number>
      <text:list-level-style-number text:level="7" text:style-name="ListLabel_20_817" loext:num-list-format="%7%" style:num-format="">
        <style:list-level-properties text:list-level-position-and-space-mode="label-alignment">
          <style:list-level-label-alignment text:label-followed-by="nothing"/>
        </style:list-level-properties>
      </text:list-level-style-number>
      <text:list-level-style-number text:level="8" text:style-name="ListLabel_20_818" loext:num-list-format="%8%" style:num-format="">
        <style:list-level-properties text:list-level-position-and-space-mode="label-alignment">
          <style:list-level-label-alignment text:label-followed-by="nothing"/>
        </style:list-level-properties>
      </text:list-level-style-number>
      <text:list-level-style-number text:level="9" text:style-name="ListLabel_20_81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text:style-name="ListLabel_20_820" loext:num-list-format="%1%" style:num-format="">
        <style:list-level-properties text:list-level-position-and-space-mode="label-alignment">
          <style:list-level-label-alignment text:label-followed-by="nothing"/>
        </style:list-level-properties>
      </text:list-level-style-number>
      <text:list-level-style-number text:level="2" text:style-name="ListLabel_20_821" loext:num-list-format="%2%" style:num-format="">
        <style:list-level-properties text:list-level-position-and-space-mode="label-alignment">
          <style:list-level-label-alignment text:label-followed-by="nothing"/>
        </style:list-level-properties>
      </text:list-level-style-number>
      <text:list-level-style-number text:level="3" text:style-name="ListLabel_20_822" loext:num-list-format="%3%" style:num-format="">
        <style:list-level-properties text:list-level-position-and-space-mode="label-alignment">
          <style:list-level-label-alignment text:label-followed-by="nothing"/>
        </style:list-level-properties>
      </text:list-level-style-number>
      <text:list-level-style-number text:level="4" text:style-name="ListLabel_20_823" loext:num-list-format="%4%" style:num-format="">
        <style:list-level-properties text:list-level-position-and-space-mode="label-alignment">
          <style:list-level-label-alignment text:label-followed-by="nothing"/>
        </style:list-level-properties>
      </text:list-level-style-number>
      <text:list-level-style-number text:level="5" text:style-name="ListLabel_20_824" loext:num-list-format="%5%" style:num-format="">
        <style:list-level-properties text:list-level-position-and-space-mode="label-alignment">
          <style:list-level-label-alignment text:label-followed-by="nothing"/>
        </style:list-level-properties>
      </text:list-level-style-number>
      <text:list-level-style-number text:level="6" text:style-name="ListLabel_20_825" loext:num-list-format="%6%" style:num-format="">
        <style:list-level-properties text:list-level-position-and-space-mode="label-alignment">
          <style:list-level-label-alignment text:label-followed-by="nothing"/>
        </style:list-level-properties>
      </text:list-level-style-number>
      <text:list-level-style-number text:level="7" text:style-name="ListLabel_20_826" loext:num-list-format="%7%" style:num-format="">
        <style:list-level-properties text:list-level-position-and-space-mode="label-alignment">
          <style:list-level-label-alignment text:label-followed-by="nothing"/>
        </style:list-level-properties>
      </text:list-level-style-number>
      <text:list-level-style-number text:level="8" text:style-name="ListLabel_20_827" loext:num-list-format="%8%" style:num-format="">
        <style:list-level-properties text:list-level-position-and-space-mode="label-alignment">
          <style:list-level-label-alignment text:label-followed-by="nothing"/>
        </style:list-level-properties>
      </text:list-level-style-number>
      <text:list-level-style-number text:level="9" text:style-name="ListLabel_20_82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text:style-name="ListLabel_20_829" loext:num-list-format="%1%" style:num-format="">
        <style:list-level-properties text:list-level-position-and-space-mode="label-alignment">
          <style:list-level-label-alignment text:label-followed-by="nothing"/>
        </style:list-level-properties>
      </text:list-level-style-number>
      <text:list-level-style-number text:level="2" text:style-name="ListLabel_20_830" loext:num-list-format="%2%" style:num-format="">
        <style:list-level-properties text:list-level-position-and-space-mode="label-alignment">
          <style:list-level-label-alignment text:label-followed-by="nothing"/>
        </style:list-level-properties>
      </text:list-level-style-number>
      <text:list-level-style-number text:level="3" text:style-name="ListLabel_20_831" loext:num-list-format="%3%" style:num-format="">
        <style:list-level-properties text:list-level-position-and-space-mode="label-alignment">
          <style:list-level-label-alignment text:label-followed-by="nothing"/>
        </style:list-level-properties>
      </text:list-level-style-number>
      <text:list-level-style-number text:level="4" text:style-name="ListLabel_20_832" loext:num-list-format="%4%" style:num-format="">
        <style:list-level-properties text:list-level-position-and-space-mode="label-alignment">
          <style:list-level-label-alignment text:label-followed-by="nothing"/>
        </style:list-level-properties>
      </text:list-level-style-number>
      <text:list-level-style-number text:level="5" text:style-name="ListLabel_20_833" loext:num-list-format="%5%" style:num-format="">
        <style:list-level-properties text:list-level-position-and-space-mode="label-alignment">
          <style:list-level-label-alignment text:label-followed-by="nothing"/>
        </style:list-level-properties>
      </text:list-level-style-number>
      <text:list-level-style-number text:level="6" text:style-name="ListLabel_20_834" loext:num-list-format="%6%" style:num-format="">
        <style:list-level-properties text:list-level-position-and-space-mode="label-alignment">
          <style:list-level-label-alignment text:label-followed-by="nothing"/>
        </style:list-level-properties>
      </text:list-level-style-number>
      <text:list-level-style-number text:level="7" text:style-name="ListLabel_20_835" loext:num-list-format="%7%" style:num-format="">
        <style:list-level-properties text:list-level-position-and-space-mode="label-alignment">
          <style:list-level-label-alignment text:label-followed-by="nothing"/>
        </style:list-level-properties>
      </text:list-level-style-number>
      <text:list-level-style-number text:level="8" text:style-name="ListLabel_20_836" loext:num-list-format="%8%" style:num-format="">
        <style:list-level-properties text:list-level-position-and-space-mode="label-alignment">
          <style:list-level-label-alignment text:label-followed-by="nothing"/>
        </style:list-level-properties>
      </text:list-level-style-number>
      <text:list-level-style-number text:level="9" text:style-name="ListLabel_20_83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text:style-name="ListLabel_20_838" loext:num-list-format="%1%" style:num-format="">
        <style:list-level-properties text:list-level-position-and-space-mode="label-alignment">
          <style:list-level-label-alignment text:label-followed-by="nothing"/>
        </style:list-level-properties>
      </text:list-level-style-number>
      <text:list-level-style-number text:level="2" text:style-name="ListLabel_20_839" loext:num-list-format="%2%" style:num-format="">
        <style:list-level-properties text:list-level-position-and-space-mode="label-alignment">
          <style:list-level-label-alignment text:label-followed-by="nothing"/>
        </style:list-level-properties>
      </text:list-level-style-number>
      <text:list-level-style-number text:level="3" text:style-name="ListLabel_20_840" loext:num-list-format="%3%" style:num-format="">
        <style:list-level-properties text:list-level-position-and-space-mode="label-alignment">
          <style:list-level-label-alignment text:label-followed-by="nothing"/>
        </style:list-level-properties>
      </text:list-level-style-number>
      <text:list-level-style-number text:level="4" text:style-name="ListLabel_20_841" loext:num-list-format="%4%" style:num-format="">
        <style:list-level-properties text:list-level-position-and-space-mode="label-alignment">
          <style:list-level-label-alignment text:label-followed-by="nothing"/>
        </style:list-level-properties>
      </text:list-level-style-number>
      <text:list-level-style-number text:level="5" text:style-name="ListLabel_20_842" loext:num-list-format="%5%" style:num-format="">
        <style:list-level-properties text:list-level-position-and-space-mode="label-alignment">
          <style:list-level-label-alignment text:label-followed-by="nothing"/>
        </style:list-level-properties>
      </text:list-level-style-number>
      <text:list-level-style-number text:level="6" text:style-name="ListLabel_20_843" loext:num-list-format="%6%" style:num-format="">
        <style:list-level-properties text:list-level-position-and-space-mode="label-alignment">
          <style:list-level-label-alignment text:label-followed-by="nothing"/>
        </style:list-level-properties>
      </text:list-level-style-number>
      <text:list-level-style-number text:level="7" text:style-name="ListLabel_20_844" loext:num-list-format="%7%" style:num-format="">
        <style:list-level-properties text:list-level-position-and-space-mode="label-alignment">
          <style:list-level-label-alignment text:label-followed-by="nothing"/>
        </style:list-level-properties>
      </text:list-level-style-number>
      <text:list-level-style-number text:level="8" text:style-name="ListLabel_20_845" loext:num-list-format="%8%" style:num-format="">
        <style:list-level-properties text:list-level-position-and-space-mode="label-alignment">
          <style:list-level-label-alignment text:label-followed-by="nothing"/>
        </style:list-level-properties>
      </text:list-level-style-number>
      <text:list-level-style-number text:level="9" text:style-name="ListLabel_20_84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text:style-name="ListLabel_20_847" loext:num-list-format="%1%" style:num-format="">
        <style:list-level-properties text:list-level-position-and-space-mode="label-alignment">
          <style:list-level-label-alignment text:label-followed-by="nothing"/>
        </style:list-level-properties>
      </text:list-level-style-number>
      <text:list-level-style-number text:level="2" text:style-name="ListLabel_20_848" loext:num-list-format="%2%" style:num-format="">
        <style:list-level-properties text:list-level-position-and-space-mode="label-alignment">
          <style:list-level-label-alignment text:label-followed-by="nothing"/>
        </style:list-level-properties>
      </text:list-level-style-number>
      <text:list-level-style-number text:level="3" text:style-name="ListLabel_20_849" loext:num-list-format="%3%" style:num-format="">
        <style:list-level-properties text:list-level-position-and-space-mode="label-alignment">
          <style:list-level-label-alignment text:label-followed-by="nothing"/>
        </style:list-level-properties>
      </text:list-level-style-number>
      <text:list-level-style-number text:level="4" text:style-name="ListLabel_20_850" loext:num-list-format="%4%" style:num-format="">
        <style:list-level-properties text:list-level-position-and-space-mode="label-alignment">
          <style:list-level-label-alignment text:label-followed-by="nothing"/>
        </style:list-level-properties>
      </text:list-level-style-number>
      <text:list-level-style-number text:level="5" text:style-name="ListLabel_20_851" loext:num-list-format="%5%" style:num-format="">
        <style:list-level-properties text:list-level-position-and-space-mode="label-alignment">
          <style:list-level-label-alignment text:label-followed-by="nothing"/>
        </style:list-level-properties>
      </text:list-level-style-number>
      <text:list-level-style-number text:level="6" text:style-name="ListLabel_20_852" loext:num-list-format="%6%" style:num-format="">
        <style:list-level-properties text:list-level-position-and-space-mode="label-alignment">
          <style:list-level-label-alignment text:label-followed-by="nothing"/>
        </style:list-level-properties>
      </text:list-level-style-number>
      <text:list-level-style-number text:level="7" text:style-name="ListLabel_20_853" loext:num-list-format="%7%" style:num-format="">
        <style:list-level-properties text:list-level-position-and-space-mode="label-alignment">
          <style:list-level-label-alignment text:label-followed-by="nothing"/>
        </style:list-level-properties>
      </text:list-level-style-number>
      <text:list-level-style-number text:level="8" text:style-name="ListLabel_20_854" loext:num-list-format="%8%" style:num-format="">
        <style:list-level-properties text:list-level-position-and-space-mode="label-alignment">
          <style:list-level-label-alignment text:label-followed-by="nothing"/>
        </style:list-level-properties>
      </text:list-level-style-number>
      <text:list-level-style-number text:level="9" text:style-name="ListLabel_20_85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text:style-name="ListLabel_20_856" loext:num-list-format="%1%" style:num-format="">
        <style:list-level-properties text:list-level-position-and-space-mode="label-alignment">
          <style:list-level-label-alignment text:label-followed-by="nothing"/>
        </style:list-level-properties>
      </text:list-level-style-number>
      <text:list-level-style-number text:level="2" text:style-name="ListLabel_20_857" loext:num-list-format="%2%" style:num-format="">
        <style:list-level-properties text:list-level-position-and-space-mode="label-alignment">
          <style:list-level-label-alignment text:label-followed-by="nothing"/>
        </style:list-level-properties>
      </text:list-level-style-number>
      <text:list-level-style-number text:level="3" text:style-name="ListLabel_20_858" loext:num-list-format="%3%" style:num-format="">
        <style:list-level-properties text:list-level-position-and-space-mode="label-alignment">
          <style:list-level-label-alignment text:label-followed-by="nothing"/>
        </style:list-level-properties>
      </text:list-level-style-number>
      <text:list-level-style-number text:level="4" text:style-name="ListLabel_20_859" loext:num-list-format="%4%" style:num-format="">
        <style:list-level-properties text:list-level-position-and-space-mode="label-alignment">
          <style:list-level-label-alignment text:label-followed-by="nothing"/>
        </style:list-level-properties>
      </text:list-level-style-number>
      <text:list-level-style-number text:level="5" text:style-name="ListLabel_20_860" loext:num-list-format="%5%" style:num-format="">
        <style:list-level-properties text:list-level-position-and-space-mode="label-alignment">
          <style:list-level-label-alignment text:label-followed-by="nothing"/>
        </style:list-level-properties>
      </text:list-level-style-number>
      <text:list-level-style-number text:level="6" text:style-name="ListLabel_20_861" loext:num-list-format="%6%" style:num-format="">
        <style:list-level-properties text:list-level-position-and-space-mode="label-alignment">
          <style:list-level-label-alignment text:label-followed-by="nothing"/>
        </style:list-level-properties>
      </text:list-level-style-number>
      <text:list-level-style-number text:level="7" text:style-name="ListLabel_20_862" loext:num-list-format="%7%" style:num-format="">
        <style:list-level-properties text:list-level-position-and-space-mode="label-alignment">
          <style:list-level-label-alignment text:label-followed-by="nothing"/>
        </style:list-level-properties>
      </text:list-level-style-number>
      <text:list-level-style-number text:level="8" text:style-name="ListLabel_20_863" loext:num-list-format="%8%" style:num-format="">
        <style:list-level-properties text:list-level-position-and-space-mode="label-alignment">
          <style:list-level-label-alignment text:label-followed-by="nothing"/>
        </style:list-level-properties>
      </text:list-level-style-number>
      <text:list-level-style-number text:level="9" text:style-name="ListLabel_20_86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text:style-name="ListLabel_20_865" loext:num-list-format="%1%" style:num-format="">
        <style:list-level-properties text:list-level-position-and-space-mode="label-alignment">
          <style:list-level-label-alignment text:label-followed-by="nothing"/>
        </style:list-level-properties>
      </text:list-level-style-number>
      <text:list-level-style-number text:level="2" text:style-name="ListLabel_20_866" loext:num-list-format="%2%" style:num-format="">
        <style:list-level-properties text:list-level-position-and-space-mode="label-alignment">
          <style:list-level-label-alignment text:label-followed-by="nothing"/>
        </style:list-level-properties>
      </text:list-level-style-number>
      <text:list-level-style-number text:level="3" text:style-name="ListLabel_20_867" loext:num-list-format="%3%" style:num-format="">
        <style:list-level-properties text:list-level-position-and-space-mode="label-alignment">
          <style:list-level-label-alignment text:label-followed-by="nothing"/>
        </style:list-level-properties>
      </text:list-level-style-number>
      <text:list-level-style-number text:level="4" text:style-name="ListLabel_20_868" loext:num-list-format="%4%" style:num-format="">
        <style:list-level-properties text:list-level-position-and-space-mode="label-alignment">
          <style:list-level-label-alignment text:label-followed-by="nothing"/>
        </style:list-level-properties>
      </text:list-level-style-number>
      <text:list-level-style-number text:level="5" text:style-name="ListLabel_20_869" loext:num-list-format="%5%" style:num-format="">
        <style:list-level-properties text:list-level-position-and-space-mode="label-alignment">
          <style:list-level-label-alignment text:label-followed-by="nothing"/>
        </style:list-level-properties>
      </text:list-level-style-number>
      <text:list-level-style-number text:level="6" text:style-name="ListLabel_20_870" loext:num-list-format="%6%" style:num-format="">
        <style:list-level-properties text:list-level-position-and-space-mode="label-alignment">
          <style:list-level-label-alignment text:label-followed-by="nothing"/>
        </style:list-level-properties>
      </text:list-level-style-number>
      <text:list-level-style-number text:level="7" text:style-name="ListLabel_20_871" loext:num-list-format="%7%" style:num-format="">
        <style:list-level-properties text:list-level-position-and-space-mode="label-alignment">
          <style:list-level-label-alignment text:label-followed-by="nothing"/>
        </style:list-level-properties>
      </text:list-level-style-number>
      <text:list-level-style-number text:level="8" text:style-name="ListLabel_20_872" loext:num-list-format="%8%" style:num-format="">
        <style:list-level-properties text:list-level-position-and-space-mode="label-alignment">
          <style:list-level-label-alignment text:label-followed-by="nothing"/>
        </style:list-level-properties>
      </text:list-level-style-number>
      <text:list-level-style-number text:level="9" text:style-name="ListLabel_20_87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text:style-name="ListLabel_20_874" loext:num-list-format="%1%" style:num-format="">
        <style:list-level-properties text:list-level-position-and-space-mode="label-alignment">
          <style:list-level-label-alignment text:label-followed-by="nothing"/>
        </style:list-level-properties>
      </text:list-level-style-number>
      <text:list-level-style-number text:level="2" text:style-name="ListLabel_20_875" loext:num-list-format="%2%" style:num-format="">
        <style:list-level-properties text:list-level-position-and-space-mode="label-alignment">
          <style:list-level-label-alignment text:label-followed-by="nothing"/>
        </style:list-level-properties>
      </text:list-level-style-number>
      <text:list-level-style-number text:level="3" text:style-name="ListLabel_20_876" loext:num-list-format="%3%" style:num-format="">
        <style:list-level-properties text:list-level-position-and-space-mode="label-alignment">
          <style:list-level-label-alignment text:label-followed-by="nothing"/>
        </style:list-level-properties>
      </text:list-level-style-number>
      <text:list-level-style-number text:level="4" text:style-name="ListLabel_20_877" loext:num-list-format="%4%" style:num-format="">
        <style:list-level-properties text:list-level-position-and-space-mode="label-alignment">
          <style:list-level-label-alignment text:label-followed-by="nothing"/>
        </style:list-level-properties>
      </text:list-level-style-number>
      <text:list-level-style-number text:level="5" text:style-name="ListLabel_20_878" loext:num-list-format="%5%" style:num-format="">
        <style:list-level-properties text:list-level-position-and-space-mode="label-alignment">
          <style:list-level-label-alignment text:label-followed-by="nothing"/>
        </style:list-level-properties>
      </text:list-level-style-number>
      <text:list-level-style-number text:level="6" text:style-name="ListLabel_20_879" loext:num-list-format="%6%" style:num-format="">
        <style:list-level-properties text:list-level-position-and-space-mode="label-alignment">
          <style:list-level-label-alignment text:label-followed-by="nothing"/>
        </style:list-level-properties>
      </text:list-level-style-number>
      <text:list-level-style-number text:level="7" text:style-name="ListLabel_20_880" loext:num-list-format="%7%" style:num-format="">
        <style:list-level-properties text:list-level-position-and-space-mode="label-alignment">
          <style:list-level-label-alignment text:label-followed-by="nothing"/>
        </style:list-level-properties>
      </text:list-level-style-number>
      <text:list-level-style-number text:level="8" text:style-name="ListLabel_20_881" loext:num-list-format="%8%" style:num-format="">
        <style:list-level-properties text:list-level-position-and-space-mode="label-alignment">
          <style:list-level-label-alignment text:label-followed-by="nothing"/>
        </style:list-level-properties>
      </text:list-level-style-number>
      <text:list-level-style-number text:level="9" text:style-name="ListLabel_20_88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text:style-name="ListLabel_20_883" loext:num-list-format="%1%" style:num-format="">
        <style:list-level-properties text:list-level-position-and-space-mode="label-alignment">
          <style:list-level-label-alignment text:label-followed-by="nothing"/>
        </style:list-level-properties>
      </text:list-level-style-number>
      <text:list-level-style-number text:level="2" text:style-name="ListLabel_20_884" loext:num-list-format="%2%" style:num-format="">
        <style:list-level-properties text:list-level-position-and-space-mode="label-alignment">
          <style:list-level-label-alignment text:label-followed-by="nothing"/>
        </style:list-level-properties>
      </text:list-level-style-number>
      <text:list-level-style-number text:level="3" text:style-name="ListLabel_20_885" loext:num-list-format="%3%" style:num-format="">
        <style:list-level-properties text:list-level-position-and-space-mode="label-alignment">
          <style:list-level-label-alignment text:label-followed-by="nothing"/>
        </style:list-level-properties>
      </text:list-level-style-number>
      <text:list-level-style-number text:level="4" text:style-name="ListLabel_20_886" loext:num-list-format="%4%" style:num-format="">
        <style:list-level-properties text:list-level-position-and-space-mode="label-alignment">
          <style:list-level-label-alignment text:label-followed-by="nothing"/>
        </style:list-level-properties>
      </text:list-level-style-number>
      <text:list-level-style-number text:level="5" text:style-name="ListLabel_20_887" loext:num-list-format="%5%" style:num-format="">
        <style:list-level-properties text:list-level-position-and-space-mode="label-alignment">
          <style:list-level-label-alignment text:label-followed-by="nothing"/>
        </style:list-level-properties>
      </text:list-level-style-number>
      <text:list-level-style-number text:level="6" text:style-name="ListLabel_20_888" loext:num-list-format="%6%" style:num-format="">
        <style:list-level-properties text:list-level-position-and-space-mode="label-alignment">
          <style:list-level-label-alignment text:label-followed-by="nothing"/>
        </style:list-level-properties>
      </text:list-level-style-number>
      <text:list-level-style-number text:level="7" text:style-name="ListLabel_20_889" loext:num-list-format="%7%" style:num-format="">
        <style:list-level-properties text:list-level-position-and-space-mode="label-alignment">
          <style:list-level-label-alignment text:label-followed-by="nothing"/>
        </style:list-level-properties>
      </text:list-level-style-number>
      <text:list-level-style-number text:level="8" text:style-name="ListLabel_20_890" loext:num-list-format="%8%" style:num-format="">
        <style:list-level-properties text:list-level-position-and-space-mode="label-alignment">
          <style:list-level-label-alignment text:label-followed-by="nothing"/>
        </style:list-level-properties>
      </text:list-level-style-number>
      <text:list-level-style-number text:level="9" text:style-name="ListLabel_20_89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text:style-name="ListLabel_20_892" loext:num-list-format="%1%" style:num-format="">
        <style:list-level-properties text:list-level-position-and-space-mode="label-alignment">
          <style:list-level-label-alignment text:label-followed-by="nothing"/>
        </style:list-level-properties>
      </text:list-level-style-number>
      <text:list-level-style-number text:level="2" text:style-name="ListLabel_20_893" loext:num-list-format="%2%" style:num-format="">
        <style:list-level-properties text:list-level-position-and-space-mode="label-alignment">
          <style:list-level-label-alignment text:label-followed-by="nothing"/>
        </style:list-level-properties>
      </text:list-level-style-number>
      <text:list-level-style-number text:level="3" text:style-name="ListLabel_20_894" loext:num-list-format="%3%" style:num-format="">
        <style:list-level-properties text:list-level-position-and-space-mode="label-alignment">
          <style:list-level-label-alignment text:label-followed-by="nothing"/>
        </style:list-level-properties>
      </text:list-level-style-number>
      <text:list-level-style-number text:level="4" text:style-name="ListLabel_20_895" loext:num-list-format="%4%" style:num-format="">
        <style:list-level-properties text:list-level-position-and-space-mode="label-alignment">
          <style:list-level-label-alignment text:label-followed-by="nothing"/>
        </style:list-level-properties>
      </text:list-level-style-number>
      <text:list-level-style-number text:level="5" text:style-name="ListLabel_20_896" loext:num-list-format="%5%" style:num-format="">
        <style:list-level-properties text:list-level-position-and-space-mode="label-alignment">
          <style:list-level-label-alignment text:label-followed-by="nothing"/>
        </style:list-level-properties>
      </text:list-level-style-number>
      <text:list-level-style-number text:level="6" text:style-name="ListLabel_20_897" loext:num-list-format="%6%" style:num-format="">
        <style:list-level-properties text:list-level-position-and-space-mode="label-alignment">
          <style:list-level-label-alignment text:label-followed-by="nothing"/>
        </style:list-level-properties>
      </text:list-level-style-number>
      <text:list-level-style-number text:level="7" text:style-name="ListLabel_20_898" loext:num-list-format="%7%" style:num-format="">
        <style:list-level-properties text:list-level-position-and-space-mode="label-alignment">
          <style:list-level-label-alignment text:label-followed-by="nothing"/>
        </style:list-level-properties>
      </text:list-level-style-number>
      <text:list-level-style-number text:level="8" text:style-name="ListLabel_20_899" loext:num-list-format="%8%" style:num-format="">
        <style:list-level-properties text:list-level-position-and-space-mode="label-alignment">
          <style:list-level-label-alignment text:label-followed-by="nothing"/>
        </style:list-level-properties>
      </text:list-level-style-number>
      <text:list-level-style-number text:level="9" text:style-name="ListLabel_20_90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text:style-name="ListLabel_20_901" loext:num-list-format="%1%" style:num-format="">
        <style:list-level-properties text:list-level-position-and-space-mode="label-alignment">
          <style:list-level-label-alignment text:label-followed-by="nothing"/>
        </style:list-level-properties>
      </text:list-level-style-number>
      <text:list-level-style-number text:level="2" text:style-name="ListLabel_20_902" loext:num-list-format="%2%" style:num-format="">
        <style:list-level-properties text:list-level-position-and-space-mode="label-alignment">
          <style:list-level-label-alignment text:label-followed-by="nothing"/>
        </style:list-level-properties>
      </text:list-level-style-number>
      <text:list-level-style-number text:level="3" text:style-name="ListLabel_20_903" loext:num-list-format="%3%" style:num-format="">
        <style:list-level-properties text:list-level-position-and-space-mode="label-alignment">
          <style:list-level-label-alignment text:label-followed-by="nothing"/>
        </style:list-level-properties>
      </text:list-level-style-number>
      <text:list-level-style-number text:level="4" text:style-name="ListLabel_20_904" loext:num-list-format="%4%" style:num-format="">
        <style:list-level-properties text:list-level-position-and-space-mode="label-alignment">
          <style:list-level-label-alignment text:label-followed-by="nothing"/>
        </style:list-level-properties>
      </text:list-level-style-number>
      <text:list-level-style-number text:level="5" text:style-name="ListLabel_20_905" loext:num-list-format="%5%" style:num-format="">
        <style:list-level-properties text:list-level-position-and-space-mode="label-alignment">
          <style:list-level-label-alignment text:label-followed-by="nothing"/>
        </style:list-level-properties>
      </text:list-level-style-number>
      <text:list-level-style-number text:level="6" text:style-name="ListLabel_20_906" loext:num-list-format="%6%" style:num-format="">
        <style:list-level-properties text:list-level-position-and-space-mode="label-alignment">
          <style:list-level-label-alignment text:label-followed-by="nothing"/>
        </style:list-level-properties>
      </text:list-level-style-number>
      <text:list-level-style-number text:level="7" text:style-name="ListLabel_20_907" loext:num-list-format="%7%" style:num-format="">
        <style:list-level-properties text:list-level-position-and-space-mode="label-alignment">
          <style:list-level-label-alignment text:label-followed-by="nothing"/>
        </style:list-level-properties>
      </text:list-level-style-number>
      <text:list-level-style-number text:level="8" text:style-name="ListLabel_20_908" loext:num-list-format="%8%" style:num-format="">
        <style:list-level-properties text:list-level-position-and-space-mode="label-alignment">
          <style:list-level-label-alignment text:label-followed-by="nothing"/>
        </style:list-level-properties>
      </text:list-level-style-number>
      <text:list-level-style-number text:level="9" text:style-name="ListLabel_20_90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text:style-name="ListLabel_20_910" loext:num-list-format="%1%" style:num-format="">
        <style:list-level-properties text:list-level-position-and-space-mode="label-alignment">
          <style:list-level-label-alignment text:label-followed-by="nothing"/>
        </style:list-level-properties>
      </text:list-level-style-number>
      <text:list-level-style-number text:level="2" text:style-name="ListLabel_20_911" loext:num-list-format="%2%" style:num-format="">
        <style:list-level-properties text:list-level-position-and-space-mode="label-alignment">
          <style:list-level-label-alignment text:label-followed-by="nothing"/>
        </style:list-level-properties>
      </text:list-level-style-number>
      <text:list-level-style-number text:level="3" text:style-name="ListLabel_20_912" loext:num-list-format="%3%" style:num-format="">
        <style:list-level-properties text:list-level-position-and-space-mode="label-alignment">
          <style:list-level-label-alignment text:label-followed-by="nothing"/>
        </style:list-level-properties>
      </text:list-level-style-number>
      <text:list-level-style-number text:level="4" text:style-name="ListLabel_20_913" loext:num-list-format="%4%" style:num-format="">
        <style:list-level-properties text:list-level-position-and-space-mode="label-alignment">
          <style:list-level-label-alignment text:label-followed-by="nothing"/>
        </style:list-level-properties>
      </text:list-level-style-number>
      <text:list-level-style-number text:level="5" text:style-name="ListLabel_20_914" loext:num-list-format="%5%" style:num-format="">
        <style:list-level-properties text:list-level-position-and-space-mode="label-alignment">
          <style:list-level-label-alignment text:label-followed-by="nothing"/>
        </style:list-level-properties>
      </text:list-level-style-number>
      <text:list-level-style-number text:level="6" text:style-name="ListLabel_20_915" loext:num-list-format="%6%" style:num-format="">
        <style:list-level-properties text:list-level-position-and-space-mode="label-alignment">
          <style:list-level-label-alignment text:label-followed-by="nothing"/>
        </style:list-level-properties>
      </text:list-level-style-number>
      <text:list-level-style-number text:level="7" text:style-name="ListLabel_20_916" loext:num-list-format="%7%" style:num-format="">
        <style:list-level-properties text:list-level-position-and-space-mode="label-alignment">
          <style:list-level-label-alignment text:label-followed-by="nothing"/>
        </style:list-level-properties>
      </text:list-level-style-number>
      <text:list-level-style-number text:level="8" text:style-name="ListLabel_20_917" loext:num-list-format="%8%" style:num-format="">
        <style:list-level-properties text:list-level-position-and-space-mode="label-alignment">
          <style:list-level-label-alignment text:label-followed-by="nothing"/>
        </style:list-level-properties>
      </text:list-level-style-number>
      <text:list-level-style-number text:level="9" text:style-name="ListLabel_20_9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text:style-name="ListLabel_20_919" loext:num-list-format="%1%" style:num-format="">
        <style:list-level-properties text:list-level-position-and-space-mode="label-alignment">
          <style:list-level-label-alignment text:label-followed-by="nothing"/>
        </style:list-level-properties>
      </text:list-level-style-number>
      <text:list-level-style-number text:level="2" text:style-name="ListLabel_20_920" loext:num-list-format="%2%" style:num-format="">
        <style:list-level-properties text:list-level-position-and-space-mode="label-alignment">
          <style:list-level-label-alignment text:label-followed-by="nothing"/>
        </style:list-level-properties>
      </text:list-level-style-number>
      <text:list-level-style-number text:level="3" text:style-name="ListLabel_20_921" loext:num-list-format="%3%" style:num-format="">
        <style:list-level-properties text:list-level-position-and-space-mode="label-alignment">
          <style:list-level-label-alignment text:label-followed-by="nothing"/>
        </style:list-level-properties>
      </text:list-level-style-number>
      <text:list-level-style-number text:level="4" text:style-name="ListLabel_20_922" loext:num-list-format="%4%" style:num-format="">
        <style:list-level-properties text:list-level-position-and-space-mode="label-alignment">
          <style:list-level-label-alignment text:label-followed-by="nothing"/>
        </style:list-level-properties>
      </text:list-level-style-number>
      <text:list-level-style-number text:level="5" text:style-name="ListLabel_20_923" loext:num-list-format="%5%" style:num-format="">
        <style:list-level-properties text:list-level-position-and-space-mode="label-alignment">
          <style:list-level-label-alignment text:label-followed-by="nothing"/>
        </style:list-level-properties>
      </text:list-level-style-number>
      <text:list-level-style-number text:level="6" text:style-name="ListLabel_20_924" loext:num-list-format="%6%" style:num-format="">
        <style:list-level-properties text:list-level-position-and-space-mode="label-alignment">
          <style:list-level-label-alignment text:label-followed-by="nothing"/>
        </style:list-level-properties>
      </text:list-level-style-number>
      <text:list-level-style-number text:level="7" text:style-name="ListLabel_20_925" loext:num-list-format="%7%" style:num-format="">
        <style:list-level-properties text:list-level-position-and-space-mode="label-alignment">
          <style:list-level-label-alignment text:label-followed-by="nothing"/>
        </style:list-level-properties>
      </text:list-level-style-number>
      <text:list-level-style-number text:level="8" text:style-name="ListLabel_20_926" loext:num-list-format="%8%" style:num-format="">
        <style:list-level-properties text:list-level-position-and-space-mode="label-alignment">
          <style:list-level-label-alignment text:label-followed-by="nothing"/>
        </style:list-level-properties>
      </text:list-level-style-number>
      <text:list-level-style-number text:level="9" text:style-name="ListLabel_20_9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number text:level="1" text:style-name="ListLabel_20_928" loext:num-list-format="%1%" style:num-format="">
        <style:list-level-properties text:list-level-position-and-space-mode="label-alignment">
          <style:list-level-label-alignment text:label-followed-by="nothing"/>
        </style:list-level-properties>
      </text:list-level-style-number>
      <text:list-level-style-number text:level="2" text:style-name="ListLabel_20_929" loext:num-list-format="%2%" style:num-format="">
        <style:list-level-properties text:list-level-position-and-space-mode="label-alignment">
          <style:list-level-label-alignment text:label-followed-by="nothing"/>
        </style:list-level-properties>
      </text:list-level-style-number>
      <text:list-level-style-number text:level="3" text:style-name="ListLabel_20_930" loext:num-list-format="%3%" style:num-format="">
        <style:list-level-properties text:list-level-position-and-space-mode="label-alignment">
          <style:list-level-label-alignment text:label-followed-by="nothing"/>
        </style:list-level-properties>
      </text:list-level-style-number>
      <text:list-level-style-number text:level="4" text:style-name="ListLabel_20_931" loext:num-list-format="%4%" style:num-format="">
        <style:list-level-properties text:list-level-position-and-space-mode="label-alignment">
          <style:list-level-label-alignment text:label-followed-by="nothing"/>
        </style:list-level-properties>
      </text:list-level-style-number>
      <text:list-level-style-number text:level="5" text:style-name="ListLabel_20_932" loext:num-list-format="%5%" style:num-format="">
        <style:list-level-properties text:list-level-position-and-space-mode="label-alignment">
          <style:list-level-label-alignment text:label-followed-by="nothing"/>
        </style:list-level-properties>
      </text:list-level-style-number>
      <text:list-level-style-number text:level="6" text:style-name="ListLabel_20_933" loext:num-list-format="%6%" style:num-format="">
        <style:list-level-properties text:list-level-position-and-space-mode="label-alignment">
          <style:list-level-label-alignment text:label-followed-by="nothing"/>
        </style:list-level-properties>
      </text:list-level-style-number>
      <text:list-level-style-number text:level="7" text:style-name="ListLabel_20_934" loext:num-list-format="%7%" style:num-format="">
        <style:list-level-properties text:list-level-position-and-space-mode="label-alignment">
          <style:list-level-label-alignment text:label-followed-by="nothing"/>
        </style:list-level-properties>
      </text:list-level-style-number>
      <text:list-level-style-number text:level="8" text:style-name="ListLabel_20_935" loext:num-list-format="%8%" style:num-format="">
        <style:list-level-properties text:list-level-position-and-space-mode="label-alignment">
          <style:list-level-label-alignment text:label-followed-by="nothing"/>
        </style:list-level-properties>
      </text:list-level-style-number>
      <text:list-level-style-number text:level="9" text:style-name="ListLabel_20_9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fo:language="it" fo:country="IT"/>
    </style:style>
    <style:style style:name="MT1" style:family="text">
      <style:text-properties fo:language="it" fo:country="I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13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page-number text:select-page="current">10</text:page-number></text:p>
      </style:footer>
      <style:footer-first>
        <text:p text:style-name="MP2" loext:marker-style-name="MT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0T10:05:11</meta:creation-date>
    <meta:keyword>revisione</meta:keyword>
    <meta:keyword>revisione</meta:keyword>
    <meta:keyword>revisione</meta:keyword>
    <meta:keyword>revisione</meta:keyword>
    <meta:keyword>revisione</meta:keyword>
    <meta:keyword>revisione</meta:keyword>
    <meta:keyword>revisione</meta:keyword>
    <meta:keyword>revisione</meta:keyword>
    <meta:keyword>revisione</meta:keyword>
    <meta:keyword>revisione</meta:keyword>
    <meta:keyword>revisione</meta:keyword>
    <meta:keyword>revisione</meta:keyword>
    <meta:keyword>revisione</meta:keyword>
    <meta:keyword>revisione</meta:keyword>
    <meta:keyword>revisione</meta:keyword>
    <meta:keyword>revisione</meta:keyword>
    <meta:keyword>revisione</meta:keyword>
    <meta:keyword>revisione</meta:keyword>
    <meta:keyword>revisione</meta:keyword>
    <meta:keyword>revisione</meta:keyword>
    <meta:keyword>presentazione</meta:keyword>
    <meta:keyword>dati</meta:keyword>
    <meta:keyword>Gare</meta:keyword>
    <meta:keyword>Appalti</meta:keyword>
    <meta:keyword>Univr</meta:keyword>
    <meta:keyword>revisione</meta:keyword>
    <meta:keyword>presentazione</meta:keyword>
    <meta:keyword>dati</meta:keyword>
    <meta:keyword>Gare</meta:keyword>
    <meta:keyword>Appalti</meta:keyword>
    <meta:keyword>Univr</meta:keyword>
    <dc:language>en-US</dc:language>
    <meta:print-date>2026-07-08T12:43:08</meta:print-date>
    <dc:date>2026-07-22T17:22:11.086323232</dc:date>
    <meta:editing-cycles>1012</meta:editing-cycles>
    <dc:subject>Progetto di revisione presentazione dati Gare Appalti Univr</dc:subject>
    <dc:title>Analisi Applicazione Rischi Corruttivi</dc:title>
    <meta:editing-duration>P4DT13H23M41S</meta:editing-duration>
    <meta:generator>LibreOffice/24.2.7.2$Linux_X86_64 LibreOffice_project/420$Build-2</meta:generator>
    <meta:document-statistic meta:table-count="14" meta:image-count="64" meta:object-count="2" meta:page-count="74" meta:paragraph-count="1336" meta:word-count="19700" meta:character-count="128459" meta:non-whitespace-character-count="109926"/>
    <meta:user-defined meta:name="AppVersion">15.0000</meta:user-defined>
  </office:meta>
</office:document-meta>
</file>

<file path=Object 1/content.xml><?xml version="1.0" encoding="utf-8"?>
<math xmlns="http://www.w3.org/1998/Math/MathML" display="block">
  <semantics>
    <mrow>
      <msup>
        <mi mathvariant="italic">PxI</mi>
        <mi mathvariant="italic">INIZIALE</mi>
      </msup>
      <mi>⩾</mi>
      <msup>
        <mi mathvariant="italic">PxI</mi>
        <mi mathvariant="italic">MITIGATO</mi>
      </msup>
    </mrow>
    <annotation encoding="StarMath 5.0">{PxI} ^ {INIZIALE} ⩾ {PxI} ^ {MITIGATO}</annotation>
  </semantics>
</math>
</file>

<file path=Object 2/content.xml><?xml version="1.0" encoding="utf-8"?>
<math xmlns="http://www.w3.org/1998/Math/MathML" display="block">
  <semantics>
    <mrow>
      <msup>
        <mi mathvariant="italic">PxI</mi>
        <mi mathvariant="italic">MITIGATO</mi>
      </msup>
      <mi>⩽</mi>
      <msup>
        <mi mathvariant="italic">PxI</mi>
        <mi mathvariant="italic">MONITORATO</mi>
      </msup>
    </mrow>
    <annotation encoding="StarMath 5.0">{PxI} ^ {MITIGATO} ⩽ {PxI} ^ {MONITORATO}</annotation>
  </semantics>
</math>
</file>